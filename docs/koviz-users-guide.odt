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000000003040000023EE13B6B813C644BD5.jpg" manifest:media-type="image/jpeg"/>
  <manifest:file-entry manifest:full-path="Pictures/10000000000000F7000000CCA609643AFA91B070.png" manifest:media-type="image/png"/>
  <manifest:file-entry manifest:full-path="Pictures/1000020100000385000001BDB89D2591E61DCBF6.png" manifest:media-type="image/png"/>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formx="urn:openoffice:names:experimental:ooxml-odf-interop:xmlns:form:1.0" xmlns:xsi="http://www.w3.org/2001/XMLSchema-instance" xmlns:xsd="http://www.w3.org/2001/XMLSchema" xmlns:xforms="http://www.w3.org/2002/xforms" xmlns:dom="http://www.w3.org/2001/xml-events" xmlns:form="urn:oasis:names:tc:opendocument:xmlns:form: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meta="urn:oasis:names:tc:opendocument:xmlns:meta:1.0" xmlns:fo="urn:oasis:names:tc:opendocument:xmlns:xsl-fo-compatible:1.0" xmlns:dc="http://purl.org/dc/elements/1.1/" xmlns:office="urn:oasis:names:tc:opendocument:xmlns:office:1.0" xmlns:xlink="http://www.w3.org/1999/xlink" xmlns:ooo="http://openoffice.org/2004/office" xmlns:table="urn:oasis:names:tc:opendocument:xmlns:table:1.0" xmlns:style="urn:oasis:names:tc:opendocument:xmlns:style:1.0" xmlns:text="urn:oasis:names:tc:opendocument:xmlns:text:1.0" xmlns:draw="urn:oasis:names:tc:opendocument:xmlns:drawing:1.0" xmlns:ooow="http://openoffice.org/2004/writer" xmlns:officeooo="http://openoffice.org/2009/office" xmlns:dr3d="urn:oasis:names:tc:opendocument:xmlns:dr3d:1.0" xmlns:svg="urn:oasis:names:tc:opendocument:xmlns:svg-compatible:1.0" xmlns:css3t="http://www.w3.org/TR/css3-text/" xmlns:chart="urn:oasis:names:tc:opendocument:xmlns:chart:1.0" xmlns:rpt="http://openoffice.org/2005/report" xmlns:field="urn:openoffice:names:experimental:ooo-ms-interop:xmlns:field:1.0" xmlns:number="urn:oasis:names:tc:opendocument:xmlns:datastyle:1.0"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Table1" style:family="table">
      <style:table-properties style:width="6.925in" table:align="margins" style:may-break-between-rows="false"/>
    </style:style>
    <style:style style:name="Table1.A" style:family="table-column">
      <style:table-column-properties style:column-width="2.5632in" style:rel-column-width="24256*"/>
    </style:style>
    <style:style style:name="Table1.B" style:family="table-column">
      <style:table-column-properties style:column-width="4.3618in" style:rel-column-width="41279*"/>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may-break-between-rows="false"/>
    </style:style>
    <style:style style:name="Table2.A" style:family="table-column">
      <style:table-column-properties style:column-width="2.5632in" style:rel-column-width="24256*"/>
    </style:style>
    <style:style style:name="Table2.B" style:family="table-column">
      <style:table-column-properties style:column-width="4.3618in" style:rel-column-width="41279*"/>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LivePlotInteraction" style:family="table">
      <style:table-properties style:width="6.9236in" table:align="left"/>
    </style:style>
    <style:style style:name="LivePlotInteraction.A" style:family="table-column">
      <style:table-column-properties style:column-width="3.75in"/>
    </style:style>
    <style:style style:name="LivePlotInteraction.B" style:family="table-column">
      <style:table-column-properties style:column-width="3.1736in"/>
    </style:style>
    <style:style style:name="LivePlotInteraction.A1" style:family="table-cell">
      <style:table-cell-properties fo:padding="0in" fo:border="none" style:writing-mode="page"/>
    </style:style>
    <style:style style:name="P1" style:family="paragraph" style:parent-style-name="Header">
      <style:text-properties officeooo:rsid="000671ad" officeooo:paragraph-rsid="000671ad"/>
    </style:style>
    <style:style style:name="P2" style:family="paragraph" style:parent-style-name="Footer">
      <style:paragraph-properties fo:text-align="center" style:justify-single-word="false"/>
    </style:style>
    <style:style style:name="P3" style:family="paragraph" style:parent-style-name="Text_20_body">
      <style:paragraph-properties fo:text-align="start" style:justify-single-word="false"/>
    </style:style>
    <style:style style:name="P4" style:family="paragraph" style:parent-style-name="Text_20_body">
      <style:paragraph-properties fo:text-align="start" style:justify-single-word="false"/>
      <style:text-properties officeooo:rsid="0006243a" officeooo:paragraph-rsid="0006243a"/>
    </style:style>
    <style:style style:name="P5" style:family="paragraph" style:parent-style-name="Text_20_body">
      <style:paragraph-properties fo:text-align="start" style:justify-single-word="false"/>
      <style:text-properties officeooo:rsid="0006243a" officeooo:paragraph-rsid="000671ad"/>
    </style:style>
    <style:style style:name="P6" style:family="paragraph" style:parent-style-name="Text_20_body">
      <style:text-properties officeooo:paragraph-rsid="00099e08"/>
    </style:style>
    <style:style style:name="P7" style:family="paragraph" style:parent-style-name="Text_20_body">
      <style:text-properties officeooo:rsid="000cdebf" officeooo:paragraph-rsid="000cdebf"/>
    </style:style>
    <style:style style:name="P8" style:family="paragraph" style:parent-style-name="Text_20_body">
      <style:text-properties officeooo:rsid="001227db" officeooo:paragraph-rsid="001227db"/>
    </style:style>
    <style:style style:name="P9" style:family="paragraph" style:parent-style-name="Text_20_body">
      <style:text-properties officeooo:rsid="0017a831" officeooo:paragraph-rsid="0017a831"/>
    </style:style>
    <style:style style:name="P10" style:family="paragraph" style:parent-style-name="Text_20_body">
      <style:text-properties officeooo:rsid="0029204a" officeooo:paragraph-rsid="00331c06"/>
    </style:style>
    <style:style style:name="P11" style:family="paragraph" style:parent-style-name="Text_20_body">
      <style:text-properties officeooo:rsid="003a9acb" officeooo:paragraph-rsid="003a9acb"/>
    </style:style>
    <style:style style:name="P12" style:family="paragraph" style:parent-style-name="Text_20_body">
      <style:text-properties officeooo:rsid="003bbddc" officeooo:paragraph-rsid="003bbddc"/>
    </style:style>
    <style:style style:name="P13" style:family="paragraph" style:parent-style-name="Text_20_body">
      <style:text-properties officeooo:rsid="004142be" officeooo:paragraph-rsid="0045cf64"/>
    </style:style>
    <style:style style:name="P14" style:family="paragraph" style:parent-style-name="Text_20_body">
      <style:paragraph-properties fo:text-align="start" style:justify-single-word="false"/>
      <style:text-properties fo:font-size="16pt" officeooo:rsid="0006243a" officeooo:paragraph-rsid="000671ad" style:font-size-asian="16pt" style:font-size-complex="16pt"/>
    </style:style>
    <style:style style:name="P15" style:family="paragraph" style:parent-style-name="Text_20_body">
      <style:text-properties officeooo:rsid="0021975e" officeooo:paragraph-rsid="0021975e"/>
    </style:style>
    <style:style style:name="P16" style:family="paragraph" style:parent-style-name="Text_20_body">
      <style:text-properties officeooo:rsid="005be705" officeooo:paragraph-rsid="005be705"/>
    </style:style>
    <style:style style:name="P17" style:family="paragraph" style:parent-style-name="Text_20_body">
      <style:text-properties officeooo:rsid="0070840b" officeooo:paragraph-rsid="0070840b"/>
    </style:style>
    <style:style style:name="P18" style:family="paragraph" style:parent-style-name="Text_20_body">
      <style:text-properties officeooo:rsid="00756402" officeooo:paragraph-rsid="00756402"/>
    </style:style>
    <style:style style:name="P19" style:family="paragraph" style:parent-style-name="Text_20_body">
      <style:text-properties officeooo:rsid="00756402" officeooo:paragraph-rsid="00799fed"/>
    </style:style>
    <style:style style:name="P20" style:family="paragraph" style:parent-style-name="Text_20_body">
      <style:text-properties officeooo:rsid="0087f487" officeooo:paragraph-rsid="0087f487"/>
    </style:style>
    <style:style style:name="P21" style:family="paragraph" style:parent-style-name="Text_20_body">
      <style:text-properties officeooo:rsid="008981ec" officeooo:paragraph-rsid="008981ec"/>
    </style:style>
    <style:style style:name="P22" style:family="paragraph" style:parent-style-name="Text_20_body">
      <style:text-properties officeooo:rsid="007a0e66" officeooo:paragraph-rsid="0079d25c"/>
    </style:style>
    <style:style style:name="P23" style:family="paragraph" style:parent-style-name="Text_20_body">
      <style:text-properties officeooo:rsid="0083723e" officeooo:paragraph-rsid="008055db"/>
    </style:style>
    <style:style style:name="P24" style:family="paragraph" style:parent-style-name="Text_20_body">
      <style:text-properties officeooo:paragraph-rsid="00a9c690"/>
    </style:style>
    <style:style style:name="P25" style:family="paragraph" style:parent-style-name="Text_20_body">
      <style:text-properties officeooo:paragraph-rsid="00b133a5"/>
    </style:style>
    <style:style style:name="P26" style:family="paragraph" style:parent-style-name="Text_20_body">
      <style:text-properties officeooo:paragraph-rsid="00b999cc"/>
    </style:style>
    <style:style style:name="P27" style:family="paragraph" style:parent-style-name="Text_20_body">
      <style:text-properties officeooo:rsid="00addb07" officeooo:paragraph-rsid="00addb07"/>
    </style:style>
    <style:style style:name="P28" style:family="paragraph" style:parent-style-name="Text_20_body">
      <style:text-properties officeooo:paragraph-rsid="00c1f9fd"/>
    </style:style>
    <style:style style:name="P29" style:family="paragraph" style:parent-style-name="Text_20_body">
      <style:text-properties officeooo:rsid="00c3cf85" officeooo:paragraph-rsid="00c3cf85"/>
    </style:style>
    <style:style style:name="P30" style:family="paragraph" style:parent-style-name="Text_20_body">
      <style:text-properties officeooo:paragraph-rsid="008d1afc"/>
    </style:style>
    <style:style style:name="P31" style:family="paragraph" style:parent-style-name="Text_20_body">
      <style:text-properties officeooo:rsid="00d16414" officeooo:paragraph-rsid="00d16414"/>
    </style:style>
    <style:style style:name="P32" style:family="paragraph" style:parent-style-name="Text_20_body">
      <style:text-properties officeooo:paragraph-rsid="00d46098"/>
    </style:style>
    <style:style style:name="P33" style:family="paragraph" style:parent-style-name="Text_20_body">
      <style:text-properties officeooo:rsid="00d46098" officeooo:paragraph-rsid="00d48856"/>
    </style:style>
    <style:style style:name="P34" style:family="paragraph" style:parent-style-name="Text_20_body">
      <style:text-properties officeooo:rsid="00e0f317" officeooo:paragraph-rsid="00e27d5d"/>
    </style:style>
    <style:style style:name="P35" style:family="paragraph" style:parent-style-name="Text_20_body">
      <style:text-properties officeooo:rsid="0034ee78" officeooo:paragraph-rsid="00e87709"/>
    </style:style>
    <style:style style:name="P36" style:family="paragraph" style:parent-style-name="Text_20_body">
      <style:text-properties officeooo:rsid="00eb3af6" officeooo:paragraph-rsid="00eb3af6"/>
    </style:style>
    <style:style style:name="P37" style:family="paragraph" style:parent-style-name="Text_20_body">
      <style:text-properties officeooo:rsid="00f5ac7f" officeooo:paragraph-rsid="00f5ac7f"/>
    </style:style>
    <style:style style:name="P38" style:family="paragraph" style:parent-style-name="Text_20_body">
      <style:text-properties officeooo:rsid="00e3f7f7" officeooo:paragraph-rsid="00e3f7f7"/>
    </style:style>
    <style:style style:name="P39" style:family="paragraph" style:parent-style-name="Text_20_body">
      <style:text-properties officeooo:rsid="010352e6" officeooo:paragraph-rsid="01034031"/>
    </style:style>
    <style:style style:name="P40" style:family="paragraph" style:parent-style-name="Text_20_body">
      <style:text-properties officeooo:paragraph-rsid="01034031"/>
    </style:style>
    <style:style style:name="P41" style:family="paragraph" style:parent-style-name="Text_20_body">
      <style:text-properties officeooo:rsid="0106c5d7" officeooo:paragraph-rsid="0106c5d7"/>
    </style:style>
    <style:style style:name="P42" style:family="paragraph" style:parent-style-name="Text_20_body">
      <style:text-properties officeooo:paragraph-rsid="011733c7"/>
    </style:style>
    <style:style style:name="P43" style:family="paragraph" style:parent-style-name="Text_20_body">
      <style:paragraph-properties fo:margin-left="0.4925in" fo:margin-right="0in" fo:text-indent="0in" style:auto-text-indent="false"/>
      <style:text-properties officeooo:rsid="0017a831" officeooo:paragraph-rsid="0017a831"/>
    </style:style>
    <style:style style:name="P44" style:family="paragraph" style:parent-style-name="Text_20_body">
      <style:paragraph-properties fo:margin-left="0.4925in" fo:margin-right="0in" fo:text-indent="0in" style:auto-text-indent="false"/>
      <style:text-properties style:font-name="Liberation Mono" officeooo:rsid="0021975e" officeooo:paragraph-rsid="00271556"/>
    </style:style>
    <style:style style:name="P45" style:family="paragraph" style:parent-style-name="Text_20_body">
      <style:paragraph-properties fo:margin-left="0.4925in" fo:margin-right="0in" fo:text-indent="0in" style:auto-text-indent="false"/>
      <style:text-properties style:font-name="Liberation Mono" fo:font-size="9pt" fo:font-weight="bold" officeooo:rsid="00138413" officeooo:paragraph-rsid="00138413" style:font-size-asian="9pt" style:font-weight-asian="bold" style:font-size-complex="9pt" style:font-weight-complex="bold"/>
    </style:style>
    <style:style style:name="P46" style:family="paragraph" style:parent-style-name="Text_20_body">
      <style:paragraph-properties fo:margin-left="0.4925in" fo:margin-right="0in" fo:text-indent="0in" style:auto-text-indent="false"/>
      <style:text-properties style:font-name="Liberation Mono" fo:font-size="9pt" officeooo:rsid="00138413" officeooo:paragraph-rsid="00532145" style:font-size-asian="9pt" style:font-size-complex="9pt"/>
    </style:style>
    <style:style style:name="P47" style:family="paragraph" style:parent-style-name="Text_20_body">
      <style:paragraph-properties fo:margin-left="0.4925in" fo:margin-right="0in" fo:text-indent="0in" style:auto-text-indent="false"/>
      <style:text-properties officeooo:rsid="00303cac" officeooo:paragraph-rsid="00303cac"/>
    </style:style>
    <style:style style:name="P48" style:family="paragraph" style:parent-style-name="Text_20_body">
      <style:paragraph-properties fo:margin-left="0.4925in" fo:margin-right="0in" fo:text-indent="0in" style:auto-text-indent="false"/>
      <style:text-properties style:font-name="Liberation Serif" officeooo:rsid="002a8c7a" officeooo:paragraph-rsid="00331c06"/>
    </style:style>
    <style:style style:name="P49" style:family="paragraph" style:parent-style-name="Text_20_body">
      <style:paragraph-properties fo:margin-left="0.4925in" fo:margin-right="0in" fo:text-indent="0in" style:auto-text-indent="false"/>
      <style:text-properties style:font-name="Liberation Serif" officeooo:rsid="0021975e" officeooo:paragraph-rsid="0022b7e1"/>
    </style:style>
    <style:style style:name="P50" style:family="paragraph" style:parent-style-name="Text_20_body">
      <style:paragraph-properties fo:margin-left="0.4925in" fo:margin-right="0in" fo:text-indent="0in" style:auto-text-indent="false"/>
      <style:text-properties style:font-name="Liberation Serif" officeooo:rsid="0021975e" officeooo:paragraph-rsid="0021975e"/>
    </style:style>
    <style:style style:name="P51" style:family="paragraph" style:parent-style-name="Text_20_body">
      <style:paragraph-properties fo:margin-left="0.4925in" fo:margin-right="0in" fo:text-indent="0in" style:auto-text-indent="false"/>
      <style:text-properties style:font-name="Liberation Serif" officeooo:rsid="000d10e4" officeooo:paragraph-rsid="000d10e4"/>
    </style:style>
    <style:style style:name="P52" style:family="paragraph" style:parent-style-name="Text_20_body">
      <style:paragraph-properties fo:margin-left="0.4925in" fo:margin-right="0in" fo:text-indent="0in" style:auto-text-indent="false"/>
      <style:text-properties style:font-name="Liberation Serif" officeooo:rsid="000d10e4" officeooo:paragraph-rsid="006f4920"/>
    </style:style>
    <style:style style:name="P53" style:family="paragraph" style:parent-style-name="Text_20_body">
      <style:paragraph-properties fo:margin-left="0.4925in" fo:margin-right="0in" fo:text-indent="0in" style:auto-text-indent="false"/>
      <style:text-properties style:font-name="Liberation Serif" officeooo:rsid="0022b7e1" officeooo:paragraph-rsid="0022b7e1"/>
    </style:style>
    <style:style style:name="P54" style:family="paragraph" style:parent-style-name="Text_20_body">
      <style:paragraph-properties fo:margin-left="0.4925in" fo:margin-right="0in" fo:text-indent="0in" style:auto-text-indent="false"/>
      <style:text-properties style:font-name="Liberation Serif" fo:font-size="12pt" officeooo:rsid="008981ec" officeooo:paragraph-rsid="008981ec" style:font-size-asian="10.5pt" style:font-size-complex="12pt"/>
    </style:style>
    <style:style style:name="P55" style:family="paragraph" style:parent-style-name="Text_20_body">
      <style:paragraph-properties fo:margin-left="0.4925in" fo:margin-right="0in" fo:text-indent="0in" style:auto-text-indent="false"/>
      <style:text-properties officeooo:rsid="0034ee78" officeooo:paragraph-rsid="0034ee78"/>
    </style:style>
    <style:style style:name="P56" style:family="paragraph" style:parent-style-name="Text_20_body">
      <style:paragraph-properties fo:margin-left="0.4925in" fo:margin-right="0in" fo:text-indent="0in" style:auto-text-indent="false"/>
      <style:text-properties officeooo:rsid="003bbddc" officeooo:paragraph-rsid="003bbddc"/>
    </style:style>
    <style:style style:name="P57" style:family="paragraph" style:parent-style-name="Text_20_body">
      <style:paragraph-properties fo:margin-left="0.4925in" fo:margin-right="0in" fo:text-indent="0in" style:auto-text-indent="false"/>
      <style:text-properties officeooo:rsid="004142be" officeooo:paragraph-rsid="0045cf64"/>
    </style:style>
    <style:style style:name="P58" style:family="paragraph" style:parent-style-name="Text_20_body">
      <style:paragraph-properties fo:margin-left="0.4925in" fo:margin-right="0in" fo:text-align="start" style:justify-single-word="false" fo:text-indent="0in" style:auto-text-indent="false"/>
      <style:text-properties fo:font-style="normal" officeooo:rsid="005be705" officeooo:paragraph-rsid="005c2ab2" style:font-style-asian="normal" style:font-style-complex="normal"/>
    </style:style>
    <style:style style:name="P59" style:family="paragraph" style:parent-style-name="Text_20_body">
      <style:paragraph-properties fo:margin-left="0.4925in" fo:margin-right="0in" fo:text-indent="0in" style:auto-text-indent="false"/>
      <style:text-properties style:font-name="DejaVu Sans Mono" fo:font-size="9pt" officeooo:rsid="006f6fdf" officeooo:paragraph-rsid="006f6fdf" style:font-size-asian="9pt" style:font-size-complex="9pt"/>
    </style:style>
    <style:style style:name="P60" style:family="paragraph" style:parent-style-name="Text_20_body">
      <style:paragraph-properties fo:margin-left="0.4925in" fo:margin-right="0in" fo:text-align="start" style:justify-single-word="false" fo:text-indent="0in" style:auto-text-indent="false"/>
      <style:text-properties style:font-name="DejaVu Sans Mono" fo:font-size="10pt" fo:font-style="normal" officeooo:rsid="00729a7f" officeooo:paragraph-rsid="00729a7f" style:font-size-asian="10pt" style:font-style-asian="normal" style:font-size-complex="10pt" style:font-style-complex="normal"/>
    </style:style>
    <style:style style:name="P61" style:family="paragraph" style:parent-style-name="Text_20_body">
      <style:paragraph-properties fo:margin-left="0.4925in" fo:margin-right="0in" fo:text-indent="0in" style:auto-text-indent="false"/>
      <style:text-properties style:font-name="DejaVu Sans Mono" officeooo:rsid="0087f487" officeooo:paragraph-rsid="0087f487"/>
    </style:style>
    <style:style style:name="P62" style:family="paragraph" style:parent-style-name="Text_20_body">
      <style:paragraph-properties fo:margin-left="0.4925in" fo:margin-right="0in" fo:text-indent="0in" style:auto-text-indent="false"/>
      <style:text-properties officeooo:rsid="008b6fed" officeooo:paragraph-rsid="008b6fed"/>
    </style:style>
    <style:style style:name="P63" style:family="paragraph" style:parent-style-name="Text_20_body">
      <style:paragraph-properties fo:margin-left="0.4925in" fo:margin-right="0in" fo:text-indent="0in" style:auto-text-indent="false"/>
      <style:text-properties officeooo:rsid="00756402" officeooo:paragraph-rsid="00799fed"/>
    </style:style>
    <style:style style:name="P64" style:family="paragraph" style:parent-style-name="Text_20_body">
      <style:paragraph-properties fo:margin-left="0.4925in" fo:margin-right="0in" fo:text-indent="0in" style:auto-text-indent="false"/>
      <style:text-properties officeooo:rsid="00a9c690" officeooo:paragraph-rsid="00a9c690"/>
    </style:style>
    <style:style style:name="P65" style:family="paragraph" style:parent-style-name="Text_20_body">
      <style:paragraph-properties fo:margin-left="0.4925in" fo:margin-right="0in" fo:text-indent="0in" style:auto-text-indent="false"/>
      <style:text-properties officeooo:paragraph-rsid="00ab6fa9"/>
    </style:style>
    <style:style style:name="P66" style:family="paragraph" style:parent-style-name="Text_20_body">
      <style:paragraph-properties fo:margin-left="0.4925in" fo:margin-right="0in" fo:text-indent="0in" style:auto-text-indent="false"/>
      <style:text-properties officeooo:paragraph-rsid="00c1f9fd"/>
    </style:style>
    <style:style style:name="P67" style:family="paragraph" style:parent-style-name="Text_20_body">
      <style:paragraph-properties fo:margin-left="0.4925in" fo:margin-right="0in" fo:text-indent="0in" style:auto-text-indent="false"/>
      <style:text-properties officeooo:paragraph-rsid="00c561db"/>
    </style:style>
    <style:style style:name="P68" style:family="paragraph" style:parent-style-name="Text_20_body">
      <style:paragraph-properties fo:margin-left="0.4925in" fo:margin-right="0in" fo:text-indent="0in" style:auto-text-indent="false"/>
      <style:text-properties officeooo:rsid="0083723e" officeooo:paragraph-rsid="0083723e"/>
    </style:style>
    <style:style style:name="P69" style:family="paragraph" style:parent-style-name="Text_20_body">
      <style:paragraph-properties fo:margin-left="0.4925in" fo:margin-right="0in" fo:text-indent="0in" style:auto-text-indent="false"/>
      <style:text-properties officeooo:rsid="003ae6ef" officeooo:paragraph-rsid="003ae6ef"/>
    </style:style>
    <style:style style:name="P70" style:family="paragraph" style:parent-style-name="Text_20_body">
      <style:paragraph-properties fo:margin-left="0.4925in" fo:margin-right="0in" fo:text-indent="0in" style:auto-text-indent="false"/>
      <style:text-properties officeooo:rsid="00eb3af6" officeooo:paragraph-rsid="00eb3af6"/>
    </style:style>
    <style:style style:name="P71" style:family="paragraph" style:parent-style-name="Text_20_body">
      <style:paragraph-properties fo:margin-left="0.4925in" fo:margin-right="0in" fo:text-indent="0in" style:auto-text-indent="false"/>
      <style:text-properties officeooo:rsid="00f5ac7f" officeooo:paragraph-rsid="00f792ad"/>
    </style:style>
    <style:style style:name="P72" style:family="paragraph" style:parent-style-name="Text_20_body">
      <style:paragraph-properties fo:margin-left="0.4925in" fo:margin-right="0in" fo:text-indent="0in" style:auto-text-indent="false"/>
      <style:text-properties officeooo:rsid="00f5ac7f" officeooo:paragraph-rsid="00f5ac7f"/>
    </style:style>
    <style:style style:name="P73" style:family="paragraph" style:parent-style-name="Text_20_body">
      <style:paragraph-properties fo:margin-left="0.4925in" fo:margin-right="0in" fo:text-indent="0in" style:auto-text-indent="false"/>
      <style:text-properties officeooo:rsid="00f792ad" officeooo:paragraph-rsid="00f792ad"/>
    </style:style>
    <style:style style:name="P74" style:family="paragraph" style:parent-style-name="Text_20_body">
      <style:paragraph-properties fo:margin-left="0.4925in" fo:margin-right="0in" fo:text-indent="0in" style:auto-text-indent="false"/>
      <style:text-properties officeooo:paragraph-rsid="0045cf64"/>
    </style:style>
    <style:style style:name="P75" style:family="paragraph" style:parent-style-name="Text_20_body">
      <style:paragraph-properties fo:margin-left="0.4925in" fo:margin-right="0in" fo:text-indent="0in" style:auto-text-indent="false"/>
      <style:text-properties officeooo:rsid="0107ca75" officeooo:paragraph-rsid="0107ca75"/>
    </style:style>
    <style:style style:name="P76" style:family="paragraph" style:parent-style-name="Text_20_body">
      <style:paragraph-properties fo:margin-left="0.9846in" fo:margin-right="0in" fo:text-indent="0in" style:auto-text-indent="false"/>
      <style:text-properties officeooo:rsid="00303cac" officeooo:paragraph-rsid="00303cac"/>
    </style:style>
    <style:style style:name="P77" style:family="paragraph" style:parent-style-name="Text_20_body">
      <style:paragraph-properties fo:margin-left="0.9846in" fo:margin-right="0in" fo:text-indent="0in" style:auto-text-indent="false"/>
      <style:text-properties style:font-name="Liberation Serif" officeooo:rsid="002a8c7a" officeooo:paragraph-rsid="00331c06"/>
    </style:style>
    <style:style style:name="P78" style:family="paragraph" style:parent-style-name="Text_20_body">
      <style:paragraph-properties fo:margin-left="0.9846in" fo:margin-right="0in" fo:text-indent="0in" style:auto-text-indent="false"/>
      <style:text-properties style:font-name="Liberation Serif" officeooo:rsid="0021975e" officeooo:paragraph-rsid="0025e2ba"/>
    </style:style>
    <style:style style:name="P79" style:family="paragraph" style:parent-style-name="Text_20_body">
      <style:paragraph-properties fo:margin-left="0.9846in" fo:margin-right="0in" fo:text-indent="0in" style:auto-text-indent="false"/>
      <style:text-properties style:font-name="Liberation Serif" officeooo:rsid="0021975e" officeooo:paragraph-rsid="0021975e"/>
    </style:style>
    <style:style style:name="P80" style:family="paragraph" style:parent-style-name="Text_20_body">
      <style:paragraph-properties fo:margin-left="0.9846in" fo:margin-right="0in" fo:text-indent="0in" style:auto-text-indent="false"/>
      <style:text-properties style:font-name="Liberation Serif" officeooo:rsid="000d10e4" officeooo:paragraph-rsid="000d10e4"/>
    </style:style>
    <style:style style:name="P81" style:family="paragraph" style:parent-style-name="Text_20_body">
      <style:paragraph-properties fo:margin-left="0.9846in" fo:margin-right="0in" fo:text-indent="0in" style:auto-text-indent="false"/>
      <style:text-properties style:font-name="Liberation Serif" officeooo:rsid="00109520" officeooo:paragraph-rsid="00109520"/>
    </style:style>
    <style:style style:name="P82" style:family="paragraph" style:parent-style-name="Text_20_body">
      <style:paragraph-properties fo:margin-left="0.9846in" fo:margin-right="0in" fo:text-indent="0in" style:auto-text-indent="false"/>
      <style:text-properties officeooo:rsid="0060e2c2" officeooo:paragraph-rsid="0060e2c2"/>
    </style:style>
    <style:style style:name="P83" style:family="paragraph" style:parent-style-name="Text_20_body">
      <style:paragraph-properties fo:margin-left="0.9846in" fo:margin-right="0in" fo:text-indent="0in" style:auto-text-indent="false"/>
      <style:text-properties style:font-name="Liberation Mono" fo:font-size="9pt" fo:font-weight="normal" officeooo:rsid="006c6a19" officeooo:paragraph-rsid="006c6a19" style:font-size-asian="9pt" style:font-weight-asian="normal" style:font-size-complex="9pt" style:font-weight-complex="normal"/>
    </style:style>
    <style:style style:name="P84" style:family="paragraph" style:parent-style-name="Text_20_body">
      <style:paragraph-properties fo:margin-left="0.9846in" fo:margin-right="0in" fo:text-indent="0in" style:auto-text-indent="false"/>
      <style:text-properties officeooo:rsid="008b6fed" officeooo:paragraph-rsid="008b6fed"/>
    </style:style>
    <style:style style:name="P85" style:family="paragraph" style:parent-style-name="Text_20_body">
      <style:paragraph-properties fo:margin-left="0.9846in" fo:margin-right="0in" fo:text-indent="0in" style:auto-text-indent="false"/>
      <style:text-properties officeooo:rsid="0107ca75" officeooo:paragraph-rsid="0107ca75"/>
    </style:style>
    <style:style style:name="P86" style:family="paragraph" style:parent-style-name="Text_20_body">
      <style:paragraph-properties fo:margin-left="0in" fo:margin-right="0in" fo:text-indent="0in" style:auto-text-indent="false"/>
      <style:text-properties officeooo:rsid="0034ee78" officeooo:paragraph-rsid="0034ee78"/>
    </style:style>
    <style:style style:name="P87" style:family="paragraph" style:parent-style-name="Text_20_body">
      <style:paragraph-properties fo:margin-left="0in" fo:margin-right="0in" fo:text-indent="0in" style:auto-text-indent="false"/>
      <style:text-properties officeooo:rsid="004142be" officeooo:paragraph-rsid="0045cf64"/>
    </style:style>
    <style:style style:name="P88" style:family="paragraph" style:parent-style-name="Text_20_body">
      <style:paragraph-properties fo:margin-left="0in" fo:margin-right="0in" fo:text-align="start" style:justify-single-word="false" fo:text-indent="0in" style:auto-text-indent="false"/>
      <style:text-properties fo:font-style="normal" officeooo:rsid="005be705" officeooo:paragraph-rsid="005be705" style:font-style-asian="normal" style:font-style-complex="normal"/>
    </style:style>
    <style:style style:name="P89" style:family="paragraph" style:parent-style-name="Text_20_body">
      <style:paragraph-properties fo:margin-left="0in" fo:margin-right="0in" fo:text-align="start" style:justify-single-word="false" fo:text-indent="0in" style:auto-text-indent="false"/>
      <style:text-properties fo:font-style="normal" officeooo:rsid="0071e569" officeooo:paragraph-rsid="0071e569" style:font-style-asian="normal" style:font-style-complex="normal"/>
    </style:style>
    <style:style style:name="P90" style:family="paragraph" style:parent-style-name="Text_20_body">
      <style:paragraph-properties fo:margin-left="0in" fo:margin-right="0in" fo:text-indent="0in" style:auto-text-indent="false"/>
      <style:text-properties officeooo:rsid="0068a657" officeooo:paragraph-rsid="0068a657"/>
    </style:style>
    <style:style style:name="P91" style:family="paragraph" style:parent-style-name="Text_20_body">
      <style:paragraph-properties fo:margin-left="0in" fo:margin-right="0in" fo:text-indent="0in" style:auto-text-indent="false"/>
      <style:text-properties style:font-name="Liberation Sans" officeooo:rsid="0087f487" officeooo:paragraph-rsid="008981ec"/>
    </style:style>
    <style:style style:name="P92" style:family="paragraph" style:parent-style-name="Text_20_body">
      <style:paragraph-properties fo:margin-left="0in" fo:margin-right="0in" fo:text-indent="0in" style:auto-text-indent="false"/>
      <style:text-properties officeooo:rsid="008b6fed" officeooo:paragraph-rsid="008b6fed"/>
    </style:style>
    <style:style style:name="P93" style:family="paragraph" style:parent-style-name="Text_20_body">
      <style:paragraph-properties fo:margin-left="0in" fo:margin-right="0in" fo:text-indent="0in" style:auto-text-indent="false"/>
      <style:text-properties style:text-line-through-style="none" style:text-line-through-type="none" officeooo:rsid="00b67533" officeooo:paragraph-rsid="00b67533"/>
    </style:style>
    <style:style style:name="P94" style:family="paragraph" style:parent-style-name="Text_20_body">
      <style:paragraph-properties fo:margin-left="0in" fo:margin-right="0in" fo:text-indent="0in" style:auto-text-indent="false"/>
      <style:text-properties officeooo:rsid="0083723e" officeooo:paragraph-rsid="0083723e"/>
    </style:style>
    <style:style style:name="P95" style:family="paragraph" style:parent-style-name="Text_20_body">
      <style:paragraph-properties fo:margin-left="0in" fo:margin-right="0in" fo:text-indent="0in" style:auto-text-indent="false"/>
      <style:text-properties officeooo:paragraph-rsid="00cfaff1"/>
    </style:style>
    <style:style style:name="P96" style:family="paragraph" style:parent-style-name="Text_20_body">
      <style:paragraph-properties fo:margin-left="0in" fo:margin-right="0in" fo:text-indent="0in" style:auto-text-indent="false"/>
      <style:text-properties officeooo:rsid="00f5ac7f" officeooo:paragraph-rsid="00f792ad"/>
    </style:style>
    <style:style style:name="P97" style:family="paragraph" style:parent-style-name="Text_20_body">
      <style:paragraph-properties fo:margin-left="0in" fo:margin-right="0in" fo:text-indent="0in" style:auto-text-indent="false"/>
      <style:text-properties officeooo:paragraph-rsid="00f792ad"/>
    </style:style>
    <style:style style:name="P98" style:family="paragraph" style:parent-style-name="Text_20_body">
      <style:paragraph-properties fo:margin-left="0in" fo:margin-right="0in" fo:text-indent="0in" style:auto-text-indent="false"/>
      <style:text-properties officeooo:rsid="00fa266b" officeooo:paragraph-rsid="00fa266b"/>
    </style:style>
    <style:style style:name="P99" style:family="paragraph" style:parent-style-name="Text_20_body">
      <style:paragraph-properties fo:margin-left="0in" fo:margin-right="0in" fo:text-indent="0in" style:auto-text-indent="false"/>
      <style:text-properties officeooo:paragraph-rsid="010d6fab"/>
    </style:style>
    <style:style style:name="P100" style:family="paragraph" style:parent-style-name="Text_20_body" style:master-page-name="">
      <loext:graphic-properties draw:fill="none"/>
      <style:paragraph-properties fo:margin-left="0in" fo:margin-right="0in" fo:margin-top="0in" fo:margin-bottom="0.0972in" loext:contextual-spacing="false" fo:line-height="120%" fo:text-align="start" style:justify-single-word="false" fo:text-indent="0in" style:auto-text-indent="false" style:page-number="auto" fo:background-color="transparent"/>
      <style:text-properties officeooo:rsid="00bd05ee" officeooo:paragraph-rsid="00bd05ee"/>
    </style:style>
    <style:style style:name="P101" style:family="paragraph" style:parent-style-name="Text_20_body" style:master-page-name="">
      <loext:graphic-properties draw:fill="none"/>
      <style:paragraph-properties fo:margin-left="0in" fo:margin-right="0in" fo:margin-top="0in" fo:margin-bottom="0.0972in" loext:contextual-spacing="false" fo:line-height="120%" fo:text-indent="0in" style:auto-text-indent="false" style:page-number="auto" fo:background-color="transparent"/>
      <style:text-properties officeooo:paragraph-rsid="00cad0f2"/>
    </style:style>
    <style:style style:name="P102" style:family="paragraph" style:parent-style-name="Text_20_body">
      <style:paragraph-properties fo:margin-left="1.4772in" fo:margin-right="0in" fo:text-indent="0in" style:auto-text-indent="false"/>
      <style:text-properties style:font-name="Liberation Serif" officeooo:rsid="002a8c7a" officeooo:paragraph-rsid="00331c06"/>
    </style:style>
    <style:style style:name="P103" style:family="paragraph" style:parent-style-name="Text_20_body">
      <style:paragraph-properties fo:margin-left="1.4772in" fo:margin-right="0in" fo:text-indent="0in" style:auto-text-indent="false"/>
      <style:text-properties style:font-name="Liberation Serif" officeooo:rsid="0021975e" officeooo:paragraph-rsid="0025e2ba"/>
    </style:style>
    <style:style style:name="P104" style:family="paragraph" style:parent-style-name="Text_20_body">
      <style:paragraph-properties fo:margin-left="1.4772in" fo:margin-right="0in" fo:text-indent="0in" style:auto-text-indent="false"/>
      <style:text-properties style:font-name="Liberation Serif" officeooo:rsid="000d10e4" officeooo:paragraph-rsid="000d10e4"/>
    </style:style>
    <style:style style:name="P105" style:family="paragraph" style:parent-style-name="Text_20_body">
      <style:paragraph-properties fo:margin-left="1.4772in" fo:margin-right="0in" fo:text-indent="0in" style:auto-text-indent="false"/>
      <style:text-properties style:font-name="Liberation Serif" officeooo:rsid="000d10e4" officeooo:paragraph-rsid="006f4920"/>
    </style:style>
    <style:style style:name="P106" style:family="paragraph" style:parent-style-name="Text_20_body">
      <style:paragraph-properties fo:margin-left="1.4772in" fo:margin-right="0in" fo:text-indent="0in" style:auto-text-indent="false"/>
      <style:text-properties style:font-name="Liberation Serif" officeooo:rsid="00109520" officeooo:paragraph-rsid="00322b77"/>
    </style:style>
    <style:style style:name="P107" style:family="paragraph" style:parent-style-name="Text_20_body">
      <style:paragraph-properties fo:margin-left="1.4772in" fo:margin-right="0in" fo:text-indent="0in" style:auto-text-indent="false"/>
      <style:text-properties style:font-name="Liberation Serif" officeooo:rsid="0025a260" officeooo:paragraph-rsid="00337032"/>
    </style:style>
    <style:style style:name="P108" style:family="paragraph" style:parent-style-name="Text_20_body">
      <style:paragraph-properties fo:margin-left="1.4772in" fo:margin-right="0in" fo:text-indent="0in" style:auto-text-indent="false"/>
      <style:text-properties officeooo:rsid="008b6fed" officeooo:paragraph-rsid="008b6fed"/>
    </style:style>
    <style:style style:name="P109" style:family="paragraph" style:parent-style-name="Text_20_body">
      <style:paragraph-properties fo:margin-left="1.4772in" fo:margin-right="0in" fo:text-indent="0in" style:auto-text-indent="false"/>
      <style:text-properties officeooo:rsid="0107ca75" officeooo:paragraph-rsid="0107ca75"/>
    </style:style>
    <style:style style:name="P110" style:family="paragraph" style:parent-style-name="Text_20_body">
      <style:paragraph-properties fo:margin-left="1.9693in" fo:margin-right="0in" fo:text-indent="0in" style:auto-text-indent="false"/>
      <style:text-properties style:font-name="Liberation Serif" officeooo:rsid="0021975e" officeooo:paragraph-rsid="0021975e"/>
    </style:style>
    <style:style style:name="P111" style:family="paragraph" style:parent-style-name="Text_20_body">
      <style:paragraph-properties fo:margin-left="1.9693in" fo:margin-right="0in" fo:text-indent="0in" style:auto-text-indent="false"/>
      <style:text-properties style:font-name="Liberation Serif" officeooo:rsid="0021975e" officeooo:paragraph-rsid="0093fc42"/>
    </style:style>
    <style:style style:name="P112" style:family="paragraph" style:parent-style-name="Text_20_body">
      <style:paragraph-properties fo:margin-left="2.4618in" fo:margin-right="0in" fo:text-indent="0in" style:auto-text-indent="false"/>
      <style:text-properties style:font-name="Liberation Serif" officeooo:rsid="0021975e" officeooo:paragraph-rsid="0021975e"/>
    </style:style>
    <style:style style:name="P113" style:family="paragraph" style:parent-style-name="Text_20_body">
      <style:paragraph-properties fo:margin-left="2.4618in" fo:margin-right="0in" fo:text-indent="0in" style:auto-text-indent="false"/>
      <style:text-properties style:font-name="Liberation Serif" officeooo:rsid="0021975e" officeooo:paragraph-rsid="00337032"/>
    </style:style>
    <style:style style:name="P114" style:family="paragraph" style:parent-style-name="Subtitle">
      <style:paragraph-properties fo:text-align="start" style:justify-single-word="false"/>
      <style:text-properties officeooo:rsid="0006243a" officeooo:paragraph-rsid="0006243a"/>
    </style:style>
    <style:style style:name="P115" style:family="paragraph" style:parent-style-name="Table_20_Contents">
      <style:text-properties officeooo:rsid="004c85fe" officeooo:paragraph-rsid="004c85fe"/>
    </style:style>
    <style:style style:name="P116" style:family="paragraph" style:parent-style-name="Table_20_Contents">
      <style:text-properties officeooo:rsid="004d180e" officeooo:paragraph-rsid="004d180e"/>
    </style:style>
    <style:style style:name="P117" style:family="paragraph" style:parent-style-name="Table_20_Contents">
      <style:text-properties officeooo:rsid="004df5b9" officeooo:paragraph-rsid="004df5b9"/>
    </style:style>
    <style:style style:name="P118" style:family="paragraph" style:parent-style-name="Table_20_Contents">
      <style:text-properties officeooo:rsid="004fd811" officeooo:paragraph-rsid="004fd811"/>
    </style:style>
    <style:style style:name="P119" style:family="paragraph" style:parent-style-name="Table_20_Contents">
      <style:text-properties officeooo:rsid="00743ec0" officeooo:paragraph-rsid="00743ec0"/>
    </style:style>
    <style:style style:name="P120" style:family="paragraph" style:parent-style-name="Table_20_Contents">
      <style:text-properties officeooo:rsid="0096c97e" officeooo:paragraph-rsid="0096c97e"/>
    </style:style>
    <style:style style:name="P121" style:family="paragraph" style:parent-style-name="Table_20_Contents">
      <style:text-properties officeooo:rsid="0098506f" officeooo:paragraph-rsid="0098506f"/>
    </style:style>
    <style:style style:name="P122" style:family="paragraph" style:parent-style-name="Table_20_Contents">
      <style:text-properties officeooo:rsid="009aeccb" officeooo:paragraph-rsid="009aeccb"/>
    </style:style>
    <style:style style:name="P123" style:family="paragraph" style:parent-style-name="Table_20_Contents">
      <style:text-properties officeooo:rsid="009e02b3" officeooo:paragraph-rsid="009e02b3"/>
    </style:style>
    <style:style style:name="P124" style:family="paragraph" style:parent-style-name="Table_20_Contents">
      <style:text-properties officeooo:rsid="00a2205e" officeooo:paragraph-rsid="00a2205e"/>
    </style:style>
    <style:style style:name="P125" style:family="paragraph" style:parent-style-name="Table_20_Contents">
      <style:text-properties officeooo:rsid="00a26629" officeooo:paragraph-rsid="00a26629"/>
    </style:style>
    <style:style style:name="P126" style:family="paragraph" style:parent-style-name="Table_20_Contents">
      <style:text-properties officeooo:rsid="00a43d20" officeooo:paragraph-rsid="00a43d20"/>
    </style:style>
    <style:style style:name="P127" style:family="paragraph" style:parent-style-name="Table_20_Contents">
      <style:text-properties officeooo:rsid="00a579fc" officeooo:paragraph-rsid="00a579fc"/>
    </style:style>
    <style:style style:name="P128" style:family="paragraph" style:parent-style-name="Table_20_Contents">
      <style:text-properties officeooo:rsid="00a8c3e6" officeooo:paragraph-rsid="00a8c3e6"/>
    </style:style>
    <style:style style:name="P129" style:family="paragraph" style:parent-style-name="Table_20_Contents">
      <style:text-properties officeooo:rsid="00a9421a" officeooo:paragraph-rsid="00a9421a"/>
    </style:style>
    <style:style style:name="P130" style:family="paragraph" style:parent-style-name="Table_20_Contents">
      <style:text-properties officeooo:rsid="00d45834" officeooo:paragraph-rsid="00d45834"/>
    </style:style>
    <style:style style:name="P131" style:family="paragraph" style:parent-style-name="Table_20_Contents">
      <style:text-properties officeooo:paragraph-rsid="00d45834"/>
    </style:style>
    <style:style style:name="P132" style:family="paragraph" style:parent-style-name="Table_20_Contents">
      <style:text-properties officeooo:rsid="00d796ec" officeooo:paragraph-rsid="00d796ec"/>
    </style:style>
    <style:style style:name="P133" style:family="paragraph" style:parent-style-name="Table_20_Contents">
      <style:text-properties officeooo:rsid="00d796ec" officeooo:paragraph-rsid="00d8650e"/>
    </style:style>
    <style:style style:name="P134" style:family="paragraph" style:parent-style-name="Table_20_Contents">
      <style:text-properties officeooo:paragraph-rsid="00d8650e"/>
    </style:style>
    <style:style style:name="P135" style:family="paragraph" style:parent-style-name="Table_20_Contents">
      <style:text-properties officeooo:rsid="00e04ce4" officeooo:paragraph-rsid="00e04ce4"/>
    </style:style>
    <style:style style:name="P136" style:family="paragraph" style:parent-style-name="Table_20_Contents">
      <style:text-properties officeooo:rsid="00f20fc4" officeooo:paragraph-rsid="00f20fc4"/>
    </style:style>
    <style:style style:name="P137" style:family="paragraph" style:parent-style-name="Table_20_Contents">
      <style:text-properties officeooo:rsid="00f3b0d8" officeooo:paragraph-rsid="00f3b0d8"/>
    </style:style>
    <style:style style:name="P138" style:family="paragraph" style:parent-style-name="Text_20_body">
      <loext:graphic-properties draw:fill="none"/>
      <style:paragraph-properties fo:margin-top="0in" fo:margin-bottom="0.0972in" loext:contextual-spacing="false" fo:line-height="120%" fo:text-align="start" style:justify-single-word="false" fo:background-color="transparent"/>
      <style:text-properties officeooo:paragraph-rsid="00bd05ee"/>
    </style:style>
    <style:style style:name="P139" style:family="paragraph" style:parent-style-name="Text_20_body">
      <loext:graphic-properties draw:fill="none"/>
      <style:paragraph-properties fo:margin-top="0in" fo:margin-bottom="0.0972in" loext:contextual-spacing="false" fo:line-height="120%" fo:text-align="start" style:justify-single-word="false" fo:background-color="transparent"/>
      <style:text-properties officeooo:paragraph-rsid="00bea67a"/>
    </style:style>
    <style:style style:name="P140"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officeooo:rsid="00cb40c8" officeooo:paragraph-rsid="00cc9caf"/>
    </style:style>
    <style:style style:name="P141"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officeooo:rsid="00eaaeba" officeooo:paragraph-rsid="00eaaeba"/>
    </style:style>
    <style:style style:name="P142"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officeooo:rsid="00cb40c8" officeooo:paragraph-rsid="00cc9caf"/>
    </style:style>
    <style:style style:name="P143" style:family="paragraph" style:parent-style-name="Contents_20_2">
      <style:paragraph-properties>
        <style:tab-stops>
          <style:tab-stop style:position="6.7283in" style:type="right" style:leader-style="dotted" style:leader-text="."/>
        </style:tab-stops>
      </style:paragraph-properties>
    </style:style>
    <style:style style:name="P144" style:family="paragraph" style:parent-style-name="Contents_20_3">
      <style:paragraph-properties>
        <style:tab-stops>
          <style:tab-stop style:position="6.5319in" style:type="right" style:leader-style="dotted" style:leader-text="."/>
        </style:tab-stops>
      </style:paragraph-properties>
    </style:style>
    <style:style style:name="P145" style:family="paragraph" style:parent-style-name="Contents_20_4">
      <style:paragraph-properties>
        <style:tab-stops>
          <style:tab-stop style:position="6.3354in" style:type="right" style:leader-style="dotted" style:leader-text="."/>
        </style:tab-stops>
      </style:paragraph-properties>
    </style:style>
    <style:style style:name="P146" style:family="paragraph" style:parent-style-name="Text_20_body" style:master-page-name="">
      <loext:graphic-properties draw:fill="none"/>
      <style:paragraph-properties fo:margin-left="1in" fo:margin-right="0in" fo:margin-top="0in" fo:margin-bottom="0.0972in" loext:contextual-spacing="false" fo:line-height="120%" fo:text-indent="0in" style:auto-text-indent="false" style:page-number="auto" fo:background-color="transparent"/>
      <style:text-properties officeooo:rsid="00eaaeba" officeooo:paragraph-rsid="00eaaeba"/>
    </style:style>
    <style:style style:name="P147" style:family="paragraph" style:parent-style-name="Title" style:master-page-name="First_20_Page">
      <style:paragraph-properties fo:text-align="start" style:justify-single-word="false" style:page-number="auto"/>
    </style:style>
    <style:style style:name="P148" style:family="paragraph" style:parent-style-name="Heading_20_2">
      <style:text-properties officeooo:paragraph-rsid="00099e08"/>
    </style:style>
    <style:style style:name="P149" style:family="paragraph" style:parent-style-name="Heading_20_2">
      <style:text-properties officeooo:rsid="003ae6ef" officeooo:paragraph-rsid="003ae6ef"/>
    </style:style>
    <style:style style:name="P150" style:family="paragraph" style:parent-style-name="Heading_20_2">
      <style:text-properties officeooo:rsid="003bbddc" officeooo:paragraph-rsid="003bbddc"/>
    </style:style>
    <style:style style:name="P151" style:family="paragraph" style:parent-style-name="Heading_20_2">
      <style:text-properties officeooo:rsid="00081ff8" officeooo:paragraph-rsid="00099e08"/>
    </style:style>
    <style:style style:name="P152" style:family="paragraph" style:parent-style-name="Heading_20_2">
      <style:text-properties officeooo:rsid="00081ff8" officeooo:paragraph-rsid="00407f7b"/>
    </style:style>
    <style:style style:name="P153" style:family="paragraph" style:parent-style-name="Heading_20_2" style:list-style-name="">
      <style:text-properties officeooo:paragraph-rsid="00d8650e"/>
    </style:style>
    <style:style style:name="P154" style:family="paragraph" style:parent-style-name="Heading_20_2" style:list-style-name="">
      <style:text-properties officeooo:rsid="004142be" officeooo:paragraph-rsid="0045cf64"/>
    </style:style>
    <style:style style:name="P155" style:family="paragraph" style:parent-style-name="Heading_20_2" style:list-style-name="">
      <style:text-properties officeooo:rsid="000a7aef" officeooo:paragraph-rsid="000a7aef"/>
    </style:style>
    <style:style style:name="P156" style:family="paragraph" style:parent-style-name="Heading_20_2">
      <style:text-properties officeooo:rsid="00f5ac7f" officeooo:paragraph-rsid="00f5ac7f"/>
    </style:style>
    <style:style style:name="P157" style:family="paragraph" style:parent-style-name="Heading_20_2">
      <style:text-properties officeooo:rsid="011733c7" officeooo:paragraph-rsid="011733c7"/>
    </style:style>
    <style:style style:name="P158" style:family="paragraph" style:parent-style-name="Heading_20_2">
      <style:text-properties officeooo:paragraph-rsid="00d8650e"/>
    </style:style>
    <style:style style:name="P159" style:family="paragraph" style:parent-style-name="Heading_20_2" style:list-style-name="">
      <style:text-properties officeooo:rsid="00745285" officeooo:paragraph-rsid="00745285"/>
    </style:style>
    <style:style style:name="P160" style:family="paragraph" style:parent-style-name="Heading_20_2">
      <style:text-properties officeooo:rsid="00cf3228" officeooo:paragraph-rsid="00cf3228"/>
    </style:style>
    <style:style style:name="P161" style:family="paragraph" style:parent-style-name="Heading_20_2">
      <style:text-properties officeooo:rsid="011cc60f" officeooo:paragraph-rsid="011cc60f"/>
    </style:style>
    <style:style style:name="P162" style:family="paragraph" style:parent-style-name="Heading_20_2">
      <style:paragraph-properties fo:break-before="page"/>
      <style:text-properties officeooo:rsid="0034ee78" officeooo:paragraph-rsid="0034ee78"/>
    </style:style>
    <style:style style:name="P163" style:family="paragraph" style:parent-style-name="Heading_20_2">
      <style:paragraph-properties fo:break-before="page"/>
      <style:text-properties officeooo:rsid="004142be" officeooo:paragraph-rsid="0045cf64"/>
    </style:style>
    <style:style style:name="P164" style:family="paragraph" style:parent-style-name="Heading_20_2">
      <style:paragraph-properties fo:break-before="page"/>
      <style:text-properties officeooo:rsid="000a7aef" officeooo:paragraph-rsid="000a7aef"/>
    </style:style>
    <style:style style:name="P165" style:family="paragraph" style:parent-style-name="Heading_20_2">
      <style:paragraph-properties fo:break-before="page"/>
      <style:text-properties officeooo:paragraph-rsid="00d8650e"/>
    </style:style>
    <style:style style:name="P166" style:family="paragraph" style:parent-style-name="Heading_20_2">
      <style:paragraph-properties fo:break-before="page"/>
      <style:text-properties officeooo:rsid="00c18e70" officeooo:paragraph-rsid="00c18e70"/>
    </style:style>
    <style:style style:name="P167" style:family="paragraph" style:parent-style-name="Heading_20_2">
      <style:paragraph-properties fo:break-before="page"/>
      <style:text-properties officeooo:rsid="00745285" officeooo:paragraph-rsid="00745285"/>
    </style:style>
    <style:style style:name="P168" style:family="paragraph" style:parent-style-name="Heading_20_2">
      <style:paragraph-properties fo:break-before="page"/>
      <style:text-properties officeooo:rsid="00a9c690" officeooo:paragraph-rsid="00a9c690"/>
    </style:style>
    <style:style style:name="P169" style:family="paragraph" style:parent-style-name="Heading_20_2">
      <style:paragraph-properties fo:break-before="page"/>
      <style:text-properties officeooo:rsid="010352e6" officeooo:paragraph-rsid="01034031"/>
    </style:style>
    <style:style style:name="P170" style:family="paragraph" style:parent-style-name="Heading_20_3">
      <style:text-properties officeooo:rsid="001227db" officeooo:paragraph-rsid="001227db"/>
    </style:style>
    <style:style style:name="P171" style:family="paragraph" style:parent-style-name="Heading_20_3" style:list-style-name=""/>
    <style:style style:name="P172" style:family="paragraph" style:parent-style-name="Heading_20_3" style:list-style-name="">
      <style:text-properties officeooo:rsid="006c6a19" officeooo:paragraph-rsid="006c6a19"/>
    </style:style>
    <style:style style:name="P173" style:family="paragraph" style:parent-style-name="Heading_20_3">
      <style:text-properties officeooo:rsid="00799fed"/>
    </style:style>
    <style:style style:name="P174" style:family="paragraph" style:parent-style-name="Heading_20_3">
      <style:text-properties officeooo:rsid="00799fed" officeooo:paragraph-rsid="00799fed"/>
    </style:style>
    <style:style style:name="P175" style:family="paragraph" style:parent-style-name="Heading_20_3">
      <style:text-properties officeooo:paragraph-rsid="00756402"/>
    </style:style>
    <style:style style:name="P176" style:family="paragraph" style:parent-style-name="Heading_20_3">
      <style:text-properties officeooo:rsid="0083723e" officeooo:paragraph-rsid="0083723e"/>
    </style:style>
    <style:style style:name="P177" style:family="paragraph" style:parent-style-name="Heading_20_3">
      <style:text-properties officeooo:rsid="0083723e" officeooo:paragraph-rsid="00c9ff6a"/>
    </style:style>
    <style:style style:name="P178" style:family="paragraph" style:parent-style-name="Heading_20_3">
      <style:text-properties officeooo:rsid="00855711" officeooo:paragraph-rsid="00855711"/>
    </style:style>
    <style:style style:name="P179" style:family="paragraph" style:parent-style-name="Heading_20_3">
      <style:text-properties officeooo:rsid="008981ec" officeooo:paragraph-rsid="008981ec"/>
    </style:style>
    <style:style style:name="P180" style:family="paragraph" style:parent-style-name="Heading_20_3">
      <style:text-properties officeooo:rsid="008d1afc" officeooo:paragraph-rsid="008d1afc"/>
    </style:style>
    <style:style style:name="P181" style:family="paragraph" style:parent-style-name="Heading_20_3">
      <style:text-properties officeooo:rsid="0106c5d7" officeooo:paragraph-rsid="0107ca75"/>
    </style:style>
    <style:style style:name="P182" style:family="paragraph" style:parent-style-name="Heading_20_3">
      <style:text-properties officeooo:rsid="00a9c690" officeooo:paragraph-rsid="00a9c690"/>
    </style:style>
    <style:style style:name="P183" style:family="paragraph" style:parent-style-name="Heading_20_3">
      <style:text-properties officeooo:rsid="00ab6fa9" officeooo:paragraph-rsid="00ab6fa9"/>
    </style:style>
    <style:style style:name="P184" style:family="paragraph" style:parent-style-name="Heading_20_3">
      <style:text-properties officeooo:rsid="00cf3228"/>
    </style:style>
    <style:style style:name="P185" style:family="paragraph" style:parent-style-name="Heading_20_3">
      <style:text-properties officeooo:rsid="00d62498"/>
    </style:style>
    <style:style style:name="P186" style:family="paragraph" style:parent-style-name="Heading_20_3">
      <style:text-properties officeooo:rsid="00d45834"/>
    </style:style>
    <style:style style:name="P187" style:family="paragraph" style:parent-style-name="Heading_20_3">
      <style:text-properties officeooo:paragraph-rsid="01034031"/>
    </style:style>
    <style:style style:name="P188" style:family="paragraph" style:parent-style-name="Heading_20_3">
      <style:text-properties officeooo:rsid="010d975b" officeooo:paragraph-rsid="01034031"/>
    </style:style>
    <style:style style:name="P189" style:family="paragraph" style:parent-style-name="Heading_20_3">
      <style:text-properties officeooo:rsid="01053274" officeooo:paragraph-rsid="01034031"/>
    </style:style>
    <style:style style:name="P190" style:family="paragraph" style:parent-style-name="Heading_20_3">
      <style:text-properties officeooo:rsid="010861ce" officeooo:paragraph-rsid="01034031"/>
    </style:style>
    <style:style style:name="P191" style:family="paragraph" style:parent-style-name="Heading_20_3">
      <style:text-properties officeooo:rsid="010a22ce" officeooo:paragraph-rsid="01034031"/>
    </style:style>
    <style:style style:name="P192" style:family="paragraph" style:parent-style-name="Heading_20_3">
      <style:text-properties officeooo:rsid="011de5ca" officeooo:paragraph-rsid="011de5ca"/>
    </style:style>
    <style:style style:name="P193" style:family="paragraph" style:parent-style-name="Heading_20_3">
      <style:text-properties officeooo:rsid="011e3c87" officeooo:paragraph-rsid="011e3c87"/>
    </style:style>
    <style:style style:name="P194" style:family="paragraph" style:parent-style-name="Heading_20_3">
      <style:paragraph-properties fo:break-before="page"/>
    </style:style>
    <style:style style:name="P195" style:family="paragraph" style:parent-style-name="Heading_20_3">
      <style:paragraph-properties fo:break-before="page"/>
      <style:text-properties officeooo:rsid="0055c0fb"/>
    </style:style>
    <style:style style:name="P196" style:family="paragraph" style:parent-style-name="Heading_20_4">
      <style:text-properties officeooo:rsid="00271556" officeooo:paragraph-rsid="00271556"/>
    </style:style>
    <style:style style:name="P197" style:family="paragraph" style:parent-style-name="Heading_20_4">
      <style:text-properties officeooo:rsid="00303cac" officeooo:paragraph-rsid="00303cac"/>
    </style:style>
    <style:style style:name="P198" style:family="paragraph" style:parent-style-name="Heading_20_4">
      <style:text-properties officeooo:rsid="0029204a" officeooo:paragraph-rsid="00331c06"/>
    </style:style>
    <style:style style:name="P199" style:family="paragraph" style:parent-style-name="Text_20_body" style:list-style-name="L1">
      <style:text-properties officeooo:paragraph-rsid="00e87709"/>
    </style:style>
    <style:style style:name="P200" style:family="paragraph" style:parent-style-name="Text_20_body" style:list-style-name="L1">
      <style:text-properties officeooo:rsid="00e87709" officeooo:paragraph-rsid="00e87709"/>
    </style:style>
    <style:style style:name="P201" style:family="paragraph" style:parent-style-name="Text_20_body" style:list-style-name="L1">
      <style:text-properties officeooo:rsid="0034ee78" officeooo:paragraph-rsid="00e87709"/>
    </style:style>
    <style:style style:name="P202" style:family="paragraph" style:parent-style-name="Text_20_body" style:list-style-name="L2">
      <style:text-properties officeooo:rsid="0017a831" officeooo:paragraph-rsid="001941a9"/>
    </style:style>
    <style:style style:name="P203" style:family="paragraph" style:parent-style-name="Text_20_body" style:list-style-name="L2">
      <style:text-properties officeooo:rsid="001941a9" officeooo:paragraph-rsid="001941a9"/>
    </style:style>
    <style:style style:name="P204" style:family="paragraph" style:parent-style-name="Text_20_body" style:list-style-name="L3">
      <style:text-properties officeooo:paragraph-rsid="00b133a5"/>
    </style:style>
    <style:style style:name="P205" style:family="paragraph" style:parent-style-name="Text_20_body" style:list-style-name="L3">
      <style:text-properties officeooo:rsid="00b133a5" officeooo:paragraph-rsid="00b133a5"/>
    </style:style>
    <style:style style:name="P206" style:family="paragraph" style:parent-style-name="Text_20_body" style:list-style-name="L4">
      <style:text-properties style:text-line-through-style="none" style:text-line-through-type="none" officeooo:rsid="00b67533" officeooo:paragraph-rsid="00b999cc"/>
    </style:style>
    <style:style style:name="P207" style:family="paragraph" style:parent-style-name="Text_20_body" style:list-style-name="L5">
      <style:text-properties style:text-line-through-style="none" style:text-line-through-type="none" officeooo:rsid="00b7b2be" officeooo:paragraph-rsid="00b999cc"/>
    </style:style>
    <style:style style:name="P208" style:family="paragraph" style:parent-style-name="Text_20_body" style:list-style-name="L5">
      <style:text-properties officeooo:paragraph-rsid="00b999cc"/>
    </style:style>
    <style:style style:name="P209" style:family="paragraph" style:parent-style-name="Text_20_body" style:list-style-name="L6">
      <style:text-properties officeooo:paragraph-rsid="00bb075f"/>
    </style:style>
    <style:style style:name="P210" style:family="paragraph" style:parent-style-name="Text_20_body" style:list-style-name="L6">
      <style:text-properties officeooo:rsid="00bb075f" officeooo:paragraph-rsid="00bd05ee"/>
    </style:style>
    <style:style style:name="P211" style:family="paragraph" style:parent-style-name="Text_20_body" style:list-style-name="L9">
      <style:text-properties officeooo:rsid="00e3f7f7" officeooo:paragraph-rsid="00e3f7f7"/>
    </style:style>
    <style:style style:name="P212" style:family="paragraph" style:parent-style-name="Text_20_body">
      <style:text-properties officeooo:rsid="00e3f7f7" officeooo:paragraph-rsid="01034031"/>
    </style:style>
    <style:style style:name="P213" style:family="paragraph" style:parent-style-name="Text_20_body">
      <style:text-properties officeooo:paragraph-rsid="011cc60f"/>
    </style:style>
    <style:style style:name="P214" style:family="paragraph" style:parent-style-name="Text_20_body">
      <style:text-properties officeooo:paragraph-rsid="011de5ca"/>
    </style:style>
    <style:style style:name="P215" style:family="paragraph" style:parent-style-name="Text_20_body">
      <style:text-properties officeooo:paragraph-rsid="011e3c87"/>
    </style:style>
    <style:style style:name="P216" style:family="paragraph" style:parent-style-name="Text_20_body" style:list-style-name="L7">
      <loext:graphic-properties draw:fill="none"/>
      <style:paragraph-properties fo:margin-top="0in" fo:margin-bottom="0.0972in" loext:contextual-spacing="false" fo:line-height="120%" fo:text-align="start" style:justify-single-word="false" fo:background-color="transparent"/>
      <style:text-properties officeooo:paragraph-rsid="00bd05ee"/>
    </style:style>
    <style:style style:name="P217" style:family="paragraph" style:parent-style-name="Text_20_body" style:list-style-name="L8">
      <loext:graphic-properties draw:fill="none"/>
      <style:paragraph-properties fo:margin-top="0in" fo:margin-bottom="0.0972in" loext:contextual-spacing="false" fo:line-height="120%" fo:text-align="start" style:justify-single-word="false" fo:background-color="transparent"/>
      <style:text-properties officeooo:paragraph-rsid="00bea67a"/>
    </style:style>
    <style:style style:name="P218" style:family="paragraph" style:parent-style-name="Text_20_body" style:list-style-name="L7">
      <loext:graphic-properties draw:fill="none"/>
      <style:paragraph-properties fo:margin-top="0in" fo:margin-bottom="0.0972in" loext:contextual-spacing="false" fo:line-height="120%" fo:text-align="start" style:justify-single-word="false" fo:background-color="transparent"/>
      <style:text-properties officeooo:rsid="00bc585b" officeooo:paragraph-rsid="00bd05ee"/>
    </style:style>
    <style:style style:name="P219" style:family="paragraph" style:parent-style-name="Text_20_body" style:list-style-name="L8">
      <loext:graphic-properties draw:fill="none"/>
      <style:paragraph-properties fo:margin-top="0in" fo:margin-bottom="0.0972in" loext:contextual-spacing="false" fo:line-height="120%" fo:text-align="start" style:justify-single-word="false" fo:background-color="transparent"/>
      <style:text-properties officeooo:rsid="00bea67a" officeooo:paragraph-rsid="00bea67a"/>
    </style:style>
    <style:style style:name="P220" style:family="paragraph" style:parent-style-name="Text_20_body">
      <style:paragraph-properties fo:margin-left="0.4925in" fo:margin-right="0in" fo:text-indent="0in" style:auto-text-indent="false"/>
      <style:text-properties officeooo:rsid="00756402" officeooo:paragraph-rsid="011de5ca"/>
    </style:style>
    <style:style style:name="P221" style:family="paragraph">
      <style:paragraph-properties fo:text-align="center"/>
    </style:style>
    <style:style style:name="T1" style:family="text">
      <style:text-properties officeooo:rsid="000671ad"/>
    </style:style>
    <style:style style:name="T2" style:family="text">
      <style:text-properties officeooo:rsid="000d10e4"/>
    </style:style>
    <style:style style:name="T3" style:family="text">
      <style:text-properties fo:font-weight="bold" style:font-weight-asian="bold" style:font-weight-complex="bold"/>
    </style:style>
    <style:style style:name="T4" style:family="text">
      <style:text-properties fo:font-weight="bold" officeooo:rsid="006c6a19" style:font-weight-asian="bold" style:font-weight-complex="bold"/>
    </style:style>
    <style:style style:name="T5" style:family="text">
      <style:text-properties officeooo:rsid="001941a9"/>
    </style:style>
    <style:style style:name="T6" style:family="text">
      <style:text-properties officeooo:rsid="001a6799"/>
    </style:style>
    <style:style style:name="T7" style:family="text">
      <style:text-properties officeooo:rsid="0025a260"/>
    </style:style>
    <style:style style:name="T8" style:family="text">
      <style:text-properties officeooo:rsid="0025e2ba"/>
    </style:style>
    <style:style style:name="T9" style:family="text">
      <style:text-properties officeooo:rsid="0028b752"/>
    </style:style>
    <style:style style:name="T10" style:family="text">
      <style:text-properties officeooo:rsid="002a8c7a"/>
    </style:style>
    <style:style style:name="T11" style:family="text">
      <style:text-properties officeooo:rsid="002d3b83"/>
    </style:style>
    <style:style style:name="T12" style:family="text">
      <style:text-properties style:font-name="Liberation Serif" officeooo:rsid="002a8c7a"/>
    </style:style>
    <style:style style:name="T13" style:family="text">
      <style:text-properties style:font-name="Liberation Serif" officeooo:rsid="002d3b83"/>
    </style:style>
    <style:style style:name="T14" style:family="text">
      <style:text-properties style:font-name="Liberation Serif" fo:font-size="12pt" style:font-size-asian="10.5pt" style:font-size-complex="12pt"/>
    </style:style>
    <style:style style:name="T15" style:family="text">
      <style:text-properties style:font-name="Liberation Serif" fo:font-size="12pt" officeooo:rsid="008981ec" style:font-size-asian="10.5pt" style:font-size-complex="12pt"/>
    </style:style>
    <style:style style:name="T16" style:family="text">
      <style:text-properties officeooo:rsid="0038026f"/>
    </style:style>
    <style:style style:name="T17" style:family="text">
      <style:text-properties officeooo:rsid="00388f7e"/>
    </style:style>
    <style:style style:name="T18" style:family="text">
      <style:text-properties officeooo:rsid="0038ca6d"/>
    </style:style>
    <style:style style:name="T19" style:family="text">
      <style:text-properties officeooo:rsid="003c93d2"/>
    </style:style>
    <style:style style:name="T20" style:family="text">
      <style:text-properties officeooo:rsid="003df9fe"/>
    </style:style>
    <style:style style:name="T21" style:family="text">
      <style:text-properties officeooo:rsid="003e9dce"/>
    </style:style>
    <style:style style:name="T22" style:family="text">
      <style:text-properties officeooo:rsid="00427cb4"/>
    </style:style>
    <style:style style:name="T23" style:family="text">
      <style:text-properties officeooo:rsid="00434882"/>
    </style:style>
    <style:style style:name="T24" style:family="text">
      <style:text-properties officeooo:rsid="00449974"/>
    </style:style>
    <style:style style:name="T25" style:family="text">
      <style:text-properties officeooo:rsid="004af5c5"/>
    </style:style>
    <style:style style:name="T26" style:family="text">
      <style:text-properties officeooo:rsid="004c85fe"/>
    </style:style>
    <style:style style:name="T27" style:family="text">
      <style:text-properties officeooo:rsid="004d180e"/>
    </style:style>
    <style:style style:name="T28" style:family="text">
      <style:text-properties officeooo:rsid="004df5b9"/>
    </style:style>
    <style:style style:name="T29" style:family="text">
      <style:text-properties officeooo:rsid="004fd811"/>
    </style:style>
    <style:style style:name="T30" style:family="text">
      <style:text-properties officeooo:rsid="0051b1c8"/>
    </style:style>
    <style:style style:name="T31" style:family="text">
      <style:text-properties officeooo:rsid="0051db38"/>
    </style:style>
    <style:style style:name="T32" style:family="text">
      <style:text-properties officeooo:rsid="0054fcc8"/>
    </style:style>
    <style:style style:name="T33" style:family="text">
      <style:text-properties officeooo:rsid="0055c0fb"/>
    </style:style>
    <style:style style:name="T34" style:family="text">
      <style:text-properties officeooo:rsid="00569874"/>
    </style:style>
    <style:style style:name="T35" style:family="text">
      <style:text-properties officeooo:rsid="0056d0fe"/>
    </style:style>
    <style:style style:name="T36" style:family="text">
      <style:text-properties officeooo:rsid="005be705"/>
    </style:style>
    <style:style style:name="T37" style:family="text">
      <style:text-properties officeooo:rsid="005c2ab2"/>
    </style:style>
    <style:style style:name="T38" style:family="text">
      <style:text-properties officeooo:rsid="005e3184"/>
    </style:style>
    <style:style style:name="T39" style:family="text">
      <style:text-properties officeooo:rsid="00603ee3"/>
    </style:style>
    <style:style style:name="T40" style:family="text">
      <style:text-properties officeooo:rsid="0060e2c2"/>
    </style:style>
    <style:style style:name="T41" style:family="text">
      <style:text-properties officeooo:rsid="0061af26"/>
    </style:style>
    <style:style style:name="T42" style:family="text">
      <style:text-properties officeooo:rsid="00634407"/>
    </style:style>
    <style:style style:name="T43" style:family="text">
      <style:text-properties officeooo:rsid="0066bb0e"/>
    </style:style>
    <style:style style:name="T44" style:family="text">
      <style:text-properties officeooo:rsid="0069e514"/>
    </style:style>
    <style:style style:name="T45" style:family="text">
      <style:text-properties officeooo:rsid="006b45b6"/>
    </style:style>
    <style:style style:name="T46" style:family="text">
      <style:text-properties officeooo:rsid="006c6a19"/>
    </style:style>
    <style:style style:name="T47" style:family="text">
      <style:text-properties fo:font-weight="normal" officeooo:rsid="006c6a19" style:font-weight-asian="normal" style:font-weight-complex="normal"/>
    </style:style>
    <style:style style:name="T48" style:family="text">
      <style:text-properties officeooo:rsid="006f4920"/>
    </style:style>
    <style:style style:name="T49" style:family="text">
      <style:text-properties officeooo:rsid="006f6fdf"/>
    </style:style>
    <style:style style:name="T50" style:family="text">
      <style:text-properties officeooo:rsid="00700b4b"/>
    </style:style>
    <style:style style:name="T51" style:family="text">
      <style:text-properties officeooo:rsid="005b8496"/>
    </style:style>
    <style:style style:name="T52" style:family="text">
      <style:text-properties officeooo:rsid="00712972"/>
    </style:style>
    <style:style style:name="T53" style:family="text">
      <style:text-properties officeooo:rsid="0071e569"/>
    </style:style>
    <style:style style:name="T54" style:family="text">
      <style:text-properties officeooo:rsid="00756402"/>
    </style:style>
    <style:style style:name="T55" style:family="text">
      <style:text-properties officeooo:rsid="00799fed"/>
    </style:style>
    <style:style style:name="T56" style:family="text">
      <style:text-properties fo:font-size="10pt" style:font-size-asian="10pt" style:font-size-complex="10pt"/>
    </style:style>
    <style:style style:name="T57" style:family="text">
      <style:text-properties fo:font-size="10pt" officeooo:rsid="008981ec" style:font-size-asian="10pt" style:font-size-complex="10pt"/>
    </style:style>
    <style:style style:name="T58" style:family="text">
      <style:text-properties fo:font-size="10pt" officeooo:rsid="008e2f8f" style:font-size-asian="10pt" style:font-size-complex="10pt"/>
    </style:style>
    <style:style style:name="T59" style:family="text">
      <style:text-properties officeooo:rsid="008a9d89"/>
    </style:style>
    <style:style style:name="T60" style:family="text">
      <style:text-properties officeooo:rsid="008d1afc"/>
    </style:style>
    <style:style style:name="T61" style:family="text">
      <style:text-properties officeooo:rsid="008fc5df"/>
    </style:style>
    <style:style style:name="T62" style:family="text">
      <style:text-properties officeooo:rsid="008fe717"/>
    </style:style>
    <style:style style:name="T63" style:family="text">
      <style:text-properties officeooo:rsid="009260c3"/>
    </style:style>
    <style:style style:name="T64" style:family="text">
      <style:text-properties officeooo:rsid="009627e9"/>
    </style:style>
    <style:style style:name="T65" style:family="text">
      <style:text-properties officeooo:rsid="0096c97e"/>
    </style:style>
    <style:style style:name="T66" style:family="text">
      <style:text-properties officeooo:rsid="0098d4f6"/>
    </style:style>
    <style:style style:name="T67" style:family="text">
      <style:text-properties officeooo:rsid="00a9c690"/>
    </style:style>
    <style:style style:name="T68" style:family="text">
      <style:text-properties officeooo:rsid="00aa152f"/>
    </style:style>
    <style:style style:name="T69" style:family="text">
      <style:text-properties style:text-line-through-style="none" style:text-line-through-type="none" officeooo:rsid="00aa152f"/>
    </style:style>
    <style:style style:name="T70" style:family="text">
      <style:text-properties style:text-line-through-style="none" style:text-line-through-type="none" officeooo:rsid="00addb07"/>
    </style:style>
    <style:style style:name="T71" style:family="text">
      <style:text-properties style:text-line-through-style="none" style:text-line-through-type="none" officeooo:rsid="00b169fc"/>
    </style:style>
    <style:style style:name="T72" style:family="text">
      <style:text-properties style:text-line-through-style="none" style:text-line-through-type="none" officeooo:rsid="00b67533"/>
    </style:style>
    <style:style style:name="T73" style:family="text">
      <style:text-properties style:text-line-through-style="none" style:text-line-through-type="none" officeooo:rsid="00b7b2be"/>
    </style:style>
    <style:style style:name="T74" style:family="text">
      <style:text-properties style:text-line-through-style="none" style:text-line-through-type="none" officeooo:rsid="00bfa837"/>
    </style:style>
    <style:style style:name="T75" style:family="text">
      <style:text-properties style:text-line-through-style="none" style:text-line-through-type="none" fo:font-style="normal" fo:font-weight="normal" style:font-style-asian="normal" style:font-weight-asian="normal" style:font-style-complex="normal" style:font-weight-complex="normal"/>
    </style:style>
    <style:style style:name="T76" style:family="text">
      <style:text-properties style:text-line-through-style="none" style:text-line-through-type="none" fo:font-style="normal" fo:font-weight="normal" officeooo:rsid="00fa266b" style:font-style-asian="normal" style:font-weight-asian="normal" style:font-style-complex="normal" style:font-weight-complex="normal"/>
    </style:style>
    <style:style style:name="T77" style:family="text">
      <style:text-properties style:text-line-through-style="none" style:text-line-through-type="none" fo:font-style="normal" fo:font-weight="normal" officeooo:rsid="00fc65c8" style:font-style-asian="normal" style:font-weight-asian="normal" style:font-style-complex="normal" style:font-weight-complex="normal"/>
    </style:style>
    <style:style style:name="T78" style:family="text">
      <style:text-properties style:text-line-through-style="none" style:text-line-through-type="none" fo:font-style="normal" fo:font-weight="normal" officeooo:rsid="00fe0fb6" style:font-style-asian="normal" style:font-weight-asian="normal" style:font-style-complex="normal" style:font-weight-complex="normal"/>
    </style:style>
    <style:style style:name="T79" style:family="text">
      <style:text-properties style:text-line-through-style="none" style:text-line-through-type="none" fo:font-style="normal" fo:font-weight="normal" officeooo:rsid="0100b725" style:font-style-asian="normal" style:font-weight-asian="normal" style:font-style-complex="normal" style:font-weight-complex="normal"/>
    </style:style>
    <style:style style:name="T80" style:family="text">
      <style:text-properties style:text-line-through-style="none" style:text-line-through-type="none" officeooo:rsid="010d6fab"/>
    </style:style>
    <style:style style:name="T81" style:family="text">
      <style:text-properties style:text-line-through-style="none" style:text-line-through-type="none" officeooo:rsid="010f43a7"/>
    </style:style>
    <style:style style:name="T82" style:family="text">
      <style:text-properties style:text-line-through-style="none" style:text-line-through-type="none" officeooo:rsid="0110423a"/>
    </style:style>
    <style:style style:name="T83" style:family="text">
      <style:text-properties style:text-line-through-style="none" style:text-line-through-type="none" officeooo:rsid="010cbab2"/>
    </style:style>
    <style:style style:name="T84" style:family="text">
      <style:text-properties style:text-line-through-style="none" style:text-line-through-type="none" officeooo:rsid="01110947"/>
    </style:style>
    <style:style style:name="T85" style:family="text">
      <style:text-properties style:text-line-through-style="none" style:text-line-through-type="none" officeooo:rsid="01119495"/>
    </style:style>
    <style:style style:name="T86" style:family="text">
      <style:text-properties style:text-line-through-style="none" style:text-line-through-type="none" officeooo:rsid="01137398"/>
    </style:style>
    <style:style style:name="T87" style:family="text">
      <style:text-properties style:text-line-through-style="none" style:text-line-through-type="none" officeooo:rsid="011733c7"/>
    </style:style>
    <style:style style:name="T88" style:family="text">
      <style:text-properties style:text-line-through-style="none" style:text-line-through-type="none" officeooo:rsid="0117fa58"/>
    </style:style>
    <style:style style:name="T89" style:family="text">
      <style:text-properties style:text-line-through-style="none" style:text-line-through-type="none" fo:font-weight="bold" officeooo:rsid="0117fa58" style:font-weight-asian="bold" style:font-weight-complex="bold"/>
    </style:style>
    <style:style style:name="T90" style:family="text">
      <style:text-properties style:text-line-through-style="none" style:text-line-through-type="none" officeooo:rsid="011945a7"/>
    </style:style>
    <style:style style:name="T91" style:family="text">
      <style:text-properties style:text-line-through-style="none" style:text-line-through-type="none" officeooo:rsid="011bdeea"/>
    </style:style>
    <style:style style:name="T92" style:family="text">
      <style:text-properties officeooo:rsid="00ab6fa9"/>
    </style:style>
    <style:style style:name="T93" style:family="text">
      <style:text-properties officeooo:rsid="00ac68f1"/>
    </style:style>
    <style:style style:name="T94" style:family="text">
      <style:text-properties officeooo:rsid="00ad7dbb"/>
    </style:style>
    <style:style style:name="T95" style:family="text">
      <style:text-properties officeooo:rsid="00addb07"/>
    </style:style>
    <style:style style:name="T96" style:family="text">
      <style:text-properties officeooo:rsid="00adedc7"/>
    </style:style>
    <style:style style:name="T97" style:family="text">
      <style:text-properties officeooo:rsid="00b09751"/>
    </style:style>
    <style:style style:name="T98" style:family="text">
      <style:text-properties officeooo:rsid="00b0b94e"/>
    </style:style>
    <style:style style:name="T99" style:family="text">
      <style:text-properties officeooo:rsid="00b133a5"/>
    </style:style>
    <style:style style:name="T100" style:family="text">
      <style:text-properties officeooo:rsid="00b48c82"/>
    </style:style>
    <style:style style:name="T101" style:family="text">
      <style:text-properties officeooo:rsid="00b7b2be"/>
    </style:style>
    <style:style style:name="T102" style:family="text">
      <style:text-properties officeooo:rsid="00b999cc"/>
    </style:style>
    <style:style style:name="T103" style:family="text">
      <style:text-properties officeooo:rsid="00ba5997"/>
    </style:style>
    <style:style style:name="T104" style:family="text">
      <style:text-properties officeooo:rsid="00bb075f"/>
    </style:style>
    <style:style style:name="T105" style:family="text">
      <style:text-properties officeooo:rsid="00bc585b"/>
    </style:style>
    <style:style style:name="T106" style:family="text">
      <style:text-properties officeooo:rsid="00bd05ee"/>
    </style:style>
    <style:style style:name="T107" style:family="text">
      <style:text-properties officeooo:rsid="00bea67a"/>
    </style:style>
    <style:style style:name="T108" style:family="text">
      <style:text-properties officeooo:rsid="00c16e52"/>
    </style:style>
    <style:style style:name="T109" style:family="text">
      <style:text-properties officeooo:rsid="00c18e70"/>
    </style:style>
    <style:style style:name="T110" style:family="text">
      <style:text-properties officeooo:rsid="00c1f9fd"/>
    </style:style>
    <style:style style:name="T111" style:family="text">
      <style:text-properties officeooo:rsid="0034ee78"/>
    </style:style>
    <style:style style:name="T112" style:family="text">
      <style:text-properties officeooo:rsid="00c3cf85"/>
    </style:style>
    <style:style style:name="T113" style:family="text">
      <style:text-properties style:text-position="super 58%"/>
    </style:style>
    <style:style style:name="T114" style:family="text">
      <style:text-properties style:text-position="super 58%" officeooo:rsid="00d46098"/>
    </style:style>
    <style:style style:name="T115" style:family="text">
      <style:text-properties officeooo:rsid="00c561db"/>
    </style:style>
    <style:style style:name="T116" style:family="text">
      <style:text-properties officeooo:rsid="00c7a8bf"/>
    </style:style>
    <style:style style:name="T117" style:family="text">
      <style:text-properties officeooo:rsid="00c99392"/>
    </style:style>
    <style:style style:name="T118" style:family="text">
      <style:text-properties officeooo:rsid="00c9ff6a"/>
    </style:style>
    <style:style style:name="T119" style:family="text">
      <style:text-properties officeooo:rsid="00cad0f2"/>
    </style:style>
    <style:style style:name="T120" style:family="text">
      <style:text-properties officeooo:rsid="00cb40c8"/>
    </style:style>
    <style:style style:name="T121" style:family="text">
      <style:text-properties officeooo:rsid="00cc9caf"/>
    </style:style>
    <style:style style:name="T122" style:family="text">
      <style:text-properties officeooo:rsid="00cd1b29"/>
    </style:style>
    <style:style style:name="T123" style:family="text">
      <style:text-properties officeooo:rsid="00ceb68f"/>
    </style:style>
    <style:style style:name="T124" style:family="text">
      <style:text-properties officeooo:rsid="00cf3228"/>
    </style:style>
    <style:style style:name="T125" style:family="text">
      <style:text-properties officeooo:rsid="00cfaff1"/>
    </style:style>
    <style:style style:name="T126" style:family="text">
      <style:text-properties officeooo:rsid="00d295a1"/>
    </style:style>
    <style:style style:name="T127" style:family="text">
      <style:text-properties officeooo:rsid="00d45834"/>
    </style:style>
    <style:style style:name="T128" style:family="text">
      <style:text-properties officeooo:rsid="00d46098"/>
    </style:style>
    <style:style style:name="T129" style:family="text">
      <style:text-properties officeooo:rsid="00d48856"/>
    </style:style>
    <style:style style:name="T130" style:family="text">
      <style:text-properties officeooo:rsid="00d5e85d"/>
    </style:style>
    <style:style style:name="T131" style:family="text">
      <style:text-properties officeooo:rsid="00d62498"/>
    </style:style>
    <style:style style:name="T132" style:family="text">
      <style:text-properties officeooo:rsid="00d796ec"/>
    </style:style>
    <style:style style:name="T133" style:family="text">
      <style:text-properties officeooo:rsid="00d91719"/>
    </style:style>
    <style:style style:name="T134" style:family="text">
      <style:text-properties officeooo:rsid="00dad67e"/>
    </style:style>
    <style:style style:name="T135" style:family="text">
      <style:text-properties officeooo:rsid="00dbdf43"/>
    </style:style>
    <style:style style:name="T136" style:family="text">
      <style:text-properties officeooo:rsid="00dccd84"/>
    </style:style>
    <style:style style:name="T137" style:family="text">
      <style:text-properties officeooo:rsid="00de3e64"/>
    </style:style>
    <style:style style:name="T138" style:family="text">
      <style:text-properties officeooo:rsid="00de964f"/>
    </style:style>
    <style:style style:name="T139" style:family="text">
      <style:text-properties officeooo:rsid="00e3f7f7"/>
    </style:style>
    <style:style style:name="T140" style:family="text">
      <style:text-properties officeooo:rsid="00e5b0a3"/>
    </style:style>
    <style:style style:name="T141" style:family="text">
      <style:text-properties officeooo:rsid="00e773b3"/>
    </style:style>
    <style:style style:name="T142" style:family="text">
      <style:text-properties officeooo:rsid="00e87709"/>
    </style:style>
    <style:style style:name="T143" style:family="text">
      <style:text-properties officeooo:rsid="00e9ed1d"/>
    </style:style>
    <style:style style:name="T144" style:family="text">
      <style:text-properties officeooo:rsid="00eaaeba"/>
    </style:style>
    <style:style style:name="T145" style:family="text">
      <style:text-properties officeooo:rsid="00eb3af6"/>
    </style:style>
    <style:style style:name="T146" style:family="text">
      <style:text-properties officeooo:rsid="00ed6788"/>
    </style:style>
    <style:style style:name="T147" style:family="text">
      <style:text-properties officeooo:rsid="00f0f259"/>
    </style:style>
    <style:style style:name="T148" style:family="text">
      <style:text-properties officeooo:rsid="00f5ac7f"/>
    </style:style>
    <style:style style:name="T149" style:family="text">
      <style:text-properties officeooo:rsid="00f792ad"/>
    </style:style>
    <style:style style:name="T150" style:family="text">
      <style:text-properties fo:font-style="normal" fo:font-weight="normal" style:font-style-asian="normal" style:font-weight-asian="normal" style:font-style-complex="normal" style:font-weight-complex="normal"/>
    </style:style>
    <style:style style:name="T151" style:family="text">
      <style:text-properties fo:font-style="normal" fo:font-weight="normal" officeooo:rsid="00f792ad" style:font-style-asian="normal" style:font-weight-asian="normal" style:font-style-complex="normal" style:font-weight-complex="normal"/>
    </style:style>
    <style:style style:name="T152" style:family="text">
      <style:text-properties fo:font-style="normal" fo:font-weight="normal" officeooo:rsid="00fc65c8" style:font-style-asian="normal" style:font-weight-asian="normal" style:font-style-complex="normal" style:font-weight-complex="normal"/>
    </style:style>
    <style:style style:name="T153" style:family="text">
      <style:text-properties fo:font-style="normal" fo:font-weight="normal" officeooo:rsid="00fe0fb6" style:font-style-asian="normal" style:font-weight-asian="normal" style:font-style-complex="normal" style:font-weight-complex="normal"/>
    </style:style>
    <style:style style:name="T154" style:family="text">
      <style:text-properties officeooo:rsid="00f961cb"/>
    </style:style>
    <style:style style:name="T155" style:family="text">
      <style:text-properties officeooo:rsid="00fc65c8"/>
    </style:style>
    <style:style style:name="T156" style:family="text">
      <style:text-properties officeooo:rsid="0102b46b"/>
    </style:style>
    <style:style style:name="T157" style:family="text">
      <style:text-properties officeooo:rsid="004142be"/>
    </style:style>
    <style:style style:name="T158" style:family="text">
      <style:text-properties officeooo:rsid="010a22ce"/>
    </style:style>
    <style:style style:name="T159" style:family="text">
      <style:text-properties officeooo:rsid="010861ce"/>
    </style:style>
    <style:style style:name="T160" style:family="text">
      <style:text-properties officeooo:rsid="01053274"/>
    </style:style>
    <style:style style:name="T161" style:family="text">
      <style:text-properties officeooo:rsid="01100fcf"/>
    </style:style>
    <style:style style:name="T162" style:family="text">
      <style:text-properties officeooo:rsid="010d975b"/>
    </style:style>
    <style:style style:name="T163" style:family="text">
      <style:text-properties officeooo:rsid="010eb6af"/>
    </style:style>
    <style:style style:name="T164" style:family="text">
      <style:text-properties officeooo:rsid="01067ded"/>
    </style:style>
    <style:style style:name="T165" style:family="text">
      <style:text-properties officeooo:rsid="0108aa5e"/>
    </style:style>
    <style:style style:name="T166" style:family="text">
      <style:text-properties fo:font-style="italic" officeooo:rsid="0108aa5e" style:font-style-asian="italic" style:font-style-complex="italic"/>
    </style:style>
    <style:style style:name="T167" style:family="text">
      <style:text-properties fo:font-style="italic" officeooo:rsid="01100fcf" style:font-style-asian="italic" style:font-style-complex="italic"/>
    </style:style>
    <style:style style:name="T168" style:family="text">
      <style:text-properties officeooo:rsid="01112685"/>
    </style:style>
    <style:style style:name="T169" style:family="text">
      <style:text-properties officeooo:rsid="0103797d"/>
    </style:style>
    <style:style style:name="T170" style:family="text">
      <style:text-properties officeooo:rsid="0107ca75"/>
    </style:style>
    <style:style style:name="T171" style:family="text">
      <style:text-properties officeooo:rsid="0109512a"/>
    </style:style>
    <style:style style:name="T172" style:family="text">
      <style:text-properties officeooo:rsid="010b75f2"/>
    </style:style>
    <style:style style:name="T173" style:family="text">
      <style:text-properties officeooo:rsid="010cbab2"/>
    </style:style>
    <style:style style:name="T174" style:family="text">
      <style:text-properties officeooo:rsid="010f43a7"/>
    </style:style>
    <style:style style:name="T175" style:family="text">
      <style:text-properties officeooo:rsid="01162d28"/>
    </style:style>
    <style:style style:name="T176" style:family="text">
      <style:text-properties officeooo:rsid="011733c7"/>
    </style:style>
    <style:style style:name="T177" style:family="text">
      <style:text-properties style:text-line-through-style="solid" style:text-line-through-type="single" officeooo:rsid="011733c7"/>
    </style:style>
    <style:style style:name="T178" style:family="text">
      <style:text-properties officeooo:rsid="011cc60f"/>
    </style:style>
    <style:style style:name="T179" style:family="text">
      <style:text-properties officeooo:rsid="011de5ca"/>
    </style:style>
    <style:style style:name="T180" style:family="text">
      <style:text-properties officeooo:rsid="011e3c87"/>
    </style:style>
    <style:style style:name="T181" style:family="text">
      <style:text-properties officeooo:rsid="011e8b98"/>
    </style:style>
    <style:style style:name="T182" style:family="text">
      <style:text-properties officeooo:rsid="011e9054"/>
    </style:style>
    <style:style style:name="T183" style:family="text">
      <style:text-properties officeooo:rsid="011fa69e"/>
    </style:style>
    <style:style style:name="T184" style:family="text">
      <style:text-properties officeooo:rsid="01208a5a"/>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7">Koviz User's Guide</text:p>
      <text:p text:style-name="P3"><draw:line text:anchor-type="paragraph" draw:z-index="0" draw:name="Shape1" draw:style-name="gr1" draw:text-style-name="P221" svg:x1="0.0457in" svg:y1="0.2016in" svg:x2="6.3567in" svg:y2="0.2016in"><text:p/></draw:line></text:p>
      <text:p text:style-name="P114"><draw:line text:anchor-type="paragraph" draw:z-index="1" draw:name="Shape2" draw:style-name="gr1" draw:text-style-name="P221" svg:x1="6.3571in" svg:y1="-0.1256in" svg:x2="6.4264in" svg:y2="8.1579in"><text:p/></draw:line>Version <text:span text:style-name="T175">0</text:span>.0.<text:span text:style-name="T175">1</text:span></text:p>
      <text:p text:style-name="P114"><text:span text:style-name="T178">May </text:span>20<text:span text:style-name="T52">2</text:span><text:span text:style-name="T178">6</text:spa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draw:frame draw:style-name="fr3" draw:name="Image1" text:anchor-type="paragraph" svg:x="4.5791in" svg:y="0.0673in" svg:width="1.622in" svg:height="1.2835in" draw:z-index="2"><draw:image xlink:href="Pictures/10000000000000F7000000CCA609643AFA91B070.png" xlink:type="simple" xlink:show="embed" xlink:actuate="onLoad" loext:mime-type="image/png"/></draw:frame></text:p>
      <text:p text:style-name="P14">National Aeronautics and Space Administration <text:line-break/>Johnson Space Center<text:line-break/>Houston, Texas</text:p>
      <text:p text:style-name="P5"/>
      <text:h text:style-name="P148" text:outline-level="2"><text:bookmark-start text:name="__RefHeading__232_403196617"/><text:soft-page-break/><text:s/><text:bookmark-end text:name="__RefHeading__232_403196617"/></text:h>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143"><text:a xlink:type="simple" xlink:href="#__RefHeading__232_403196617" text:style-name="Index_20_Link" text:visited-style-name="Index_20_Link"><text:tab/>2</text:a></text:p>
          <text:p text:style-name="P143"><text:a xlink:type="simple" xlink:href="#__RefHeading__252_403196617" text:style-name="Index_20_Link" text:visited-style-name="Index_20_Link">Introduction<text:tab/>4</text:a></text:p>
          <text:p text:style-name="P143"><text:a xlink:type="simple" xlink:href="#__RefHeading__645_403196617" text:style-name="Index_20_Link" text:visited-style-name="Index_20_Link">RUN Directories<text:tab/>4</text:a></text:p>
          <text:p text:style-name="P143"><text:a xlink:type="simple" xlink:href="#__RefHeading___Toc1918_3517546431" text:style-name="Index_20_Link" text:visited-style-name="Index_20_Link">RUN Files<text:tab/>4</text:a></text:p>
          <text:p text:style-name="P143"><text:a xlink:type="simple" xlink:href="#__RefHeading__655_403196617" text:style-name="Index_20_Link" text:visited-style-name="Index_20_Link">MONTE Directories<text:tab/>4</text:a></text:p>
          <text:p text:style-name="P143"><text:a xlink:type="simple" xlink:href="#__RefHeading__234_403196617" text:style-name="Index_20_Link" text:visited-style-name="Index_20_Link">DP Files<text:tab/>5</text:a></text:p>
          <text:p text:style-name="P145"><text:a xlink:type="simple" xlink:href="#__RefHeading__475_403196617" text:style-name="Index_20_Link" text:visited-style-name="Index_20_Link">DP File Syntax<text:tab/>5</text:a></text:p>
          <text:p text:style-name="P145"><text:a xlink:type="simple" xlink:href="#__RefHeading__560_403196617" text:style-name="Index_20_Link" text:visited-style-name="Index_20_Link">DP Line and Symbol Styles<text:tab/>7</text:a></text:p>
          <text:p text:style-name="P145"><text:a xlink:type="simple" xlink:href="#__RefHeading__595_403196617" text:style-name="Index_20_Link" text:visited-style-name="Index_20_Link">DP File Example<text:tab/>7</text:a></text:p>
          <text:p text:style-name="P143"><text:a xlink:type="simple" xlink:href="#__RefHeading__759_403196617" text:style-name="Index_20_Link" text:visited-style-name="Index_20_Link">Session Files<text:tab/>8</text:a></text:p>
          <text:p text:style-name="P143"><text:a xlink:type="simple" xlink:href="#__RefHeading__254_403196617" text:style-name="Index_20_Link" text:visited-style-name="Index_20_Link">External Programs<text:tab/>10</text:a></text:p>
          <text:p text:style-name="P144"><text:a xlink:type="simple" xlink:href="#__RefHeading__264_403196617" text:style-name="Index_20_Link" text:visited-style-name="Index_20_Link">External Program DP File Specification<text:tab/>10</text:a></text:p>
          <text:p text:style-name="P144"><text:a xlink:type="simple" xlink:href="#__RefHeading__381_403196617" text:style-name="Index_20_Link" text:visited-style-name="Index_20_Link">External Program DP File Example<text:tab/>10</text:a></text:p>
          <text:p text:style-name="P144"><text:a xlink:type="simple" xlink:href="#__RefHeading__383_403196617" text:style-name="Index_20_Link" text:visited-style-name="Index_20_Link">External Program Source Code Example<text:tab/>11</text:a></text:p>
          <text:p text:style-name="P144"><text:a xlink:type="simple" xlink:href="#__RefHeading___Toc907_1341101074" text:style-name="Index_20_Link" text:visited-style-name="Index_20_Link">Building Example External Program On Linux<text:tab/>11</text:a></text:p>
          <text:p text:style-name="P144"><text:a xlink:type="simple" xlink:href="#__RefHeading__385_403196617" text:style-name="Index_20_Link" text:visited-style-name="Index_20_Link">External Program Building<text:tab/>12</text:a></text:p>
          <text:p text:style-name="P145"><text:a xlink:type="simple" xlink:href="#__RefHeading__387_403196617" text:style-name="Index_20_Link" text:visited-style-name="Index_20_Link">Linux<text:tab/>12</text:a></text:p>
          <text:p text:style-name="P145"><text:a xlink:type="simple" xlink:href="#__RefHeading__389_403196617" text:style-name="Index_20_Link" text:visited-style-name="Index_20_Link">MacOS X<text:tab/>12</text:a></text:p>
          <text:p text:style-name="P144"><text:a xlink:type="simple" xlink:href="#__RefHeading__391_403196617" text:style-name="Index_20_Link" text:visited-style-name="Index_20_Link">External Program Summary<text:tab/>12</text:a></text:p>
          <text:p text:style-name="P144"><text:a xlink:type="simple" xlink:href="#__RefHeading__393_403196617" text:style-name="Index_20_Link" text:visited-style-name="Index_20_Link">External Program Problems And Caveats<text:tab/>12</text:a></text:p>
          <text:p text:style-name="P143"><text:a xlink:type="simple" xlink:href="#__RefHeading___Toc1920_3517546431" text:style-name="Index_20_Link" text:visited-style-name="Index_20_Link">Scripts<text:tab/>13</text:a></text:p>
          <text:p text:style-name="P143"><text:a xlink:type="simple" xlink:href="#__RefHeading__761_403196617" text:style-name="Index_20_Link" text:visited-style-name="Index_20_Link">Plot Interaction<text:tab/>14</text:a></text:p>
          <text:p text:style-name="P143"><text:a xlink:type="simple" xlink:href="#__RefHeading__853_403196617" text:style-name="Index_20_Link" text:visited-style-name="Index_20_Link">Maps<text:tab/>16</text:a></text:p>
          <text:p text:style-name="P143"><text:a xlink:type="simple" xlink:href="#__RefHeading___Toc1404_4203752023" text:style-name="Index_20_Link" text:visited-style-name="Index_20_Link">Groups<text:tab/>17</text:a></text:p>
          <text:p text:style-name="P143"><text:a xlink:type="simple" xlink:href="#__RefHeading___Toc811_3249638883" text:style-name="Index_20_Link" text:visited-style-name="Index_20_Link">Video<text:tab/>18</text:a></text:p>
          <text:p text:style-name="P144"><text:a xlink:type="simple" xlink:href="#__RefHeading___Toc948_3009348355" text:style-name="Index_20_Link" text:visited-style-name="Index_20_Link">Introduction<text:tab/>18</text:a></text:p>
          <text:p text:style-name="P144"><text:a xlink:type="simple" xlink:href="#__RefHeading___Toc950_3009348355" text:style-name="Index_20_Link" text:visited-style-name="Index_20_Link">Building Koviz with MPV Support<text:tab/>18</text:a></text:p>
          <text:p text:style-name="P144"><text:a xlink:type="simple" xlink:href="#__RefHeading___Toc952_3009348355" text:style-name="Index_20_Link" text:visited-style-name="Index_20_Link">Data Synchronization<text:tab/>18</text:a></text:p>
          <text:p text:style-name="P144"><text:a xlink:type="simple" xlink:href="#__RefHeading___Toc954_3009348355" text:style-name="Index_20_Link" text:visited-style-name="Index_20_Link">Commandline -video and -videoOffset options<text:tab/>18</text:a></text:p>
          <text:p text:style-name="P144"><text:a xlink:type="simple" xlink:href="#__RefHeading___Toc1683_1107607212" text:style-name="Index_20_Link" text:visited-style-name="Index_20_Link">Commandline -videoList option<text:tab/>19</text:a></text:p>
          <text:p text:style-name="P144"><text:a xlink:type="simple" xlink:href="#__RefHeading___Toc1076_3009348355" text:style-name="Index_20_Link" text:visited-style-name="Index_20_Link">Session Files<text:tab/>19</text:a></text:p>
          <text:p text:style-name="P144"><text:a xlink:type="simple" xlink:href="#__RefHeading___Toc1078_3009348355" text:style-name="Index_20_Link" text:visited-style-name="Index_20_Link">Video Directory Within RUN<text:tab/>19</text:a></text:p>
          <text:p text:style-name="P144"><text:a xlink:type="simple" xlink:href="#__RefHeading___Toc1080_3009348355" text:style-name="Index_20_Link" text:visited-style-name="Index_20_Link">Multiple RUNs And Multiple Videos<text:tab/>20</text:a></text:p>
          <text:p text:style-name="P143"><text:a xlink:type="simple" xlink:href="#__RefHeading___Toc1340_1544136475" text:style-name="Index_20_Link" text:visited-style-name="Index_20_Link">Blender<text:tab/>21</text:a></text:p>
          <text:p text:style-name="P144"><text:a xlink:type="simple" xlink:href="#__RefHeading___Toc1342_1544136475" text:style-name="Index_20_Link" text:visited-style-name="Index_20_Link">Introduction<text:tab/>21</text:a></text:p>
          <text:p text:style-name="P144"><text:a xlink:type="simple" xlink:href="#__RefHeading___Toc1344_1544136475" text:style-name="Index_20_Link" text:visited-style-name="Index_20_Link">Blender Addon Setup<text:tab/>21</text:a></text:p>
          <text:p text:style-name="P144"><text:a xlink:type="simple" xlink:href="#__RefHeading___Toc1346_1544136475" text:style-name="Index_20_Link" text:visited-style-name="Index_20_Link">Animate Blender Default Cube<text:tab/>21</text:a></text:p>
          <text:p text:style-name="P144"><text:a xlink:type="simple" xlink:href="#__RefHeading___Toc1348_1544136475" text:style-name="Index_20_Link" text:visited-style-name="Index_20_Link">Sync Koviz To Default Cube Animation<text:tab/>22</text:a></text:p>
          <text:p text:style-name="P144"><text:a xlink:type="simple" xlink:href="#__RefHeading___Toc1350_1544136475" text:style-name="Index_20_Link" text:visited-style-name="Index_20_Link">Sync Blender To Koviz With ES’s Vismo<text:tab/>23</text:a></text:p>
          <text:p text:style-name="P143"><text:a xlink:type="simple" xlink:href="#__RefHeading___Toc1685_1107607212" text:style-name="Index_20_Link" text:visited-style-name="Index_20_Link">Live Trick TV Plots<text:tab/>24</text:a></text:p>
          <text:p text:style-name="P144"><text:soft-page-break/><text:a xlink:type="simple" xlink:href="#__RefHeading___Toc1687_1107607212" text:style-name="Index_20_Link" text:visited-style-name="Index_20_Link">Introduction<text:tab/>24</text:a></text:p>
          <text:p text:style-name="P144"><text:a xlink:type="simple" xlink:href="#__RefHeading___Toc1689_1107607212" text:style-name="Index_20_Link" text:visited-style-name="Index_20_Link">Plotting TV Params<text:tab/>24</text:a></text:p>
          <text:p text:style-name="P144"><text:a xlink:type="simple" xlink:href="#__RefHeading___Toc1691_1107607212" text:style-name="Index_20_Link" text:visited-style-name="Index_20_Link">Changing Live Plot Domain<text:tab/>25</text:a></text:p>
          <text:p text:style-name="P144"><text:a xlink:type="simple" xlink:href="#__RefHeading___Toc1693_1107607212" text:style-name="Index_20_Link" text:visited-style-name="Index_20_Link">Live DP Files<text:tab/>25</text:a></text:p>
          <text:p text:style-name="P144"><text:a xlink:type="simple" xlink:href="#__RefHeading___Toc1780_3036021424" text:style-name="Index_20_Link" text:visited-style-name="Index_20_Link">Live Spring Plot Example<text:tab/>25</text:a></text:p>
          <text:p text:style-name="P143"><text:a xlink:type="simple" xlink:href="#__RefHeading___Toc4053_2364949263" text:style-name="Index_20_Link" text:visited-style-name="Index_20_Link">Profiling Trick Jobs<text:tab/>27</text:a></text:p>
          <text:p text:style-name="P144"><text:a xlink:type="simple" xlink:href="#__RefHeading___Toc2091_3967031703" text:style-name="Index_20_Link" text:visited-style-name="Index_20_Link">Add Sleeps To Ball L2 Sim<text:tab/>27</text:a></text:p>
          <text:p text:style-name="P144"><text:a xlink:type="simple" xlink:href="#__RefHeading___Toc2093_3967031703" text:style-name="Index_20_Link" text:visited-style-name="Index_20_Link">Run And View Sleep Effect<text:tab/>27</text:a></text:p>
          <text:p text:style-name="P144"><text:a xlink:type="simple" xlink:href="#__RefHeading___Toc2095_3967031703" text:style-name="Index_20_Link" text:visited-style-name="Index_20_Link">Modify and Build Profiler<text:tab/>28</text:a></text:p>
          <text:p text:style-name="P144"><text:a xlink:type="simple" xlink:href="#__RefHeading___Toc2097_3967031703" text:style-name="Index_20_Link" text:visited-style-name="Index_20_Link">Add Profiler To Sim<text:tab/>28</text:a></text:p>
          <text:p text:style-name="P144"><text:a xlink:type="simple" xlink:href="#__RefHeading___Toc2099_3967031703" text:style-name="Index_20_Link" text:visited-style-name="Index_20_Link">Run Sim And See Profile Results<text:tab/>28</text:a></text:p>
        </text:index-body>
      </text:table-of-content>
      <text:p text:style-name="P6"/>
      <text:p text:style-name="P6"/>
      <text:h text:style-name="P162" text:outline-level="2"><text:bookmark-start text:name="__RefHeading__252_403196617"/>Introduction<text:bookmark-end text:name="__RefHeading__252_403196617"/></text:h>
      <text:p text:style-name="P35">Koviz is a simulation data <text:span text:style-name="T142">plotting and </text:span><text:span text:style-name="T18">visualization tool. <text:s/>It is </text:span>designed especially for<text:span text:style-name="T17"> Trick </text:span>monte carlo data <text:span text:style-name="T18">analysis</text:span>, comparing simulation runs, <text:span text:style-name="T18">analyzing data spikes and creating report quality plot booklets</text:span>. <text:s/>Koviz can be run interactively via the GUI or can be run in batch. <text:s/>Koviz supports Trick binary data and CSV. <text:s/><text:span text:style-name="T17">Koviz </text:span><text:span text:style-name="T142">also </text:span><text:span text:style-name="T17">offers:</text:span></text:p>
      <text:list xml:id="list3792046774" text:style-name="L1">
        <text:list-item>
          <text:p text:style-name="P200">A real-time analysis report <text:span text:style-name="T17">for Trick real-time data recordings</text:span></text:p>
        </text:list-item>
        <text:list-item>
          <text:p text:style-name="P201"><text:span text:style-name="T142">A</text:span><text:span text:style-name="T17"> plugin-like functionality, external programs, to transform simulation data</text:span></text:p>
        </text:list-item>
        <text:list-item>
          <text:p text:style-name="P199"><text:span text:style-name="T142">Data/video synchronization to</text:span><text:span text:style-name="T17"> view video alongside associated data </text:span><text:span text:style-name="T142">plots</text:span></text:p>
        </text:list-item>
        <text:list-item>
          <text:p text:style-name="P200">Data/Blender graphics synchronization</text:p>
        </text:list-item>
        <text:list-item>
          <text:p text:style-name="P200">Live Trick simulation plots</text:p>
        </text:list-item>
      </text:list>
      <text:p text:style-name="P35">The <text:span text:style-name="T142">main </text:span>usage for koviz <text:span text:style-name="T40">is</text:span>: </text:p>
      <text:p text:style-name="P55"><text:span text:style-name="T40">UNIX Prompt&gt; </text:span>koviz <text:span text:style-name="T16">&lt;</text:span>RUN_<text:span text:style-name="T16">dir|MONTE_dir</text:span><text:span text:style-name="T145">|RUN file</text:span>&gt; [DP_<text:span text:style-name="T16">file1</text:span>...] [options]</text:p>
      <text:p text:style-name="P86">To see a list of options:</text:p>
      <text:p text:style-name="P55">UNIX Prompt&gt; koviz <text:span text:style-name="T25">&lt;ENTER&gt;</text:span></text:p>
      <text:h text:style-name="P149" text:outline-level="2"><text:bookmark-start text:name="__RefHeading__645_403196617"/>RUN Directories<text:bookmark-end text:name="__RefHeading__645_403196617"/></text:h>
      <text:p text:style-name="P11"><text:span text:style-name="T145">Koviz plots data from </text:span>RUN directories <text:span text:style-name="T145">which </text:span>contain log files <text:span text:style-name="T145">(normally </text:span>from <text:span text:style-name="T145">Trick </text:span>simulation run<text:span text:style-name="T145">s)</text:span>. <text:s/><text:span text:style-name="T21">Koviz is efficient at coplotting multiple RUN</text:span><text:span text:style-name="T145">s</text:span><text:span text:style-name="T21">:</text:span></text:p>
      <text:p text:style-name="P69">UNIX Prompt&gt; koviz RUN*</text:p>
      <text:h text:style-name="Heading_20_2" text:outline-level="2"><text:bookmark-start text:name="__RefHeading___Toc1918_3517546431"/>RUN Files<text:bookmark-end text:name="__RefHeading___Toc1918_3517546431"/></text:h>
      <text:p text:style-name="P36">Instead of giving koviz RUN directories that hold a set of log files, one can also directly plot files. <text:s/>For example, one can compare two *.csv files:</text:p>
      <text:p text:style-name="P70">UNIX Prompt&gt; koviz my-time-history.csv my-motion-capture.mot</text:p>
      <text:h text:style-name="P150" text:outline-level="2"><text:bookmark-start text:name="__RefHeading__655_403196617"/>M<text:span text:style-name="T19">ONTE</text:span> Directories<text:bookmark-end text:name="__RefHeading__655_403196617"/></text:h>
      <text:p text:style-name="P12">Trick Monte carlo directories, <text:span text:style-name="T20">typically prefixed by MONTE,</text:span> contain a set of RUNs and a monte carlo inputs file. <text:s/>The Koviz GUI correlates RUN inputs to plot curves:</text:p>
      <text:p text:style-name="P56">UNIX Prompt&gt; koviz MONTE_dir</text:p>
      <text:h text:style-name="P151" text:outline-level="2"><text:bookmark-start text:name="__RefHeading__234_403196617"/><text:soft-page-break/>DP Files<text:bookmark-end text:name="__RefHeading__234_403196617"/></text:h>
      <text:p text:style-name="P15">The <text:span text:style-name="T41">data </text:span>product <text:span text:style-name="T41">(DP) </text:span>specification file syntax is shown below. All keywords are case insensitive. There are three main specifications in the file: PLOTS, TABLES, and PROGRAM. PLOTS refers to one or more pages of XY plots. TABLES refers to one or more pages of ASCII tables. The <text:span text:style-name="T41">DP</text:span> file may contain any number of Pages and Tables. <text:s/>A page may <text:span text:style-name="T64">also </text:span>have <text:span text:style-name="T64">any number of </text:span>plot<text:span text:style-name="T64">s. <text:s/></text:span>PROGRAM refers to an external program – a user created shared library dynamically linked into koviz for manipulating recorded data for display. <text:s/>A DP file can be created from the koviz GUI using the main menu's “Save As DP” option.</text:p>
      <text:h text:style-name="P196" text:outline-level="4"><text:bookmark-start text:name="__RefHeading__475_403196617"/>DP File Syntax<text:bookmark-end text:name="__RefHeading__475_403196617"/></text:h>
      <text:p text:style-name="P53">[Title]</text:p>
      <text:p text:style-name="P49">[PLOTS: </text:p>
      <text:p text:style-name="P78">PAGE <text:span text:style-name="T146">page_number_integer</text:span>: “page_title” </text:p>
      <text:p text:style-name="P107"><text:span text:style-name="T169">[TAB_LABEL: “Widget Tab Label”]</text:span><text:line-break/>[FOREGROUND_COLOR: “#rrggbb|color_name”]<text:line-break/>[BACKGROUND_COLOR: “#rrggbb|color_name”]</text:p>
      <text:p text:style-name="P103">PLOT plot_number: “plot title” </text:p>
      <text:p text:style-name="P111">[X_AXIS_LABEL: “x_axis_label" <text:span text:style-name="T39">]<text:line-break/></text:span>[Y_AXIS_LABEL: “y_axis_label”] <text:line-break/>[X_MIN_RANGE: x_min_value] <text:line-break/>[X_MAX_RANGE: x_max_value] <text:line-break/>[Y_MIN_RANGE: y_min_value] <text:line-break/>[Y_MAX_RANGE: y_max_value]<text:line-break/><text:span text:style-name="T61">[PLOT_X_SCALE: “log|linear”]<text:line-break/>[PLOT_Y_SCALE: “log|linear”]</text:span><text:line-break/><text:span text:style-name="T42">[PLOT_RATIO: “square”]<text:line-break/>[GRID: &lt;on|off&gt;]<text:line-break/>[RECT: x%, y%, width%, height%]<text:line-break/>[PRESENTATION: compare|error|error+compare]<text:line-break/>[MAJOR_X_TICS: comma separated list of floats]<text:line-break/>[MINOR_X_TICS: comma separated list of floats]<text:line-break/>[MAJOR_Y_TICS: comma separated list of floats]<text:line-break/>[MINOR_Y_TICS: comma separated list of floats]<text:line-break/>… </text:span><text:span text:style-name="T146">continued on next page</text:span><text:span text:style-name="T42"><text:line-break/><text:line-break/></text:span><text:soft-page-break/><text:span text:style-name="T42"><text:line-break/></text:span><text:span text:style-name="T146">[HLINE: float]<text:line-break/> <text:s text:c="7"/>[COLOR: “#rrggbb|color_name”]<text:line-break/> <text:s text:c="7"/>[LABEL: “printf format - %g for value, %s for unit”]<text:line-break/> <text:s text:c="7"/>[UNITS: “unit”]<text:line-break/> <text:s text:c="7"/>[LABEL_UNITS: “unit”]<text:line-break/> <text:s text:c="7"/></text:span><text:span text:style-name="T147">[LABEL_ORIENT: “left|center|right|0&lt;=placement&lt;=1”]</text:span></text:p>
      <text:p text:style-name="P110">X_VARIABLE: “param_name” </text:p>
      <text:p text:style-name="P112">[LABEL: “label”] <text:line-break/>[UNITS: “unit”] <text:line-break/>[SCALE_FACTOR: scale_value] <text:line-break/>[BIAS: bias_value] </text:p>
      <text:p text:style-name="P110">Y_VARIABLE: “param_name” </text:p>
      <text:p text:style-name="P113"><text:span text:style-name="T9">(</text:span>Same attributes as X_VARIABLE<text:span text:style-name="T9">)</text:span> <text:line-break/>[SYMBOL_STYLE: symbol_style] <text:line-break/>[SYMBOL_SIZE: symbol_size]<text:line-break/><text:span text:style-name="T144">[SYMBOL_END: symbol_style]</text:span><text:line-break/>[LINE_STYLE: line_style] <text:line-break/>[LINE_COLOR: <text:span text:style-name="T7">“#rrggbb|color_name”</text:span>] </text:p>
      <text:p text:style-name="P110">[Y_VARIABLE: ... ] </text:p>
      <text:p text:style-name="P50">]</text:p>
      <text:p text:style-name="P50">[TABLES: </text:p>
      <text:p text:style-name="P79">TABLE table_number_<text:span text:style-name="T146">integer</text:span>: “table_title” <text:line-break/> <text:s text:c="3"/><text:span text:style-name="T169">[TAB_LABEL: “Widget Tab Label”]</text:span></text:p>
      <text:p text:style-name="P103">VARIABLE: “param_name” <text:line-break/><text:span text:style-name="T8">(S</text:span>ame <text:span text:style-name="T8">attributes </text:span>as X_VARIABLE in PLOT<text:span text:style-name="T8">)</text:span> <text:line-break/>[VARIABLE: ...] </text:p>
      <text:p text:style-name="P50">] </text:p>
      <text:p text:style-name="P50">[PROGRAM: “<text:span text:style-name="T146">path_to_</text:span>program_<text:span text:style-name="T146">shared_library</text:span>”: </text:p>
      <text:p text:style-name="P79">IN: “param_name1” “param_name2” ... <text:line-break/>OUT: “param_name1” param_name2” ... </text:p>
      <text:p text:style-name="P44">]</text:p>
      <text:h text:style-name="P197" text:outline-level="4"><text:bookmark-start text:name="__RefHeading__560_403196617"/><text:soft-page-break/><text:span text:style-name="T34">DP </text:span>Line and Symbol Styles<text:bookmark-end text:name="__RefHeading__560_403196617"/></text:h>
      <text:p text:style-name="P47">SYMBOL_STYLE:</text:p>
      <text:p text:style-name="P76">None|Square|Circle|Star|XX|Triangle|<text:line-break/>Solid_Square|Solid_Circle|Thick_Square|Thick_Circle<text:span text:style-name="T41">|<text:line-break/>Number_[0-9]</text:span><text:span text:style-name="T143">|sa</text:span><text:span text:style-name="T144">tellite</text:span></text:p>
      <text:p text:style-name="P141">SYMBOL_END:</text:p>
      <text:p text:style-name="P146">Same symbols as SYMBOL_STYLE</text:p>
      <text:p text:style-name="P47">SYMBOL_SIZE: </text:p>
      <text:p text:style-name="P76">Tiny|Small|Medium|Large</text:p>
      <text:p text:style-name="P47">LINE_STYLE: </text:p>
      <text:p text:style-name="P76">“No_Line|Thick_Line|X_Thick_Line|Fine_Dash|Med_Fine_Dash|<text:line-break/>Long_Dash|X_Long_Dash|Dot_Dash|2_Dot_Dash|3_Dot_Dash| <text:line-break/>4_Dot_Dash|Plain|Dash<text:span text:style-name="T62">|Scatter</text:span>”</text:p>
      <text:p text:style-name="P47">LINE_COLOR: </text:p>
      <text:p text:style-name="P76">“#rrggbb|&lt;color_name&gt;” </text:p>
      <text:h text:style-name="P198" text:outline-level="4"/>
      <text:h text:style-name="P198" text:outline-level="4"><text:bookmark-start text:name="__RefHeading__595_403196617"/>DP File Example<text:bookmark-end text:name="__RefHeading__595_403196617"/></text:h>
      <text:p text:style-name="P10"><text:span text:style-name="T11">E</text:span>xample <text:span text:style-name="T10">barebones</text:span> DP file:<text:span text:style-name="T10"> </text:span></text:p>
      <text:p text:style-name="P48">PLOTS: </text:p>
      <text:p text:style-name="P48">PAGE 1: "<text:span text:style-name="T11">Page Title</text:span>" </text:p>
      <text:p text:style-name="P77">PLOT 1: "<text:span text:style-name="T11">Ball X Position</text:span>" </text:p>
      <text:p text:style-name="P102"><text:span text:style-name="T12">X_VARIABLE: "</text:span><text:span text:style-name="T13">sys.exec.out.time</text:span><text:span text:style-name="T12">" <text:line-break/>Y_VARIABLE: "ball.state.out.position[</text:span><text:span text:style-name="T13">0</text:span><text:span text:style-name="T12">]"</text:span></text:p>
      <text:h text:style-name="P154" text:outline-level="2"/>
      <text:h text:style-name="P163" text:outline-level="2"><text:bookmark-start text:name="__RefHeading__759_403196617"/>Session Files<text:bookmark-end text:name="__RefHeading__759_403196617"/></text:h>
      <text:p text:style-name="P13">To launch koviz with a set of RUNs and DPs, the -session command-line option may be used:</text:p>
      <text:p text:style-name="P57">UNIX Prompt&gt; koviz -session &lt;session_file&gt;</text:p>
      <text:p text:style-name="P87">The syntax for the session file is as follows:</text:p>
      <text:p text:style-name="P74"><text:span text:style-name="T156">[# At beginning of line is a comment]</text:span><text:span text:style-name="T157"><text:line-break/>[Title] <text:line-break/>[DEVICE: &lt;File &lt;file_name&gt;|Terminal&gt; ]<text:line-break/>[FREQUENCY: cycle_time] <text:line-break/>[TIME_MATCH_TOLERANCE: delta_time] <text:line-break/>[PRESENTATION: Compare|Error|Error+Compare] <text:line-break/>PRODUCT: </text:span><text:span text:style-name="T23">DP</text:span><text:span text:style-name="T157">_file</text:span><text:span text:style-name="T24">name</text:span><text:span text:style-name="T157"> <text:line-break/>[PRODUCT: </text:span><text:span text:style-name="T23">DP</text:span><text:span text:style-name="T157">_file</text:span><text:span text:style-name="T24">name</text:span><text:span text:style-name="T157">_n ...] <text:line-break/>RUN: RUN_directory <text:line-break/>[RUN: RUN_directory_n …]<text:line-break/></text:span><text:span text:style-name="T43">[T[1-4]: title1-title4]<text:line-break/>[C[1-7]: line color 1-7]<text:line-break/>[L[1-7]: legend label 1-7]<text:line-break/>[LS[1-7]: linestyle 1-7]<text:line-break/>[S[1-7]: symbol 1-7]<text:line-break/>[FG: foreground color]<text:line-break/>[BG: background color]<text:line-break/>[START: start_time]<text:line-break/>[STOP: stop_time]<text:line-break/>[ORIENT: portrait|landscape]<text:line-break/>[SHIFT: RUN shift times]<text:line-break/>[TimeName: time_name]<text:line-break/>[MapFile: map_filename]<text:line-break/>[LEGEND: on|off]<text:line-break/>[ShowTables: on|off]<text:line-break/>[EXCLUDE: exclude pattern]<text:line-break/>[FILTER: filter pattern]<text:line-break/>[Video: filename]<text:line-break/>[VideoOffset: time]<text:line-break/>[ShowPageTitle: yes|no]<text:line-break/>[ShowPlotLegend: yes|no]<text:line-break/></text:span><text:soft-page-break/><text:span text:style-name="T43">[PlotLegendPosition: ne|e|se|s|sw|w|nw|n]</text:span></text:p>
      <text:p text:style-name="P87">The DEVICE: statement specifies the visualization device for data output. <text:s/>Device types are Terminal (the default) and File. When Terminal is specified, the koviz GUI will be displayed. When File is specified the output is re-directed as PDF to the &lt;file_name&gt; file. </text:p>
      <text:p text:style-name="P87">The FREQUENCY: statement specifies the delta time between data points <text:span text:style-name="T22">when loading curve data</text:span>. &lt;cycle_time&gt; <text:span text:style-name="T22">is</text:span> specified in seconds. <text:s/><text:span text:style-name="T22">If the optional FREQUENCY statement is unspecified or if the &lt;cycle_time&gt; is less than the recorded data cycle time, all recorded curve data will be loaded</text:span>. <text:s/><text:span text:style-name="T22">If the &lt;cycle_time&gt; is larger, curve data points will be culled.</text:span></text:p>
      <text:p text:style-name="P87">The TIME_MATCH_TOLERANCE: statement specifies the maximum allowed delta between the time stamps for two sets of data points used in generating the error plot. The default value is 1.0e-<text:span text:style-name="T22">6</text:span>. <text:s/><text:span text:style-name="T43">Koviz <text:s/>does a best match for timestamps within the tolerance.</text:span></text:p>
      <text:p text:style-name="P87">The PRESENTATION: statement is only useful when <text:span text:style-name="T22">two RUNs are specified</text:span>. <text:s/><text:span text:style-name="T23">If presentation is “error”, a difference curve between two RUNs will be displayed. <text:s/>The points in the difference curve are matched by the TIME_MATCH_TOLERANCE. <text:s/>Interpolation is not done. <text:s/>If presentation is “compare”, curves from each RUN will be shown together. <text:s/>Finally, if presentation is “error+compare”, <text:s/>three curves will be shown: the difference curve alongside the curves from each RUN.</text:span></text:p>
      <text:p text:style-name="P87">The PRODUCT: statement specifies a <text:span text:style-name="T23">data </text:span>product <text:span text:style-name="T23">(DP) </text:span>file. <text:span text:style-name="T23">One or more DP files must be specified. <text:s/>DP</text:span> files specify the <text:span text:style-name="T23">simulation </text:span>parameters to display, and the display attributes for each parameter. <text:s/><text:span text:style-name="T23">See </text:span><text:span text:style-name="T23"><text:bookmark-ref text:reference-format="text" text:ref-name="__RefHeading__234_403196617">DP Files</text:bookmark-ref></text:span><text:span text:style-name="T23"><text:s/>for more detail.</text:span></text:p>
      <text:p text:style-name="P87">The RUN: statement specifies a simulation RUN directory from which to retrieve logged data, &lt;RUN_directory&gt;. <text:s/>One or more RUNs must be specified.</text:p>
      <text:p text:style-name="P90">The SHIFT: statement is used to shift RUN time(s). <text:s/>If there is a single RUN, specify a double value e.g. SHIFT: 13.56. <text:s/>If there are multiple RUNs, use a comma delimited list of RUN:&lt;shift_value&gt; specs e.g. SHIFT: RUN_a:13.56,RUN_b:77.28,RUN_c:23.0.</text:p>
      <text:p text:style-name="P90">The TimeName: statement is used when time is not the default “sys.exec.out.time” e.g. TimeName: myTimeName.</text:p>
      <text:p text:style-name="P90">The MapFile: statement is used to tell koviz where the map file is located. <text:s/>Maps are described later in this document, but in a nutshell maps are used to map RUNs with different parameter names so that the RUNs can be compared and difference plotted.</text:p>
      <text:p text:style-name="P90">The EXCLUDE: and FILTER: statements <text:span text:style-name="T44">either cull out or filter for logfiles within the RUN directories. <text:s/>This can help speed up data loading and/or show a subset of all variables logged.</text:span></text:p>
      <text:h text:style-name="P155" text:outline-level="2"/>
      <text:h text:style-name="P164" text:outline-level="2"><text:bookmark-start text:name="__RefHeading__254_403196617"/>External Programs<text:bookmark-end text:name="__RefHeading__254_403196617"/></text:h>
      <text:p text:style-name="P7">The DP PROGRAM specification provides a means for transforming data. Users build a program that is dynamically linked into <text:span text:style-name="T48">Koviz</text:span> for manipulating data specified in the DP specification file. </text:p>
      <text:h text:style-name="Heading_20_3" text:outline-level="3"><text:bookmark-start text:name="__RefHeading__264_403196617"/><text:span text:style-name="T33">External Program </text:span>DP File Specification <text:bookmark-end text:name="__RefHeading__264_403196617"/></text:h>
      <text:p text:style-name="P7">The &lt;program_name&gt; argument is a full path to a program which accepts the INs and generates the OUTs. This program must adhere to strict interface requirements. This program will be dynamically linked into the data products, which implies it must be built under specific guidelines. Only ONE external program may be defined per DP file. </text:p>
      <text:p text:style-name="P7">The IN parameters are specified as a space delimited list of simulation <text:span text:style-name="T48">variable</text:span> names and external program OUT token names. The OUT list is a user defined name list which provides a unique token name for each of the external program output arguments. These output tokens may be used throughout the product specification file wherever a simulation <text:span text:style-name="T48">variable</text:span> name is used. </text:p>
      <text:p text:style-name="P7">Inputs will be cast to doubles going to the external program, and outputs must be doubles as well. </text:p>
      <text:p text:style-name="P7">As an example, a user would like <text:span text:style-name="T48">to plot </text:span>t<text:span text:style-name="T48">he rss of a vector</text:span>. <text:s/>The product specification file (DP_* file) <text:span text:style-name="T2">might </text:span>look like th<text:span text:style-name="T2">e following</text:span> (NOTE: all strings surrounded in quotes): </text:p>
      <text:h text:style-name="Heading_20_3" text:outline-level="3"><text:bookmark-start text:name="__RefHeading__381_403196617"/><text:span text:style-name="T33">External Program </text:span>DP <text:span text:style-name="T32">File Example</text:span><text:bookmark-end text:name="__RefHeading__381_403196617"/></text:h>
      <text:p text:style-name="P52">PROGRAM: “<text:span text:style-name="T48">/home/kvetter/test/ext_programs/librss.so</text:span>” </text:p>
      <text:p text:style-name="P80">IN: </text:p>
      <text:p text:style-name="P105">“<text:span text:style-name="T48">Chaser.stVeh.stFFrDock.vecF_Frame[0]</text:span>”<text:line-break/>“<text:span text:style-name="T48">Chaser.stVeh.stFFrDock.vecF_Frame[1]</text:span>”<text:line-break/>“<text:span text:style-name="T48">Chaser.stVeh.stFFrDock.vecF_Frame[2]</text:span>”</text:p>
      <text:p text:style-name="P80">OUT: </text:p>
      <text:p text:style-name="P104">“<text:span text:style-name="T48">vecF_Frame_rss</text:span>” </text:p>
      <text:p text:style-name="P51"><text:span text:style-name="T48">PLOTS:<text:line-break/></text:span><text:line-break/>PAGE 1: "<text:span text:style-name="T48">External Program Example</text:span>" </text:p>
      <text:p text:style-name="P81">PLOT 1: “<text:span text:style-name="T48">RSS</text:span>”</text:p>
      <text:p text:style-name="P106">X_VARIABLE: "sys.exec.out.time" <text:line-break/>Y_VARIABLE: "<text:span text:style-name="T48">vecF_Frame_rss</text:span>" <text:line-break/></text:p>
      <text:h text:style-name="P170" text:outline-level="3"><text:bookmark-start text:name="__RefHeading__383_403196617"/><text:soft-page-break/>External Program Source Code <text:span text:style-name="T35">Example</text:span><text:bookmark-end text:name="__RefHeading__383_403196617"/></text:h>
      <text:p text:style-name="P8">The following is an example external program source file <text:span text:style-name="T49">(rss.c)</text:span> which takes <text:span text:style-name="T46">three</text:span> inputs and generates <text:span text:style-name="T46">a single </text:span>output. <text:s/><text:span text:style-name="T31">B</text:span>old font <text:span text:style-name="T31">indicates code that is mandatory (i.e. “kovizProgram” is the function name that koviz expects for external programs).</text:span></text:p>
      <text:p text:style-name="P46"><text:span text:style-name="T47">#include &lt;math.h&gt;<text:line-break/></text:span><text:span text:style-name="T4"><text:line-break/>void</text:span><text:span text:style-name="T3"> kovizProgram( double* in, int numIn, double* out, int numOut )</text:span><text:line-break/><text:span text:style-name="T3">{</text:span></text:p>
      <text:p text:style-name="P83">out[0] = sqrt(in[0]*in[0] + in[1]*in[1] + in[2]*in[2]);</text:p>
      <text:p text:style-name="P45">}</text:p>
      <text:h text:style-name="P172" text:outline-level="3"><text:bookmark-start text:name="__RefHeading___Toc907_1341101074"/>Building <text:span text:style-name="T49">Example </text:span>External Program On Linux<text:line-break/><text:bookmark-end text:name="__RefHeading___Toc907_1341101074"/></text:h>
      <text:p text:style-name="P59">% cc -fPIC -c rss.c<text:line-break/>% ld -shared -o librss.so rss.o -lm -lc</text:p>
      <text:h text:style-name="P195" text:outline-level="3"><text:bookmark-start text:name="__RefHeading__385_403196617"/>External Program Building<text:bookmark-end text:name="__RefHeading__385_403196617"/></text:h>
      <text:p text:style-name="P9">The external program created by the user must be built so that it can be dynamically linked into koviz. </text:p>
      <text:p text:style-name="P9">In order to build, take the following steps according to platform. </text:p>
      <text:h text:style-name="Heading_20_4" text:outline-level="4"><text:bookmark-start text:name="__RefHeading__387_403196617"/>Linux<text:bookmark-end text:name="__RefHeading__387_403196617"/></text:h>
      <text:p text:style-name="P43">Step 1. cc <text:span text:style-name="T46">-fPIC </text:span>-c &lt;myprogram1&gt;.c (compile all individual object this way) </text:p>
      <text:p text:style-name="P43">Step 2. ld -shared -o &lt;myprogram&gt;.so &lt;myfunction1&gt;.o &lt;myfunction2&gt;.o... <text:span text:style-name="T5">[</text:span>&lt;myLib&gt;.a <text:span text:style-name="T5">]</text:span> <text:s/>-lc </text:p>
      <text:h text:style-name="Heading_20_4" text:outline-level="4"><text:bookmark-start text:name="__RefHeading__389_403196617"/>MacOS X <text:bookmark-end text:name="__RefHeading__389_403196617"/></text:h>
      <text:p text:style-name="P43">Step 1. cc -c &lt;myprogram1&gt;.c (compile all individual object this way) </text:p>
      <text:p text:style-name="P43">Step 2. cc -bundle -o &lt;myprogram&gt;.so &lt;myfunction1&gt;.o &lt;myfunction2&gt;.o ... <text:span text:style-name="T5">[</text:span>&lt;myLib&gt;.a<text:span text:style-name="T5">]</text:span> -lc </text:p>
      <text:p text:style-name="P9">&lt;myprogram&gt;.so is the name that needs to be specified in the DP specification file. <text:s text:c="2"/><text:span text:style-name="T31">Set </text:span>LD_LIBRARY_PATH <text:span text:style-name="T31">so that koviz can find the </text:span>shared object. </text:p>
      <text:p text:style-name="P9"><text:span text:style-name="T6">Try</text:span> the following to see if <text:span text:style-name="T6">the</text:span> newly create shared object has unresolved dependencies: </text:p>
      <text:p text:style-name="P43">UNIX% nm &lt;myprogram&gt;.so </text:p>
      <text:h text:style-name="Heading_20_3" text:outline-level="3"><text:bookmark-start text:name="__RefHeading__391_403196617"/>External Program Summary <text:bookmark-end text:name="__RefHeading__391_403196617"/></text:h>
      <text:p text:style-name="P9">To use an external program: </text:p>
      <text:p text:style-name="P9">Step 1. Build a DP spec file with the program name, inputs and outputs. </text:p>
      <text:p text:style-name="P9">Step 2. Write an external program</text:p>
      <text:p text:style-name="P9">Step 3. Build the external program. </text:p>
      <text:p text:style-name="P9">Step 4. <text:span text:style-name="T38">UNIX Prompt&gt; koviz DP_external_program RUN_name</text:span></text:p>
      <text:h text:style-name="Heading_20_3" text:outline-level="3"><text:bookmark-start text:name="__RefHeading__393_403196617"/>External Program Problems And Caveats <text:bookmark-end text:name="__RefHeading__393_403196617"/></text:h>
      <text:list xml:id="list3021151665" text:style-name="L2">
        <text:list-item>
          <text:p text:style-name="P202">Can’t load shared library!!! Ensure that $LD_LIBRARY_PATH is set so that koviz can find the *.so file. <text:s/>The external program (*.so program) may have unresolved dependencies. Try “nm” on the external program, and look for “U”s.</text:p>
        </text:list-item>
        <text:list-item>
          <text:p text:style-name="P203">Koviz will not scale or bias X values with external programs.</text:p>
        </text:list-item>
        <text:list-item>
          <text:p text:style-name="P202">External programs convert everything to doubles, and only accept and output doubles. </text:p>
        </text:list-item>
        <text:list-item>
          <text:p text:style-name="P202">External programs have no notion of unit conversion. </text:p>
        </text:list-item>
      </text:list>
      <text:h text:style-name="P156" text:outline-level="2"><text:bookmark-start text:name="__RefHeading___Toc1920_3517546431"/><text:soft-page-break/>Scripts<text:bookmark-end text:name="__RefHeading___Toc1920_3517546431"/></text:h>
      <text:p text:style-name="P37">One may give koviz a script (or list of scripts) on the commandline. <text:s/>The intention of the script capability is to allow users to call their custom script with the current RUN as the first argument to the custom script. <text:s/>This allows users to, for example, select a RUN and fire off a custom visualization for the current RUN. <text:s/>The usage is as follows:</text:p>
      <text:p text:style-name="P72">koviz -script “script1 arg1 arg2… argN, script2 arg1 arg2… argN, …”</text:p>
      <text:p text:style-name="P97"><text:span text:style-name="T148">When koviz is brought up the UI will put the scripts in </text:span><text:span text:style-name="T154">koviz’</text:span><text:span text:style-name="T148"> main menu. <text:s/>When the user selects the sc</text:span><text:span text:style-name="T149">r</text:span><text:span text:style-name="T148">ipt off the menu, the script will be called with the current RUN as the first argument followed by the user supplied arguments. <text:s/></text:span><text:span text:style-name="T149">Additionally, one may place an ampersand in front of a character to hot-key the menu item.</text:span></text:p>
      <text:p text:style-name="P97"><text:span text:style-name="T149">For example, suppose one has a this bash script, </text:span><text:span text:style-name="T155">show</text:span><text:span text:style-name="T149">-run.sh:</text:span></text:p>
      <text:p text:style-name="P71"><text:span text:style-name="T149">#! /</text:span><text:span text:style-name="T151">usr/bin/env bash<text:line-break/></text:span><text:span text:style-name="T152">xmessage</text:span><text:span text:style-name="T151"> “$1”</text:span></text:p>
      <text:p text:style-name="P97"><text:span text:style-name="T151">Try </text:span><text:span text:style-name="T153">the following with some RUN. <text:s/>Make sure double and single quotes are normal ASCII for this commandline call i.e. beware of cut-n-paste:</text:span></text:p>
      <text:p text:style-name="P73"><text:span text:style-name="T150">% koviz -</text:span><text:span text:style-name="T75">script “&amp;</text:span><text:span text:style-name="T77">show</text:span><text:span text:style-name="T75">-run.sh, &amp;koviz -t1 ‘Calling Koviz’” </text:span><text:span text:style-name="T76">&lt;RUN&gt;</text:span></text:p>
      <text:p text:style-name="P98"><text:span text:style-name="T75">Once koviz comes up, </text:span><text:span text:style-name="T78">select </text:span><text:span text:style-name="T79">Scripts &gt; show-run.sh</text:span></text:p>
      <text:p text:style-name="P96"><draw:frame draw:style-name="fr2" draw:name="Image3" text:anchor-type="char" svg:width="6.9252in" svg:height="3.4201in" draw:z-index="4"><draw:image xlink:href="Pictures/1000020100000385000001BDB89D2591E61DCBF6.png" xlink:type="simple" xlink:show="embed" xlink:actuate="onLoad" loext:mime-type="image/png"/></draw:frame><text:span text:style-name="T149"><text:s/></text:span><text:s/></text:p>
      <text:h text:style-name="P157" text:outline-level="2"><text:soft-page-break/>Commandline Options</text:h>
      <text:p text:style-name="P42"><text:span text:style-name="T176">This section covers some of the commandline options that koviz offers.</text:span><text:span text:style-name="T177"><text:line-break/><text:line-break/>-</text:span><text:span text:style-name="T89">vars2csv &lt;csvfile.csv&gt;</text:span><text:span text:style-name="T87"><text:line-break/>This option will create a csv </text:span><text:span text:style-name="T91">from the list of variables given in the -vars option</text:span><text:span text:style-name="T87">. <text:s/>The -vars option must be used. <text:s text:c="2"/></text:span><text:span text:style-name="T88">The variable</text:span><text:span text:style-name="T91">s</text:span><text:span text:style-name="T88"> can be scaled, biased and given units. <text:s/>For example:<text:line-break/> koviz RUN_test -vars “ball.state.out.position[0]</text:span><text:span text:style-name="T87"> </text:span><text:span text:style-name="T88">{ft} scale(-1) bias(100), ball.state.out.velocity {mph}” <text:s text:c="2"/>-</text:span><text:span text:style-name="T90">vars2csv posvel.csv</text:span><text:span text:style-name="T88"><text:line-break/></text:span></text:p>
      <text:h text:style-name="P152" text:outline-level="2"><text:bookmark-start text:name="__RefHeading__761_403196617"/><text:soft-page-break/><text:span text:style-name="T26">Plot</text:span> Interaction<text:bookmark-end text:name="__RefHeading__761_403196617"/></text:h>
      <table:table table:name="Table1" table:style-name="Table1">
        <table:table-column table:style-name="Table1.A"/>
        <table:table-column table:style-name="Table1.B"/>
        <table:table-row table:style-name="TableLine94031444727920">
          <table:table-cell table:style-name="Table1.A1" office:value-type="string">
            <text:p text:style-name="P116">Select Curve</text:p>
          </table:table-cell>
          <table:table-cell table:style-name="Table1.B1" office:value-type="string">
            <text:p text:style-name="P116">Mouse Left Click Curve</text:p>
          </table:table-cell>
        </table:table-row>
        <table:table-row table:style-name="TableLine94031444854192">
          <table:table-cell table:style-name="Table1.A2" office:value-type="string">
            <text:p text:style-name="P123">Drag Curve</text:p>
          </table:table-cell>
          <table:table-cell table:style-name="Table1.B2" office:value-type="string">
            <text:p text:style-name="P123">Mouse Left Click Curve to select<text:line-break/>Then Keypress Crtl + Mouse Left Drag</text:p>
          </table:table-cell>
        </table:table-row>
        <table:table-row table:style-name="TableLine94031444855600">
          <table:table-cell table:style-name="Table1.A2" office:value-type="string">
            <text:p text:style-name="P123">Drag Curve Onto Another Curve</text:p>
          </table:table-cell>
          <table:table-cell table:style-name="Table1.B2" office:value-type="string">
            <text:p text:style-name="P123">Mouse Left Click Curve to select<text:line-break/>Then Keypress Alt+Ctrl+Mouse Left Drag<text:line-break/>making init points of both curves close enough to “snap”</text:p>
          </table:table-cell>
        </table:table-row>
        <table:table-row table:style-name="TableLine94031444856240">
          <table:table-cell table:style-name="Table1.A2" office:value-type="string">
            <text:p text:style-name="P115">Zoom In</text:p>
          </table:table-cell>
          <table:table-cell table:style-name="Table1.B2" office:value-type="string">
            <text:p text:style-name="P115">Mouse <text:span text:style-name="T27">Middle</text:span> Click <text:span text:style-name="T28">a</text:span>nd Drag Zoom Box</text:p>
          </table:table-cell>
        </table:table-row>
        <table:table-row table:style-name="TableLine94031444856880">
          <table:table-cell table:style-name="Table1.A2" office:value-type="string">
            <text:p text:style-name="P115">Zoom Out</text:p>
          </table:table-cell>
          <table:table-cell table:style-name="Table1.B2" office:value-type="string">
            <text:p text:style-name="P115">Mouse Right Click <text:span text:style-name="T63">or Keypress Escape</text:span></text:p>
          </table:table-cell>
        </table:table-row>
        <table:table-row table:style-name="TableLine94031444857600">
          <table:table-cell table:style-name="Table1.A2" office:value-type="string">
            <text:p text:style-name="P116">Pan</text:p>
          </table:table-cell>
          <table:table-cell table:style-name="Table1.B2" office:value-type="string">
            <text:p text:style-name="P116">Mouse Left Drag In Middle Of Plot</text:p>
          </table:table-cell>
        </table:table-row>
        <table:table-row table:style-name="TableLine94031444858352">
          <table:table-cell table:style-name="Table1.A2" office:value-type="string">
            <text:p text:style-name="P116">Scale</text:p>
          </table:table-cell>
          <table:table-cell table:style-name="Table1.B2" office:value-type="string">
            <text:p text:style-name="P116">Mouse Left Drag In Outter Extremity Of Plot</text:p>
          </table:table-cell>
        </table:table-row>
        <table:table-row table:style-name="TableLine94031444859152">
          <table:table-cell table:style-name="Table1.A2" office:value-type="string">
            <text:p text:style-name="P116"><text:span text:style-name="T45">Toggle Single/Multiplot </text:span>View</text:p>
          </table:table-cell>
          <table:table-cell table:style-name="Table1.B2" office:value-type="string">
            <text:p text:style-name="P116">Mouse Left Click <text:span text:style-name="T45">On Y-Axis Label or Plot Title</text:span></text:p>
          </table:table-cell>
        </table:table-row>
        <table:table-row table:style-name="TableLine94031444859952">
          <table:table-cell table:style-name="Table1.A2" office:value-type="string">
            <text:p text:style-name="P118"><text:span text:style-name="T30">Toggle</text:span> Y Axis Units</text:p>
          </table:table-cell>
          <table:table-cell table:style-name="Table1.B2" office:value-type="string">
            <text:p text:style-name="P118">Mouse Wheel Over Y-Axis Unit In Curly Braces {<text:span text:style-name="T30">unit</text:span>}</text:p>
          </table:table-cell>
        </table:table-row>
        <table:table-row table:style-name="TableLine94031444860672">
          <table:table-cell table:style-name="Table1.A2" office:value-type="string">
            <text:p text:style-name="P122">Toggle Linear/Logscale</text:p>
          </table:table-cell>
          <table:table-cell table:style-name="Table1.B2" office:value-type="string">
            <text:p text:style-name="P122">Mouse Wheel over x or y tic values</text:p>
          </table:table-cell>
        </table:table-row>
        <table:table-row table:style-name="TableLine94031444861472">
          <table:table-cell table:style-name="Table1.A2" office:value-type="string">
            <text:p text:style-name="P117">Suspend Live Coordinate Updates</text:p>
          </table:table-cell>
          <table:table-cell table:style-name="Table1.B2" office:value-type="string">
            <text:p text:style-name="P117">Keypress Shift While Mov<text:span text:style-name="T29">ing</text:span> Mouse Off Plot</text:p>
          </table:table-cell>
        </table:table-row>
        <table:table-row table:style-name="TableLine94031444862272">
          <table:table-cell table:style-name="Table1.A2" office:value-type="string">
            <text:p text:style-name="P118">Toggle Presentation <text:span text:style-name="T123">(compare/error)</text:span></text:p>
          </table:table-cell>
          <table:table-cell table:style-name="Table1.B2" office:value-type="string">
            <text:p text:style-name="P118">Keypress Spacebar</text:p>
          </table:table-cell>
        </table:table-row>
        <table:table-row table:style-name="TableLine94031444863072">
          <table:table-cell table:style-name="Table1.A2" office:value-type="string">
            <text:p text:style-name="P118">Print Current Coordinate <text:span text:style-name="T65">&amp; Dx,Dy</text:span></text:p>
          </table:table-cell>
          <table:table-cell table:style-name="Table1.B2" office:value-type="string">
            <text:p text:style-name="P118">Keypress Period</text:p>
          </table:table-cell>
        </table:table-row>
        <table:table-row table:style-name="TableLine94031444863872">
          <table:table-cell table:style-name="Table1.A2" office:value-type="string">
            <text:p text:style-name="P120">Measure Distance On Plot</text:p>
          </table:table-cell>
          <table:table-cell table:style-name="Table1.B2" office:value-type="string">
            <text:p text:style-name="P120">Keypress Alt + Mouse Left Drag (updates koviz status bar)</text:p>
          </table:table-cell>
        </table:table-row>
        <table:table-row table:style-name="TableLine94031444864672">
          <table:table-cell table:style-name="Table1.A2" office:value-type="string">
            <text:p text:style-name="P119">Hop To Prev/Next Plot Coord</text:p>
          </table:table-cell>
          <table:table-cell table:style-name="Table1.B2" office:value-type="string">
            <text:p text:style-name="P119">Keypress Left/Right Arrow (after curve selected)</text:p>
          </table:table-cell>
        </table:table-row>
        <table:table-row table:style-name="TableLine94031444865472">
          <table:table-cell table:style-name="Table1.A2" office:value-type="string">
            <text:p text:style-name="P119">Place Marker On Plot Coord</text:p>
          </table:table-cell>
          <table:table-cell table:style-name="Table1.B2" office:value-type="string">
            <text:p text:style-name="P119">Keypress Comma</text:p>
          </table:table-cell>
        </table:table-row>
        <table:table-row table:style-name="TableLine94031444866272">
          <table:table-cell table:style-name="Table1.A2" office:value-type="string">
            <text:p text:style-name="P121">Change X Axis Variable <text:span text:style-name="T132">(normal)</text:span></text:p>
          </table:table-cell>
          <table:table-cell table:style-name="Table1.B2" office:value-type="string">
            <text:p text:style-name="P121"><text:span text:style-name="T66">Options-&gt;</text:span>Drag-n-Drop. Drag-n-drop variable onto x-axis label.</text:p>
          </table:table-cell>
        </table:table-row>
        <table:table-row table:style-name="TableLine94031444867072">
          <table:table-cell table:style-name="Table1.A2" office:value-type="string">
            <text:p text:style-name="P132">Change X Axis Variable (live data)</text:p>
          </table:table-cell>
          <table:table-cell table:style-name="Table1.B2" office:value-type="string">
            <text:p text:style-name="P132">See section at end on Live Sim Data</text:p>
          </table:table-cell>
        </table:table-row>
        <table:table-row table:style-name="TableLine94031444867872">
          <table:table-cell table:style-name="Table1.A2" office:value-type="string">
            <text:p text:style-name="P124">Frequency Domain Toggle</text:p>
          </table:table-cell>
          <table:table-cell table:style-name="Table1.B2" office:value-type="string">
            <text:p text:style-name="P124">Keypress f</text:p>
          </table:table-cell>
        </table:table-row>
        <table:table-row table:style-name="TableLine94031444868672">
          <table:table-cell table:style-name="Table1.A2" office:value-type="string">
            <text:p text:style-name="P125">Butterworth Filter</text:p>
          </table:table-cell>
          <table:table-cell table:style-name="Table1.B2" office:value-type="string">
            <text:p text:style-name="P125">Keypress b</text:p>
          </table:table-cell>
        </table:table-row>
        <table:table-row table:style-name="TableLine94031444869472">
          <table:table-cell table:style-name="Table1.A2" office:value-type="string">
            <text:p text:style-name="P126">Savitzky-Golay Filter</text:p>
          </table:table-cell>
          <table:table-cell table:style-name="Table1.B2" office:value-type="string">
            <text:p text:style-name="P126">Keypress g</text:p>
          </table:table-cell>
        </table:table-row>
        <table:table-row table:style-name="TableLine94031444870272">
          <table:table-cell table:style-name="Table1.A2" office:value-type="string">
            <text:p text:style-name="P127">Flip Curve About <text:span text:style-name="T108">X</text:span>-Axis</text:p>
          </table:table-cell>
          <table:table-cell table:style-name="Table1.B2" office:value-type="string">
            <text:p text:style-name="P127">Keypress -</text:p>
          </table:table-cell>
        </table:table-row>
        <table:table-row table:style-name="TableLine94031444871072">
          <table:table-cell table:style-name="Table1.A2" office:value-type="string">
            <text:p text:style-name="P128">Derivative Of Curve</text:p>
          </table:table-cell>
          <table:table-cell table:style-name="Table1.B2" office:value-type="string">
            <text:p text:style-name="P128">Keypress d</text:p>
          </table:table-cell>
        </table:table-row>
        <table:table-row table:style-name="TableLine94031444871872">
          <table:table-cell table:style-name="Table1.A2" office:value-type="string">
            <text:p text:style-name="P129">Integral Of Curve</text:p>
          </table:table-cell>
          <table:table-cell table:style-name="Table1.B2" office:value-type="string">
            <text:p text:style-name="P129">Keypress i (use entry box for initial value, default to 0.0)</text:p>
          </table:table-cell>
        </table:table-row>
        <table:table-row table:style-name="TableLine94031444872672">
          <table:table-cell table:style-name="Table1.A2" office:value-type="string">
            <text:p text:style-name="P129">… <text:span text:style-name="T133">continued on next page</text:span></text:p>
          </table:table-cell>
          <table:table-cell table:style-name="Table1.B2" office:value-type="string">
            <text:p text:style-name="P129">...</text:p>
          </table:table-cell>
        </table:table-row>
      </table:table>
      <text:h text:style-name="P158" text:outline-level="2"><text:soft-page-break/></text:h>
      <table:table table:name="Table2" table:style-name="Table2">
        <table:table-column table:style-name="Table2.A"/>
        <table:table-column table:style-name="Table2.B"/>
        <table:table-row table:style-name="TableLine94031444509536">
          <table:table-cell table:style-name="Table2.A1" office:value-type="string">
            <text:p text:style-name="P136">Summation of all curves on plot</text:p>
          </table:table-cell>
          <table:table-cell table:style-name="Table2.B1" office:value-type="string">
            <text:p text:style-name="P136">Keypress s</text:p>
          </table:table-cell>
        </table:table-row>
        <table:table-row table:style-name="TableLine94031444893968">
          <table:table-cell table:style-name="Table2.A2" office:value-type="string">
            <text:p text:style-name="P137">Magnitude of all curves on plot</text:p>
          </table:table-cell>
          <table:table-cell table:style-name="Table2.B2" office:value-type="string">
            <text:p text:style-name="P137">Keypress m</text:p>
          </table:table-cell>
        </table:table-row>
        <table:table-row table:style-name="TableLine94031444895200">
          <table:table-cell table:style-name="Table2.A2" office:value-type="string">
            <text:p text:style-name="P134"><text:span text:style-name="T136">Plot e</text:span><text:span text:style-name="T127">xpand</text:span><text:span text:style-name="T136">ed</text:span><text:span text:style-name="T127"> </text:span><text:span text:style-name="T132">live sim </text:span><text:span text:style-name="T127">parameter</text:span><text:span text:style-name="T136">s</text:span><text:span text:style-name="T127"> </text:span><text:span text:style-name="T136">on</text:span><text:span text:style-name="T127"> individual pages</text:span></text:p>
          </table:table-cell>
          <table:table-cell table:style-name="Table2.B2" office:value-type="string">
            <text:p text:style-name="P133">Left Mouse Click Parameter</text:p>
          </table:table-cell>
        </table:table-row>
        <table:table-row table:style-name="TableLine94031444895840">
          <table:table-cell table:style-name="Table2.A2" office:value-type="string">
            <text:p text:style-name="P134"><text:span text:style-name="T136">Plot e</text:span><text:span text:style-name="T132">xpand</text:span><text:span text:style-name="T136">ed</text:span><text:span text:style-name="T132"> live sim parameter</text:span><text:span text:style-name="T136">s</text:span><text:span text:style-name="T132"> </text:span><text:span text:style-name="T136">on</text:span><text:span text:style-name="T132"> individual plots on same page</text:span></text:p>
          </table:table-cell>
          <table:table-cell table:style-name="Table2.B2" office:value-type="string">
            <text:p text:style-name="P133">Keypress Ctrl + Left Mouse Click Parameter</text:p>
          </table:table-cell>
        </table:table-row>
        <table:table-row table:style-name="TableLine94031444896480">
          <table:table-cell table:style-name="Table2.A2" office:value-type="string">
            <text:p text:style-name="P134"><text:span text:style-name="T138">Co</text:span><text:span text:style-name="T136">Plot e</text:span><text:span text:style-name="T132">xpand</text:span><text:span text:style-name="T136">ed</text:span><text:span text:style-name="T132"> live sim parameter</text:span><text:span text:style-name="T136">s</text:span><text:span text:style-name="T132"> </text:span><text:span text:style-name="T136">on</text:span><text:span text:style-name="T132"> same plot</text:span></text:p>
          </table:table-cell>
          <table:table-cell table:style-name="Table2.B2" office:value-type="string">
            <text:p text:style-name="P133">Keypress Alt + Left Mouse Click Parameter</text:p>
          </table:table-cell>
        </table:table-row>
        <table:table-row table:style-name="TableLine94031444897120">
          <table:table-cell table:style-name="Table2.A2" office:value-type="string">
            <text:p text:style-name="P135">Start a new plot page<text:line-break/>and honor optional Ctrl and Alt keys</text:p>
          </table:table-cell>
          <table:table-cell table:style-name="Table2.B2" office:value-type="string">
            <text:p text:style-name="P135">Keypress Shift + [Ctrl|Alt] + Left Mouse click parameter</text:p>
          </table:table-cell>
        </table:table-row>
      </table:table>
      <text:h text:style-name="P153" text:outline-level="2"/>
      <text:h text:style-name="P165" text:outline-level="2"><text:bookmark-start text:name="__RefHeading__853_403196617"/>Maps<text:bookmark-end text:name="__RefHeading__853_403196617"/></text:h>
      <text:p text:style-name="Text_20_body"><text:span text:style-name="T51">Maps </text:span><text:span text:style-name="T36">are used to c</text:span><text:span text:style-name="T51">ompar</text:span><text:span text:style-name="T50">e</text:span><text:span text:style-name="T51"> simulation RUNs whose </text:span><text:span text:style-name="T50">variable</text:span><text:span text:style-name="T51"> names do not match. <text:s/>A map is either contained in a file or can be specified directly on the commandline. <text:s/></text:span><text:span text:style-name="T40">The map is a comma delimited set of key-values in the following form:</text:span></text:p>
      <text:p text:style-name="P82">“key1=value1=value2...,key2=value1=value2,...”</text:p>
      <text:p text:style-name="P17">Here is an example of comparing <text:span text:style-name="T51">simulation position </text:span>and velocity names differ.</text:p>
      <text:p text:style-name="P16">UNIX Prompt&gt; koviz -mapFile “spots2dyn.kvz” <text:span text:style-name="T53">RUN_spots RUN_dyn</text:span></text:p>
      <text:p text:style-name="P88">UNIX Prompt&gt; cat spots2dyn.kvz</text:p>
      <text:p text:style-name="P58">posx <text:s/>= <text:s/>spots.vehicle.pos[0] <text:s/>= <text:s/><text:span text:style-name="T37">veh[0].</text:span>dynamics.pos<text:span text:style-name="T37">X</text:span>,<text:line-break/>posy <text:s/>= <text:s/>spots.vehicle.pos[1] <text:s/>= <text:s/><text:span text:style-name="T37">veh[0].</text:span>dynamics.pos<text:span text:style-name="T37">Y,<text:line-break/>velx</text:span> <text:s text:c="2"/>= <text:s/>spots.vehicle.<text:span text:style-name="T37">vel</text:span>[1] <text:s/>= <text:s/><text:span text:style-name="T37">veh[0].</text:span>dynamics.<text:span text:style-name="T37">velY,<text:line-break/>vely </text:span><text:s text:c="2"/>= <text:s/>spots.vehicle.<text:span text:style-name="T37">vel</text:span>[1] <text:s/>= <text:s/><text:span text:style-name="T37">veh[0].</text:span>dynamics.<text:span text:style-name="T37">velY</text:span></text:p>
      <text:p text:style-name="P89">Maps may also be used to scale and bias variables. <text:s/>If the logged data has no units, units may be applied in the map file as well. <text:s/>Here is an example of map file with scale, bias and unit specs:</text:p>
      <text:p text:style-name="P60">ForceX = Fx <text:s text:c="14"/>= inertialForceZ {N},<text:line-break/>ForceY = Fy bias(-12.25) <text:s/>= inertialForceX {N},<text:line-break/>ForceZ = Fz scale(-1.0) <text:s text:c="2"/>= inertialForceY {N}</text:p>
      <text:h text:style-name="P159" text:outline-level="2"/>
      <text:h text:style-name="P166" text:outline-level="2"><text:bookmark-start text:name="__RefHeading___Toc1404_4203752023"/>Groups<text:bookmark-end text:name="__RefHeading___Toc1404_4203752023"/></text:h>
      <text:p text:style-name="P28"><text:span text:style-name="T109">When plotting multiple </text:span><text:span text:style-name="T110">RUNs</text:span><text:span text:style-name="T109">, one can group </text:span><text:span text:style-name="T110">RUN </text:span><text:span text:style-name="T109">subsets together for coloring, styling and labeling. <text:s/></text:span><text:span text:style-name="T110">Grouping is done via regular expressions and ranges. <text:s/>For example, </text:span><text:span text:style-name="T112">for the following</text:span><text:span text:style-name="T110"> set of RUNs: RUN_damp_1, RUN_damp_2, </text:span><text:span text:style-name="T112">RUN_clamped_1, RUN_clamped_2, </text:span><text:span text:style-name="T110">RUN_free_1, RUN_free_2, RUN_free_3, one could group “damped” </text:span><text:span text:style-name="T112">and “clamped” together </text:span><text:span text:style-name="T110"><text:s/>and </text:span><text:span text:style-name="T112">group </text:span><text:span text:style-name="T110">“free” </text:span><text:span text:style-name="T112">RUNs </text:span><text:span text:style-name="T110">with the following command:<text:line-break/></text:span></text:p>
      <text:p text:style-name="P66"><text:span text:style-name="T111">UNIX Prompt&gt; koviz </text:span><text:span text:style-name="T110">RUN* </text:span><text:span text:style-name="T112">\</text:span><text:span text:style-name="T110"><text:line-break/> <text:s text:c="38"/>-g1 “damp</text:span><text:span text:style-name="T112">|clamp”</text:span><text:span text:style-name="T110"> -l1 “Damped </text:span><text:span text:style-name="T112">and Clamped” </text:span><text:span text:style-name="T110">-c1 blue -ls1 </text:span><text:span text:style-name="T112">plain</text:span><text:span text:style-name="T110"> \</text:span></text:p>
      <text:p text:style-name="P66"><text:span text:style-name="T110"><text:s text:c="39"/>-g2 free -</text:span><text:span text:style-name="T112">l2 Free -c1 green -ls1 x_thick_line</text:span><text:span text:style-name="T110"><text:line-break/></text:span></text:p>
      <text:p text:style-name="P29">The following <text:span text:style-name="T115">command</text:span> uses ranges to <text:span text:style-name="T116">group the first ten RUNs as pink and</text:span> the 99<text:span text:style-name="T113">th</text:span> RUN as thick white:<text:line-break/></text:p>
      <text:p text:style-name="P67"><text:span text:style-name="T111">UNIX Prompt&gt; </text:span><text:span text:style-name="T115">koviz MONTE_RUN_test -bg black -fg "#ededed" \<text:line-break/> <text:s text:c="39"/>-g1 "0,10" -c1 pink -l1 "First </text:span><text:span text:style-name="T117">Ten</text:span><text:span text:style-name="T115"> Runs" \<text:line-break/> <text:s text:c="39"/>-g2 99 -c2 white -ls2 x_thick_line -l2 "Last Run" DP_pos_vs_acc</text:span></text:p>
      <text:h text:style-name="P159" text:outline-level="2"><draw:frame draw:style-name="fr1" draw:name="Image2" text:anchor-type="char" svg:x="0.8346in" svg:y="0.1252in" svg:width="5.0063in" svg:height="3.722in" draw:z-index="3"><draw:image xlink:href="Pictures/10000000000003040000023EE13B6B813C644BD5.jpg" xlink:type="simple" xlink:show="embed" xlink:actuate="onLoad" loext:mime-type="image/jpeg"/></draw:frame></text:h>
      <text:h text:style-name="P167" text:outline-level="2"><text:bookmark-start text:name="__RefHeading___Toc811_3249638883"/>Video<text:bookmark-end text:name="__RefHeading___Toc811_3249638883"/></text:h>
      <text:h text:style-name="P174" text:outline-level="3"><text:bookmark-start text:name="__RefHeading___Toc948_3009348355"/>Introduction<text:bookmark-end text:name="__RefHeading___Toc948_3009348355"/></text:h>
      <text:p text:style-name="P19">Koviz uses mpv <text:span text:style-name="T55">as</text:span> the backend video player. <text:s/><text:span text:style-name="T55">Any video that mpv can play e.g. *.mp4, *.avi can be tied to data.</text:span></text:p>
      <text:h text:style-name="P175" text:outline-level="3"><text:bookmark-start text:name="__RefHeading___Toc950_3009348355"/>Building <text:span text:style-name="T54">K</text:span>oviz with MPV <text:span text:style-name="T54">Support</text:span><text:bookmark-end text:name="__RefHeading___Toc950_3009348355"/></text:h>
      <text:p text:style-name="P18">To build koviz with video support, the mpv development libraries must be installed. <text:s/>On CentOS7, this requires the “Nux Dextop” RPM repository. <text:s/>Once Nux is enabled, something like the following will install <text:span text:style-name="T55">the </text:span>mpv <text:span text:style-name="T55">dependencies and build koviz with video.</text:span></text:p>
      <text:p text:style-name="P63">% sudo yum install <text:s/>mpv-libs mpv-libs-devel mpv<text:line-break/>% cd &lt;koviz-repo&gt;<text:line-break/>% make distclean<text:line-break/>% qmake-qt5<text:line-break/>% make</text:p>
      <text:h text:style-name="P173" text:outline-level="3"><text:bookmark-start text:name="__RefHeading___Toc952_3009348355"/>Data Synchronization<text:bookmark-end text:name="__RefHeading___Toc952_3009348355"/></text:h>
      <text:p text:style-name="P22">Normally, video and data are alignable by a time offset. <text:s/>The time offset is given to koviz either on the commandline or in a file. <text:s/>Finding the time offset is a manual process unless the video and data were recorded together by a time synchronized system. <text:s/>For example, consider a GoPro camera recording a video of a person striking a loadcell with a hammer. <text:s/>The offset must be set to a value that aligns the hammer strike event in the video to the spike in the loadcell logged force data. <text:s/>Once a single event is synchronized, the video and data are completely synced – assuming the normal case where the video and data are real-time. <text:s/>Finding the exact video frame of the event that corresponds to the exact time in the data may not be possible. <text:s/>For instance, the hammer strike may not be seen in the video, only before and after the strike. <text:s/>In practice, this is okay, but is something to be aware of if the analysis requires that kind of fidelity.</text:p>
      <text:h text:style-name="P176" text:outline-level="3"><text:bookmark-start text:name="__RefHeading___Toc954_3009348355"/>Commandline -video and -videoOffset options<text:bookmark-end text:name="__RefHeading___Toc954_3009348355"/></text:h>
      <text:p text:style-name="P23">The simplest way to quickly tie a single video to data is to use the -video and -videoOffset options. <text:s/>For example:</text:p>
      <text:p text:style-name="P68">% koviz RUN_loadcell -video hammerstrike.mp4 -videoOffset 12.345</text:p>
      <text:p text:style-name="P94"/>
      <text:h text:style-name="P177" text:outline-level="3"><text:bookmark-start text:name="__RefHeading___Toc1683_1107607212"/><text:soft-page-break/>Commandline -video<text:span text:style-name="T118">List</text:span> option<text:bookmark-end text:name="__RefHeading___Toc1683_1107607212"/></text:h>
      <text:p text:style-name="P101"><text:span text:style-name="T118">The -videoList commandline option can be used to tie multiple videos to a single RUN. <text:s/>The -videoList option takes a </text:span><text:span text:style-name="T119">comma separate </text:span><text:span text:style-name="T118">list of video:offsets using </text:span><text:span text:style-name="T119">a </text:span><text:span text:style-name="T118">colon to separate the video file name from the offset e.g:<text:line-break/><text:tab/>% koviz RUN_fun -videoLis</text:span><text:span text:style-name="T119">t</text:span><text:span text:style-name="T118"> “Video/2023-03-22T0939_R02_Cam01_REC1_3.mp4:15.8450,<text:line-break/><text:tab/><text:tab/><text:tab/><text:tab/><text:tab/></text:span>Video/2023-03-22T0939_R02_Cam02_REC2_3.mp4:15.6080,<text:line-break/><text:tab/><text:tab/><text:tab/><text:tab/><text:tab/>Video/2023-03-22T0939_R02_Cam03_REC3_3.mp4:15.6060,<text:line-break/><text:tab/><text:tab/><text:tab/><text:tab/><text:tab/>Video/2023-03-22T0939_R02_CamCL_REC4_3.mp4:15.6150,<text:line-break/><text:tab/><text:tab/><text:tab/><text:tab/><text:tab/>Video/2023-03-22T0939_R02_CamF1_REC5_3.mp4:15.4820"</text:p>
      <text:h text:style-name="P178" text:outline-level="3"><text:bookmark-start text:name="__RefHeading___Toc1076_3009348355"/>Session Files<text:bookmark-end text:name="__RefHeading___Toc1076_3009348355"/></text:h>
      <text:p text:style-name="P20">A session file may work better if there is a need to save the video and offset for future use. <text:s/>Example session file (session_hammer):</text:p>
      <text:p text:style-name="P61"><text:span text:style-name="T56">Session – Hammer Video Sync<text:line-break/>RUN: RUN_loadcell<text:line-break/>PRODUCT: DP_</text:span><text:span text:style-name="T57">forces</text:span><text:span text:style-name="T56"><text:line-break/>video: Video</text:span><text:span text:style-name="T58">s</text:span><text:span text:style-name="T56">/</text:span><text:span text:style-name="T57">hammerstrike</text:span><text:span text:style-name="T56">.mp4<text:line-break/>videoOffset: 1</text:span><text:span text:style-name="T57">2</text:span><text:span text:style-name="T56">.</text:span><text:span text:style-name="T57">345</text:span></text:p>
      <text:p text:style-name="P91"><text:span text:style-name="T14">To</text:span><text:span text:style-name="T15"> run:</text:span></text:p>
      <text:p text:style-name="P54">% koviz -session session_hammer</text:p>
      <text:h text:style-name="P179" text:outline-level="3"><text:bookmark-start text:name="__RefHeading___Toc1078_3009348355"/>Video Directory Within RUN<text:bookmark-end text:name="__RefHeading___Toc1078_3009348355"/></text:h>
      <text:p text:style-name="P21">Another way, when there are multiple RUNs <text:span text:style-name="T59">tied to s</text:span><text:span text:style-name="T122">ingle</text:span><text:span text:style-name="T59"> videos, is to create a “video” directory </text:span><text:span text:style-name="T172">(or customize </text:span><text:span text:style-name="T172"><text:bookmark-ref text:reference-format="page" text:ref-name="__RefHeading___Toc4425_149071425">22</text:bookmark-ref></text:span><text:span text:style-name="T172">)</text:span><text:span text:style-name="T59"> in the RUN dir. <text:s/>The video file, e.g. hammerstrike.mp4, is placed in the “video” directory. <text:s/>An optional file, explicitly called “video-offset.txt”, contains the video offset for the video. <text:s/>For <text:s/>the hammertime example, the directory structure would look like:</text:span></text:p>
      <text:p text:style-name="P62">RUN_loadcell/</text:p>
      <text:p text:style-name="P84">loadcell_data.csv<text:line-break/>video/</text:p>
      <text:p text:style-name="P108">hammerstrike.mp4<text:line-break/>video-offset.txt (containing 12.345)</text:p>
      <text:p text:style-name="P92">If the RUN directory is setup this way the following will bring up the data and the associated video:</text:p>
      <text:p text:style-name="P62">% koviz RUN_loadcel<text:span text:style-name="T60">l</text:span></text:p>
      <text:h text:style-name="P180" text:outline-level="3"><text:bookmark-start text:name="__RefHeading___Toc1080_3009348355"/><text:soft-page-break/>Multiple RUNs <text:span text:style-name="T119">And</text:span> Multiple Videos<text:bookmark-end text:name="__RefHeading___Toc1080_3009348355"/></text:h>
      <text:p text:style-name="P30"><text:span text:style-name="T119">Finally, </text:span><text:span text:style-name="T120">to tie</text:span><text:span text:style-name="T119"> multiple videos per RUN, <text:s/></text:span><text:span text:style-name="T120">place a set of videos in the “RUN/video” directory </text:span><text:span text:style-name="T172">(or customize </text:span><text:span text:style-name="T172"><text:bookmark-ref text:reference-format="page" text:ref-name="__RefHeading___Toc4425_149071425">22</text:bookmark-ref></text:span><text:span text:style-name="T172">)</text:span><text:span text:style-name="T120"> and create a file called “video-offsets”</text:span><text:span text:style-name="T171">. <text:s/></text:span><text:span text:style-name="T120">The format of “video-offsets” is </text:span><text:span text:style-name="T122">a </text:span><text:span text:style-name="T120">comma separated list of video/offsets as shown in the example below. <text:s/></text:span><text:span text:style-name="T60">Using the video directory within a RUN directory technique, a set of RUNs can be tied to their associated videos. <text:s/>Once all RUNs have their associated videos in place, koviz can be launched with the entire set of RUNs. <text:s/>This makes it so one may hop from video to video by simply clicking on a curve of interest. <text:s/></text:span><text:span text:style-name="T121">Here is an example layout of two RUNs with multiple videos:</text:span></text:p>
      <text:p text:style-name="P140">RUN_a/<text:line-break/><text:tab/>log_RddrSimhost_DtaMtaRelMot.trk<text:line-break/><text:tab/><text:span text:style-name="T121">video/<text:line-break/><text:tab/><text:tab/>video-offsets.txt (contents below)<text:line-break/><text:tab/><text:tab/>2023-03-13T1109_R05_Cam01_REC1_6.mp4<text:line-break/><text:tab/><text:tab/>2023-03-13T1109_R05_Cam02_REC2_6.mp4<text:line-break/><text:tab/><text:tab/></text:span>2023-03-13T1109_R05_Cam03_REC3_6.mp4<text:line-break/><text:tab/><text:tab/>2023-03-13T1109_R05_CamCL_REC4_6.mp4<text:line-break/><text:tab/><text:tab/>2023-03-13T1109_R05_CamF1_REC5_6.mp4<text:line-break/><text:tab/><text:tab/>2023-03-13T1109_R05_CamF2_REC6_6.mp4</text:p>
      <text:p text:style-name="P140"><text:span text:style-name="T121">RUN_b/<text:line-break/><text:tab/></text:span>log_RddrSimhost_DtaMtaRelMot.trk<text:span text:style-name="T121"><text:tab/><text:line-break/><text:tab/>video/<text:line-break/><text:tab/><text:tab/>video-offsets.txt<text:line-break/><text:tab/><text:tab/>2023-03-22T0939_R02_Cam01_REC1_3.mp4<text:line-break/><text:tab/><text:tab/>2023-03-22T0939_R02_Cam02_REC2_3.mp4<text:line-break/><text:tab/><text:tab/>2023-03-22T0939_R02_Cam03_REC3_3.mp4<text:line-break/><text:tab/></text:span><text:line-break/>% <text:span text:style-name="T121">cat RUN_a/video/video-offsets.txt:</text:span></text:p>
      <text:p text:style-name="P142"><text:tab/>2023-03-13T1109_R05_Cam01_REC1_6.mp4, 18.479<text:line-break/><text:tab/>2023-03-13T1109_R05_Cam02_REC2_6.mp4, 18.236<text:line-break/><text:tab/>2023-03-13T1109_R05_Cam03_REC3_6.mp4, 18.257<text:line-break/><text:tab/>2023-03-13T1109_R05_CamCL_REC4_6.mp4, 18.207<text:line-break/><text:tab/>2023-03-13T1109_R05_CamF1_REC5_6.mp4, 18.123<text:line-break/><text:tab/>2023-03-13T1109_R05_CamF2_REC6_6.mp4, 18.112</text:p>
      <text:p text:style-name="P142"/>
      <text:h text:style-name="P181" text:outline-level="3"><text:bookmark-start text:name="__RefHeading___Toc4425_149071425"/><text:soft-page-break/>Custom Video Directory Path<text:bookmark-end text:name="__RefHeading___Toc4425_149071425"/></text:h>
      <text:p text:style-name="P41">By default, koviz will search for a “video” directory in the RUN directory. <text:s/>If one would rather place the videos associated with the RUN data in another location, one can give koviz a relative path from the RUN to the video directory. <text:s/>There are two ways to set the video directory. <text:s/>First, one can use the commandline option -videoDir. <text:s/>Second, one can set the video directory path in the main UI window: Options &gt; VideoDirectory. <text:s/>For example, if the data is structured like below, one would set the Option &gt; VideoDirectory to “../Video” <text:span text:style-name="T170">since the relative path from the directory with the sim data to the Video directory is “../Video”</text:span>:<text:line-break/></text:p>
      <text:p text:style-name="P75">RUN_a/</text:p>
      <text:p text:style-name="P85">DATA/</text:p>
      <text:p text:style-name="P109">log_Mars_environment.trk<text:line-break/>log_Mars_rover.trk</text:p>
      <text:p text:style-name="P85">Video/</text:p>
      <text:p text:style-name="P109">video-offsets.txt<text:line-break/>video-1.mp4<text:line-break/>video-2.mp4</text:p>
      <text:h text:style-name="P168" text:outline-level="2"><text:bookmark-start text:name="__RefHeading___Toc1340_1544136475"/>Blender<text:bookmark-end text:name="__RefHeading___Toc1340_1544136475"/></text:h>
      <text:h text:style-name="P182" text:outline-level="3"><text:bookmark-start text:name="__RefHeading___Toc1342_1544136475"/>Introduction<text:bookmark-end text:name="__RefHeading___Toc1342_1544136475"/></text:h>
      <text:p text:style-name="P24"><text:span text:style-name="T67">Koviz is able to synchronize its plots to Blender animations via a koviz Blender plugin. <text:s/></text:span><text:span text:style-name="T92">The start/end times of the koviz </text:span><text:span text:style-name="T94">simulation run </text:span><text:span text:style-name="T92">data are mapped to the begin/end frame</text:span><text:span text:style-name="T93">s </text:span><text:span text:style-name="T92">of the Blender animation. <text:s/>After selecting a koviz curve, mouse movement updates koviz </text:span><text:span text:style-name="T93">live </text:span><text:span text:style-name="T92">time interactively. <text:s/>Th</text:span><text:span text:style-name="T93">e</text:span><text:span text:style-name="T92"> koviz live time is sent to Blender while the mouse moves. <text:s/>Blender interpolates the koviz time to the animation frame and updates the Blender scene. <text:s/></text:span><text:span text:style-name="T93">The sync works from Blender to koviz as well. <text:s/>With mouse/keyboard focus on the Blender window, running the Blender animation will send koviz time updates </text:span><text:span text:style-name="T97">and update koviz plot live time.</text:span></text:p>
      <text:h text:style-name="P182" text:outline-level="3"><text:bookmark-start text:name="__RefHeading___Toc1344_1544136475"/>Blender Addon Setup<text:bookmark-end text:name="__RefHeading___Toc1344_1544136475"/></text:h>
      <text:p text:style-name="P24"><text:span text:style-name="T68">F</text:span><text:span text:style-name="T67">irst, add koviz to Blender’s addons. <text:s/></text:span><text:span text:style-name="T96">E</text:span><text:span text:style-name="T68">xample:</text:span></text:p>
      <text:p text:style-name="P64">% <text:span text:style-name="T68">cd $HOME/.config/blender/2.9</text:span><text:span text:style-name="T173">3</text:span><text:span text:style-name="T68">/scripts/addons</text:span></text:p>
      <text:p text:style-name="P64">% <text:span text:style-name="T68">ln </text:span><text:span text:style-name="T69">-s &lt;koviz-home&gt;/python/koviz.py koviz.py</text:span></text:p>
      <text:h text:style-name="P183" text:outline-level="3"><text:bookmark-start text:name="__RefHeading___Toc1346_1544136475"/>Animate Blender Default Cube<text:bookmark-end text:name="__RefHeading___Toc1346_1544136475"/></text:h>
      <text:p text:style-name="P25"><text:span text:style-name="T100">As an example, m</text:span><text:span text:style-name="T98">ake an animation of Blender’s cube:</text:span></text:p>
      <text:list xml:id="list3936266222" text:style-name="L3">
        <text:list-item>
          <text:p text:style-name="P204"><text:span text:style-name="T98">Bring up blender:<text:line-break/>% </text:span><text:span text:style-name="T99">blender</text:span></text:p>
        </text:list-item>
        <text:list-item>
          <text:p text:style-name="P205">Right click &gt; Insert Keyframe &gt; Location</text:p>
        </text:list-item>
        <text:list-item>
          <text:p text:style-name="P205">Slide animation frame to 250</text:p>
        </text:list-item>
        <text:list-item>
          <text:p text:style-name="P205">Move cube up 6: KeyPress gz6</text:p>
        </text:list-item>
        <text:list-item>
          <text:p text:style-name="P205">Right click &gt; Insert Keyframe &gt; Location</text:p>
        </text:list-item>
        <text:list-item>
          <text:p text:style-name="P205">Run animation by mouse clicking |&lt; followed by <text:s/>&gt;</text:p>
        </text:list-item>
        <text:list-item>
          <text:p text:style-name="P205">Save as cube.blend</text:p>
        </text:list-item>
        <text:list-item>
          <text:p text:style-name="P205">Close blender</text:p>
        </text:list-item>
      </text:list>
      <text:h text:style-name="P171" text:outline-level="3"/>
      <text:h text:style-name="P194" text:outline-level="3"><text:bookmark-start text:name="__RefHeading___Toc1348_1544136475"/>Sync Koviz To Default Cube Animation<text:bookmark-end text:name="__RefHeading___Toc1348_1544136475"/></text:h>
      <text:p text:style-name="P27">Blender argument order matters. <text:s/>The -P option must follow the model.</text:p>
      <text:p text:style-name="P65">% <text:span text:style-name="T95">blender cube.blend -P </text:span><text:span text:style-name="T70">&lt;koviz-home&gt;/blender/koviz-hello-world.py<text:line-break/></text:span><text:span text:style-name="T71"># Should see “Listen for koviz connection”</text:span></text:p>
      <text:p text:style-name="P99"><text:span text:style-name="T82">Run koviz on the supplied </text:span><text:span text:style-name="T80">position.csv file with 250 points. <text:s/>Note that time will go from 1 to 250 and map to the Blender frames. <text:s/>Position </text:span><text:span text:style-name="T84">linearly </text:span><text:span text:style-name="T80">moves from 0 to 6. <text:s/></text:span><text:span text:style-name="T85">This directly maps sim time to blender frames. <text:s/>It’s not necessary to make this direct frame to time map, it just made for a nice example. <text:s/></text:span><text:span text:style-name="T86">In general, koviz maps the start Blender frame to first time stamp and last Blender frame to the last time stamp.</text:span><text:span text:style-name="T80"><text:line-break/><text:line-break/></text:span><text:span text:style-name="T81">% </text:span><text:span text:style-name="T82">koviz &lt;koviz-home&gt;/blender/cube-position.csv</text:span><text:span text:style-name="T71"><text:line-break/># </text:span><text:span text:style-name="T83">Blender will say “Accept koviz connection!”</text:span></text:p>
      <text:p text:style-name="P93">To see koviz time synced to the Blender animation:</text:p>
      <text:list xml:id="list3985179661" text:style-name="L4">
        <text:list-item>
          <text:p text:style-name="P206">In koviz, click <text:span text:style-name="T174">position</text:span></text:p>
        </text:list-item>
        <text:list-item>
          <text:p text:style-name="P206">Mouse select the curve</text:p>
        </text:list-item>
        <text:list-item>
          <text:p text:style-name="P206">Move mouse to see Blender animation sync<text:line-break/>!! If it does not sync, click off of koviz curve, reselect curve and try moving mouse again.</text:p>
        </text:list-item>
      </text:list>
      <text:p text:style-name="P93">To see Blender animation sync to koviz:</text:p>
      <text:list xml:id="list2764627264" text:style-name="L5">
        <text:list-item>
          <text:p text:style-name="P207"><text:s/>Select curve in koviz (if not already done)</text:p>
        </text:list-item>
        <text:list-item>
          <text:p text:style-name="P208"><text:span text:style-name="T73">Click </text:span><text:span text:style-name="T72">Blender </text:span><text:span text:style-name="T73">window so Blender has focus</text:span></text:p>
        </text:list-item>
        <text:list-item>
          <text:p text:style-name="P208"><text:span text:style-name="T73">R</text:span><text:span text:style-name="T72">un </text:span><text:span text:style-name="T73">Blender </text:span><text:span text:style-name="T72">animation </text:span><text:span text:style-name="T73">by mouse clicking </text:span><text:span text:style-name="T74">the play button </text:span><text:span text:style-name="T73">&gt;</text:span></text:p>
        </text:list-item>
      </text:list>
      <text:h text:style-name="Heading_20_3" text:outline-level="3"/>
      <text:h text:style-name="P194" text:outline-level="3"><text:bookmark-start text:name="__RefHeading___Toc1350_1544136475"/>Sync Blender To Koviz <text:span text:style-name="T101">With ES’s Vismo</text:span><text:bookmark-end text:name="__RefHeading___Toc1350_1544136475"/></text:h>
      <text:p text:style-name="P26"><text:span text:style-name="T101">The Engineering Structures group have tied their vismo Blender tool to koviz. <text:s/>If you are lucky enough to have vismo, </text:span><text:span text:style-name="T104">h</text:span><text:span text:style-name="T102">ere is an example. <text:s/></text:span><text:span text:style-name="T103">The -k option tells vismo to sync using koviz:</text:span><text:span text:style-name="T102"><text:line-break/></text:span></text:p>
      <text:list xml:id="list4174922986" text:style-name="L6">
        <text:list-header>
          <text:p text:style-name="P209"><text:span text:style-name="T101">% </text:span><text:span text:style-name="T103">cd &lt;rddr-nds&gt;<text:line-break/>% . .Trick_user_profile ; # To put vismo.py in $PATH<text:line-break/>% cd &lt;rddr-nds&gt;/sims/rddr/nds/SIM_nds<text:line-break/>% </text:span><text:span text:style-name="T104">trick-CP</text:span><text:span text:style-name="T103"><text:line-break/>% ./S_main* SET_checkout/SET_m1u/RUN_checkout_MaxJackknife/input.py<text:line-break/>% vismo.py -k SET_checkout/SET_m1u/RUN_checkout_MaxJackknife<text:line-break/> <text:s text:c="4"/></text:span><text:span text:style-name="T104"># Listen for koviz connection...<text:line-break/>% koviz </text:span><text:span text:style-name="T103">SET_checkout/SET_m1u/RUN_checkout_MaxJackknife </text:span></text:p>
          <text:list>
            <text:list-header>
              <text:p text:style-name="P210"># Should see “Connected to host=127.0.0.1 port=64053!”<text:line-break/></text:p>
            </text:list-header>
          </text:list>
        </text:list-header>
      </text:list>
      <text:p text:style-name="P100">To see the koviz to Blender sync:</text:p>
      <text:list xml:id="list759922792" text:style-name="L7">
        <text:list-item>
          <text:p text:style-name="P216"><text:span text:style-name="T106">I</text:span><text:span text:style-name="T104">n </text:span><text:span text:style-name="T105">the </text:span><text:span text:style-name="T104">koviz search </text:span><text:span text:style-name="T105">box, </text:span><text:span text:style-name="T104">type “Fqu.daActuator”</text:span></text:p>
        </text:list-item>
        <text:list-item>
          <text:p text:style-name="P216"><text:span text:style-name="T104">Scroll over all 6 vars to coplot 6 actuators on s</text:span><text:span text:style-name="T106">i</text:span><text:span text:style-name="T104">ngle page</text:span></text:p>
        </text:list-item>
        <text:list-item>
          <text:p text:style-name="P218">Select a curve and move mouse to see data synced to docking animation</text:p>
        </text:list-item>
      </text:list>
      <text:p text:style-name="P138"><text:span text:style-name="T101"><text:line-break/></text:span><text:span text:style-name="T106">To see the Blender to koviz syn</text:span><text:span text:style-name="T107">c</text:span><text:span text:style-name="T106">:</text:span></text:p>
      <text:list xml:id="list596642360" text:style-name="L8">
        <text:list-item>
          <text:p text:style-name="P219">In the Blender window click the |&lt; to put the animation at the beginning</text:p>
        </text:list-item>
        <text:list-item>
          <text:p text:style-name="P219">Press &gt; to play</text:p>
        </text:list-item>
        <text:list-item>
          <text:p text:style-name="P219">The koviz live time should update along with the animation</text:p>
        </text:list-item>
        <text:list-item>
          <text:p text:style-name="P219">Pause the Blender animation by pressing the | | pause button</text:p>
        </text:list-item>
        <text:list-item>
          <text:p text:style-name="P217"><text:span text:style-name="T107">Press the keyboard right and left arrow keys to step the animation and watch koviz update frame by frame</text:span><text:span text:style-name="T101"><text:line-break/></text:span></text:p>
        </text:list-item>
      </text:list>
      <text:p text:style-name="P139"/>
      <text:p text:style-name="P139"/>
      <text:p text:style-name="P139"/>
      <text:h text:style-name="P160" text:outline-level="2"><text:bookmark-start text:name="__RefHeading___Toc1685_1107607212"/><text:soft-page-break/>Live Trick <text:span text:style-name="T137">TV Plots</text:span><text:bookmark-end text:name="__RefHeading___Toc1685_1107607212"/></text:h>
      <text:h text:style-name="P184" text:outline-level="3"><text:bookmark-start text:name="__RefHeading___Toc1687_1107607212"/>Introduction<text:bookmark-end text:name="__RefHeading___Toc1687_1107607212"/></text:h>
      <text:p text:style-name="P95"><text:span text:style-name="T124">Koviz has the ability to not only plot Trick recorded data but can plot live Trick sim data as well. <text:s/>When koviz is given the -trickport &lt;port&gt; option, it connects to the Trick variable server on the specified port and creates a TV panel for plotting sim parameters from the SIE database, </text:span><text:span text:style-name="T125">for example, to connect to a running sim on the localhost and port 4545:<text:line-break/><text:line-break/><text:tab/>% koviz RUN_realtime -trickport 4545<text:line-break/><text:line-break/></text:span><text:span text:style-name="T134">If the Trick sim is running on a different host, use the -trickhost &lt;host&gt; option.</text:span></text:p>
      <text:h text:style-name="P185" text:outline-level="3"><text:bookmark-start text:name="__RefHeading___Toc1689_1107607212"/>Plotting TV Params<text:bookmark-end text:name="__RefHeading___Toc1689_1107607212"/></text:h>
      <text:p text:style-name="P31">The parameters in the koviz TV panel parameter list are not expanded with their dimensions. <text:s/>For example, one might see a parameter called ball.state.out.position, when in reality there are two sim <text:span text:style-name="T131">variable</text:span>s since position has two dimensions <text:s/>e.g.:<text:line-break/><text:line-break/><text:tab/>ball.state.out.position[0]<text:line-break/><text:tab/>ball.state.out.position[1]<text:line-break/><text:line-break/>When one clicks a koviz-tv parameter, by default it makes a single plot <text:span text:style-name="T126">on its own page </text:span>for each of the expanded parameters. <text:s/>For example, if one clicks ball.state.out.position, two pages will be added with <text:s/>ball.state.out.postion[0] on one page and ball.state.out.position[1] on the other page. <text:s/>If one holds the Ctrl-Key down, the expanded parameters will be added on individual plots, but on the same page. <text:s/>If the Alt-Key is held when clicking a parameter, the expanded parameters will be coplotted on the same plot. <text:s/><text:span text:style-name="T141">Finally, if one holds the Shift-Key down while optionally using Ctrl or Alt, the plots will be placed on a new page. <text:s/></text:span>In summary:<text:line-break/></text:p>
      <table:table table:name="LivePlotInteraction" table:style-name="LivePlotInteraction">
        <table:table-column table:style-name="LivePlotInteraction.A"/>
        <table:table-column table:style-name="LivePlotInteraction.B"/>
        <table:table-row table:style-name="TableLine94031445101328">
          <table:table-cell table:style-name="LivePlotInteraction.A1" office:value-type="string">
            <text:p text:style-name="P131"><text:span text:style-name="T135">Plot e</text:span><text:span text:style-name="T127">xpand</text:span><text:span text:style-name="T135">ed</text:span><text:span text:style-name="T127"> parameter </text:span><text:span text:style-name="T135">o</text:span><text:span text:style-name="T127">n individual pages</text:span></text:p>
          </table:table-cell>
          <table:table-cell table:style-name="LivePlotInteraction.A1" office:value-type="string">
            <text:p text:style-name="P130">Left Mouse Click parameter</text:p>
          </table:table-cell>
        </table:table-row>
        <table:table-row table:style-name="TableLine94031444690400">
          <table:table-cell table:style-name="LivePlotInteraction.A1" office:value-type="string">
            <text:p text:style-name="P131"><text:span text:style-name="T135">Plot e</text:span><text:span text:style-name="T127">xpand</text:span><text:span text:style-name="T135">ed</text:span><text:span text:style-name="T127"> parameter </text:span><text:span text:style-name="T135">on</text:span><text:span text:style-name="T127"> different plots on same page</text:span></text:p>
          </table:table-cell>
          <table:table-cell table:style-name="LivePlotInteraction.A1" office:value-type="string">
            <text:p text:style-name="P130">Ctrl-Key + Left Mouse Click parameter</text:p>
          </table:table-cell>
        </table:table-row>
        <table:table-row table:style-name="TableLine94031444689648">
          <table:table-cell table:style-name="LivePlotInteraction.A1" office:value-type="string">
            <text:p text:style-name="P131"><text:span text:style-name="T138">Cop</text:span><text:span text:style-name="T135">lot expanded </text:span><text:span text:style-name="T127">parameter on same plot </text:span></text:p>
          </table:table-cell>
          <table:table-cell table:style-name="LivePlotInteraction.A1" office:value-type="string">
            <text:p text:style-name="P130">Alt-Key + Left Mouse Click parameter</text:p>
          </table:table-cell>
        </table:table-row>
        <table:table-row table:style-name="TableLine94031444711744">
          <table:table-cell table:style-name="LivePlotInteraction.A1" office:value-type="string">
            <text:p text:style-name="P135">Start a new plot page<text:line-break/>and honor optional Ctrl and Alt keys</text:p>
          </table:table-cell>
          <table:table-cell table:style-name="LivePlotInteraction.A1" office:value-type="string">
            <text:p text:style-name="P135">Shift-Key + [Ctrl|Alt] + Left Mouse click parameter</text:p>
          </table:table-cell>
        </table:table-row>
      </table:table>
      <text:h text:style-name="Heading_20_3" text:outline-level="3"><text:soft-page-break/></text:h>
      <text:h text:style-name="P186" text:outline-level="3"><text:bookmark-start text:name="__RefHeading___Toc1691_1107607212"/>Changing Live Plot Domain<text:bookmark-end text:name="__RefHeading___Toc1691_1107607212"/></text:h>
      <text:p text:style-name="P32"><text:span text:style-name="T127">To change the plot domain (x-axis variable) one must select Options-&gt;EnableDragAndDrop, then drag </text:span><text:span text:style-name="T128">a </text:span><text:span text:style-name="T127">TV parameter onto the x-axis of the plot to change. <text:s/></text:span><text:span text:style-name="T128">By default the first dimension of the drag-n-dropped parameter is used when dropping a parameter onto the x-axis. <text:s/>Use the Ctrl-key when dragging and dropping for the second parameter of the expansion, and the Alt-key for the third. <text:s/>If one wants to use the 4</text:span><text:span text:style-name="T114">th</text:span><text:span text:style-name="T128"> or higher, a DP file must be made with the x dimensioned parameter of choice.<text:line-break/></text:span></text:p>
      <text:h text:style-name="Heading_20_3" text:outline-level="3"><text:bookmark-start text:name="__RefHeading___Toc1693_1107607212"/>Live DP Files<text:bookmark-end text:name="__RefHeading___Toc1693_1107607212"/></text:h>
      <text:p text:style-name="P33">One may use the same DP files <text:span text:style-name="T129">for both </text:span>recorded data and live sim data. <text:s/><text:span text:style-name="T129">One can either specify the DP files on commandline or select the DPs from the DP panel when in live mode. <text:s/>The example below </text:span><text:span text:style-name="T130">has </text:span><text:span text:style-name="T129"><text:s/>koviz connect to the Trick variable server on port 4545 and plot the variables specified in the DP_tv.xml file.<text:line-break/><text:line-break/><text:tab/>% koviz RUN_realtime -trickport 4545 DP_tv.xml</text:span></text:p>
      <text:p text:style-name="P33"/>
      <text:h text:style-name="Heading_20_3" text:outline-level="3"><text:bookmark-start text:name="__RefHeading___Toc1780_3036021424"/><text:span text:style-name="T139">Live </text:span>Spring <text:span text:style-name="T140">Plot </text:span>Example<text:bookmark-end text:name="__RefHeading___Toc1780_3036021424"/></text:h>
      <text:p text:style-name="P34">Koviz contains a spring sim example. <text:s/>To try the spring sim with live plotting, follow these steps:<text:line-break/></text:p>
      <text:list xml:id="list920603027" text:style-name="L9">
        <text:list-item>
          <text:p text:style-name="P211">Build the koviz spring sim<text:line-break/>% cd &lt;koviz-home&gt;/sims/SIM_spring<text:line-break/>% trick-CP</text:p>
        </text:list-item>
        <text:list-item>
          <text:p text:style-name="P211">Launch the realtime spring sim (do not press start yet)<text:line-break/>% ./S_main*.exe RUN_realtime/input.py &amp;</text:p>
        </text:list-item>
        <text:list-item>
          <text:p text:style-name="P211">Launch koviz and connect to the trick sim<text:line-break/>% koviz -trickport 4545</text:p>
        </text:list-item>
        <text:list-item>
          <text:p text:style-name="P211">Select params to plot<text:line-break/>While holding the Ctrl key down, click:<text:line-break/> spring.pos<text:line-break/> spring.vel<text:line-break/> spring.acc</text:p>
        </text:list-item>
        <text:list-item>
          <text:p text:style-name="P211"><text:soft-page-break/>Run sim by pressing “Start” button on sim control</text:p>
        </text:list-item>
        <text:list-item>
          <text:p text:style-name="P211">Plots should update after pressing start</text:p>
        </text:list-item>
      </text:list>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h text:style-name="P169" text:outline-level="2"><text:bookmark-start text:name="__RefHeading___Toc4053_2364949263"/>Profiling Trick Jobs<text:bookmark-end text:name="__RefHeading___Toc4053_2364949263"/></text:h>
      <text:p text:style-name="P39">This is an example of how to profile a Trick sim using koviz’ mini profiler. <text:s/>The example induces a <text:span text:style-name="T159">couple sleeps</text:span> in the Trick Ball L2 sim and shows how one would profile t<text:span text:style-name="T159">he sim</text:span>.</text:p>
      <text:h text:style-name="P187" text:outline-level="3"><text:bookmark-start text:name="__RefHeading___Toc2091_3967031703"/><text:span text:style-name="T160">Add Sleeps To</text:span> Ball L2 Sim<text:bookmark-end text:name="__RefHeading___Toc2091_3967031703"/></text:h>
      <text:p text:style-name="P40">% cd $HOME<text:line-break/>% mkdir sims<text:line-break/>% cd sims<text:line-break/>% cp -r &lt;trick&gt;/trick_sims/Ball .<text:line-break/>% cd Ball/models/ball/L2/src<text:line-break/>% vi ball_floor.c<text:line-break/> <text:s text:c="3"/># <text:span text:style-name="T161">Add this #include to top of floor function</text:span><text:line-break/> <text:s text:c="3"/>#include &lt;time.h&gt;</text:p>
      <text:p text:style-name="P40"><text:s text:c="4"/>// <text:span text:style-name="T162">Add 3ms and 7ms sleeps </text:span><text:span text:style-name="T161">to body of floor function</text:span><text:line-break/> <text:s text:c="3"/>struct timespec ts3;<text:line-break/> <text:s text:c="3"/>ts3.tv_sec = 0;<text:line-break/> <text:s text:c="3"/>ts3.tv_nsec = 3 * 1000000; <text:s/>// 3 ms</text:p>
      <text:p text:style-name="P40"><text:s text:c="4"/>struct timespec ts7;<text:line-break/> <text:s text:c="3"/>ts7.tv_sec = 0;<text:line-break/> <text:s text:c="3"/>ts7.tv_nsec = 7 * 1000000; <text:s/>// 7 ms</text:p>
      <text:p text:style-name="P40"><text:s text:c="4"/>// Two sleeps<text:line-break/> <text:s text:c="3"/>nanosleep(&amp;ts<text:span text:style-name="T162">3</text:span>, NULL);<text:line-break/> <text:s text:c="3"/>nanosleep(&amp;ts<text:span text:style-name="T162">7</text:span>, NULL);</text:p>
      <text:h text:style-name="P188" text:outline-level="3"><text:bookmark-start text:name="__RefHeading___Toc2093_3967031703"/>Run And View Sleep Effect<text:bookmark-end text:name="__RefHeading___Toc2093_3967031703"/></text:h>
      <text:p text:style-name="P40">% cd $HOME/sims/Ball/SIM_ball_L2<text:line-break/>% vi Modified_data/realtime.py<text:line-break/> <text:s text:c="3"/># Turn frame log on<text:line-break/> <text:s text:c="3"/>trick.frame_log_on()<text:line-break/>% <text:span text:style-name="T160">vi RUN_realtime/input.py<text:line-break/> <text:s text:c="3"/># Change stop time to 30 seconds<text:line-break/> <text:s text:c="3"/>trick.sim_services.exec_set_terminate_time(30.0)</text:span><text:line-break/>% trick-CP<text:line-break/>% ./S_main* RUN_realtime/input.py<text:line-break/>% koviz RUN_realtime<text:line-break/><text:soft-page-break/> <text:s text:c="3"/># See ball floor timing <text:span text:style-name="T162">(should be a </text:span><text:span text:style-name="T163">little over </text:span><text:span text:style-name="T162">10ms </text:span><text:span text:style-name="T163">with possible spikes</text:span><text:span text:style-name="T162">)</text:span></text:p>
      <text:h text:style-name="P189" text:outline-level="3"><text:bookmark-start text:name="__RefHeading___Toc2095_3967031703"/>Modify and Build Profiler<text:bookmark-end text:name="__RefHeading___Toc2095_3967031703"/></text:h>
      <text:p text:style-name="P40">% cd &lt;koviz&gt;/profiler<text:line-break/>% ./clean.sh<text:line-break/>% <text:span text:style-name="T160">vi koviz.h<text:line-break/> <text:s text:c="3"/>1. Uncomment out #define TRICK<text:line-break/> <text:s text:c="3"/>2. Change KOVIZ_MAX_STATS to 2 (</text:span><text:span text:style-name="T159">to </text:span><text:span text:style-name="T160">tim</text:span><text:span text:style-name="T159">e</text:span><text:span text:style-name="T160"> 2 sleeps)<text:line-break/> <text:s text:c="3"/>3. Change <text:s/>KOVIZ_NRECS 3000 (100Hz*30 second run)<text:line-break/>% </text:span><text:span text:style-name="T164">cc -I&lt;trick&gt;/include -c koviz.c<text:line-break/>% ar cr libkoviz.a koviz.o</text:span></text:p>
      <text:h text:style-name="P190" text:outline-level="3"><text:bookmark-start text:name="__RefHeading___Toc2097_3967031703"/>Add Profiler T<text:span text:style-name="T161">o Sim</text:span><text:bookmark-end text:name="__RefHeading___Toc2097_3967031703"/></text:h>
      <text:p text:style-name="P40">% vi $HOME/sims/Ball/models/ball/L2/src/ball_floor.c<text:line-break/> <text:s text:c="3"/><text:span text:style-name="T165"># </text:span><text:span text:style-name="T166">Add profiler header to ball_floor.c</text:span><text:span text:style-name="T165"><text:line-break/> <text:s text:c="3"/>#include &lt;koviz&gt;/profiler/koviz.h<text:line-break/></text:span><text:line-break/> <text:s text:c="3"/><text:span text:style-name="T159"># </text:span><text:span text:style-name="T166">Add two </text:span><text:span text:style-name="T167">profiler </text:span><text:span text:style-name="T166">tags</text:span><text:span text:style-name="T165"><text:line-break/> <text:s text:c="3"/>koviz_start(“gtod”, “koviz.sleep.</text:span><text:span text:style-name="T161">3</text:span><text:span text:style-name="T165">”);<text:line-break/> <text:s text:c="3"/>nanosleep(&amp;ts</text:span><text:span text:style-name="T161">3</text:span><text:span text:style-name="T165">, NULL);<text:line-break/> <text:s text:c="3"/>koviz_stop(“gtod”, “koviz.sleep.</text:span><text:span text:style-name="T161">3</text:span><text:span text:style-name="T165">”);<text:line-break/> <text:s text:c="3"/>koviz_start(“gtod”, “koviz.sleep.</text:span><text:span text:style-name="T161">7</text:span><text:span text:style-name="T165">”);<text:line-break/> <text:s text:c="3"/>nanosleep(&amp;ts</text:span><text:span text:style-name="T161">7</text:span><text:span text:style-name="T165">, NULL);<text:line-break/> <text:s text:c="3"/>koviz_stop(“gtod”, “koviz.sleep.</text:span><text:span text:style-name="T161">7</text:span><text:span text:style-name="T165">”);</text:span></text:p>
      <text:p text:style-name="P40">% <text:span text:style-name="T165">cd $HOME/sims/Ball/SIM_</text:span><text:span text:style-name="T168">b</text:span><text:span text:style-name="T165">all_L2<text:line-break/>% vi S_overrides.mk<text:line-break/> <text:s text:c="3"/># Add <text:line-break/> <text:s text:c="3"/>TRICK_USER_LINK_LIBS += &lt;koviz&gt;/profiler/libkoviz.a</text:span></text:p>
      <text:p text:style-name="P40"><text:span text:style-name="T158"># Rebuild sim with profiler</text:span><text:line-break/>% <text:span text:style-name="T158">trick-CP</text:span></text:p>
      <text:h text:style-name="P191" text:outline-level="3"><text:bookmark-start text:name="__RefHeading___Toc2099_3967031703"/>Run Sim And See Profile Results<text:bookmark-end text:name="__RefHeading___Toc2099_3967031703"/></text:h>
      <text:p text:style-name="P212">% ./<text:span text:style-name="T158">S_main* RUN_realtime/input.py<text:line-break/>% mv koviz.trk RUN_realtime<text:line-break/>% koviz RUN_realtime<text:line-break/> <text:s text:c="3"/># Put koviz|floor in search box and coplot</text:span></text:p>
      <text:h text:style-name="P161" text:outline-level="2"><text:soft-page-break/>HDF5</text:h>
      <text:p text:style-name="P213"><text:span text:style-name="T178">Koviz supports Trick HDF5 and </text:span><text:span text:style-name="T179">generic HDF5 time-history datasets. <text:s/></text:span>Generic HDF5 support is intended for telemetry/time-history style data: rank-1 compound datasets containing a time field and numeric signal fields. <text:s text:c="2"/><text:span text:style-name="T179">The time field must be given to Koviz via the -timeName option. <text:s/></text:span>Non-numeric fields are plotted as NaN<text:span text:style-name="T179">s </text:span><text:span text:style-name="T184">and will be empty.</text:span></text:p>
      <text:h text:style-name="P192" text:outline-level="3">Building Koviz With HDF5 Support</text:h>
      <text:p text:style-name="P214"><text:span text:style-name="T54">To build koviz with </text:span><text:span text:style-name="T179">HDF5</text:span><text:span text:style-name="T54"> support, the </text:span><text:span text:style-name="T179">HDF5</text:span><text:span text:style-name="T54"> development libraries must be installed. <text:s/>On </text:span><text:span text:style-name="T179">Redhat 8</text:span><text:span text:style-name="T54">, the following will install </text:span><text:span text:style-name="T55">the </text:span><text:span text:style-name="T179">HDF5</text:span><text:span text:style-name="T54"> </text:span><text:span text:style-name="T55">dependencies and build koviz with </text:span><text:span text:style-name="T179">HDF5 support:</text:span></text:p>
      <text:p text:style-name="P220">% sudo <text:span text:style-name="T179">dnf</text:span> install <text:span text:style-name="T180">hdf5-devel</text:span><text:line-break/>% cd &lt;koviz-repo&gt;<text:line-break/>% make distclean<text:line-break/>% qmake-qt5<text:line-break/>% make</text:p>
      <text:h text:style-name="P193" text:outline-level="3">Generic HDF5 Parameters</text:h>
      <text:p text:style-name="P215"><text:span text:style-name="T180">If koviz is given a generic HDF5 file and -timeName &lt;time_name&gt;, koviz will search for paths that contain </text:span><text:span text:style-name="T184">rank-1 </text:span><text:span text:style-name="T180">compound datasets with </text:span><text:span text:style-name="T182">the given </text:span><text:span text:style-name="T180">&lt;time_name&gt; fiel</text:span><text:span text:style-name="T182">d</text:span><text:span text:style-name="T180">, and then make</text:span><text:span text:style-name="T184">s</text:span><text:span text:style-name="T180"> a list of plottable parameters from those fields. <text:s/><text:line-break/><text:line-break/>For example, </text:span><text:span text:style-name="T181">suppose a file called “orion.h5” </text:span><text:span text:style-name="T184">contains</text:span><text:span text:style-name="T181"> two paths: “/Storage/power” and “/Storage/dynamics”. <text:s text:c="2"/>Suppose “/Storage/power” </text:span><text:span text:style-name="T182">is </text:span><text:span text:style-name="T183">a </text:span><text:span text:style-name="T181">rank-1 compound dataset </text:span><text:span text:style-name="T182">with</text:span><text:span text:style-name="T181"> fields “time”, <text:s/>“battery_current” </text:span><text:span text:style-name="T182">and</text:span><text:span text:style-name="T181"> “solar_array_current”. <text:s/>And suppose “/</text:span><text:span text:style-name="T182">Storage/dynamics” had these fields: <text:s/></text:span><text:span text:style-name="T181">“time”, “mass”, “cg”, “position” and “velocity. <text:s/></text:span><text:span text:style-name="T182">Koviz would be launched like so:<text:line-break/><text:line-break/>% koviz -timeName “time” orion.h5 <text:line-break/></text:span><text:span text:style-name="T180"><text:line-break/></text:span><text:span text:style-name="T182">In this case, koviz’ list of plottable parameters would be:<text:line-break/><text:line-break/>time<text:line-break/>/Storage/power/battery_current<text:line-break/>/Storage/power/solar_array_current<text:line-break/></text:span><text:span text:style-name="T181">/</text:span><text:span text:style-name="T182">Storage/dynamics/mass<text:line-break/></text:span><text:span text:style-name="T181">/</text:span><text:span text:style-name="T182">Storage/dynamics/cg<text:line-break/></text:span><text:span text:style-name="T181">/</text:span><text:span text:style-name="T182">Storage/dynamics/velocity<text:line-break/></text:span><text:span text:style-name="T181">/</text:span><text:span text:style-name="T182">Storage/dynamics/position<text:line-break/></text:span><text:soft-page-break/><text:span text:style-name="T180"><text:line-break/></text:span></text:p>
      <text:p text:style-name="P220"/>
    </office:text>
  </office:body>
</office:document-content>
</file>

<file path=styles.xml><?xml version="1.0" encoding="utf-8"?>
<office:document-styles xmlns:grddl="http://www.w3.org/2003/g/data-view#" xmlns:xhtml="http://www.w3.org/1999/xhtml" xmlns:dom="http://www.w3.org/2001/xml-events" xmlns:form="urn:oasis:names:tc:opendocument:xmlns:form: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meta="urn:oasis:names:tc:opendocument:xmlns:meta:1.0" xmlns:fo="urn:oasis:names:tc:opendocument:xmlns:xsl-fo-compatible:1.0" xmlns:dc="http://purl.org/dc/elements/1.1/" xmlns:office="urn:oasis:names:tc:opendocument:xmlns:office:1.0" xmlns:xlink="http://www.w3.org/1999/xlink" xmlns:ooo="http://openoffice.org/2004/office" xmlns:table="urn:oasis:names:tc:opendocument:xmlns:table:1.0" xmlns:style="urn:oasis:names:tc:opendocument:xmlns:style:1.0" xmlns:text="urn:oasis:names:tc:opendocument:xmlns:text:1.0" xmlns:draw="urn:oasis:names:tc:opendocument:xmlns:drawing:1.0" xmlns:ooow="http://openoffice.org/2004/writer" xmlns:officeooo="http://openoffice.org/2009/office" xmlns:dr3d="urn:oasis:names:tc:opendocument:xmlns:dr3d:1.0" xmlns:svg="urn:oasis:names:tc:opendocument:xmlns:svg-compatible:1.0" xmlns:css3t="http://www.w3.org/TR/css3-text/" xmlns:chart="urn:oasis:names:tc:opendocument:xmlns:chart:1.0" xmlns:rpt="http://openoffice.org/2005/report" xmlns:field="urn:openoffice:names:experimental:ooo-ms-interop:xmlns:field:1.0" xmlns:number="urn:oasis:names:tc:opendocument:xmlns:datastyle:1.0"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0671ad" officeooo:paragraph-rsid="000671ad"/>
    </style:style>
    <style:style style:name="MP2" style:family="paragraph" style:parent-style-name="Footer">
      <style:paragraph-properties fo:text-align="center" style:justify-single-word="false"/>
    </style:style>
    <style:style style:name="MT1" style:family="text">
      <style:text-properties officeooo:rsid="000671ad"/>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Koviz User's Guide<text:tab/><text:tab/>Page <text:page-number text:select-page="current">32</text:page-number></text:p>
      </style:header>
      <style:footer>
        <text:p text:style-name="MP2"><text:span text:style-name="MT1">Page </text:span><text:page-number text:select-page="current">32</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initial-creator>Keith Vetter</meta:initial-creator>
    <meta:creation-date>2018-02-28T14:17:30.146419783</meta:creation-date>
    <dc:date>2026-05-11T13:10:38.335562846</dc:date>
    <meta:editing-duration>P5DT22H45M12S</meta:editing-duration>
    <meta:editing-cycles>221</meta:editing-cycles>
    <meta:generator>LibreOffice/6.4.7.2$Linux_X86_64 LibreOffice_project/40$Build-2</meta:generator>
    <meta:document-statistic meta:table-count="3" meta:image-count="3" meta:object-count="0" meta:page-count="32" meta:paragraph-count="398" meta:word-count="5042" meta:character-count="33940" meta:non-whitespace-character-count="28643"/>
  </office:meta>
</office:document-meta>
</file>