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ExampleParquetLayout" style:family="table">
      <style:table-properties style:width="6.925in" table:align="margins" style:may-break-between-rows="true" table:border-model="collapsing"/>
    </style:style>
    <style:style style:name="ExampleParquetLayout.A" style:family="table-column">
      <style:table-column-properties style:column-width="1.7313in" style:rel-column-width="16383*"/>
    </style:style>
    <style:style style:name="ExampleParquetLayout.D" style:family="table-column">
      <style:table-column-properties style:column-width="1.7313in" style:rel-column-width="16386*"/>
    </style:style>
    <style:style style:name="ExampleParquetLayout.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ExampleParquetLayout.A2" style:family="table-cell">
      <style:table-cell-properties fo:background-color="#eeeeee" fo:padding="0in" fo:border-left="none" fo:border-right="none" fo:border-top="none" fo:border-bottom="0.75pt solid #999999" style:writing-mode="page">
        <style:background-image/>
      </style:table-cell-properties>
    </style:style>
    <style:style style:name="ExampleParquetLayout.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ExampleParquetLayout.3" style:family="table-row">
      <style:table-row-properties fo:keep-together="auto"/>
    </style:style>
    <style:style style:name="ExampleParquetLayout.A8"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ExampleParquetLayout.B8"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text-properties officeooo:rsid="00f5ac7f" officeooo:paragraph-rsid="00f5ac7f"/>
    </style:style>
    <style:style style:name="P38" style:family="paragraph" style:parent-style-name="Text_20_body">
      <style:text-properties officeooo:rsid="00e3f7f7" officeooo:paragraph-rsid="00e3f7f7"/>
    </style:style>
    <style:style style:name="P39" style:family="paragraph" style:parent-style-name="Text_20_body">
      <style:text-properties officeooo:rsid="00e3f7f7" officeooo:paragraph-rsid="01034031"/>
    </style:style>
    <style:style style:name="P40" style:family="paragraph" style:parent-style-name="Text_20_body">
      <style:text-properties officeooo:rsid="010352e6" officeooo:paragraph-rsid="01034031"/>
    </style:style>
    <style:style style:name="P41" style:family="paragraph" style:parent-style-name="Text_20_body">
      <style:text-properties officeooo:paragraph-rsid="01034031"/>
    </style:style>
    <style:style style:name="P42" style:family="paragraph" style:parent-style-name="Text_20_body">
      <style:text-properties officeooo:rsid="0106c5d7" officeooo:paragraph-rsid="0106c5d7"/>
    </style:style>
    <style:style style:name="P43" style:family="paragraph" style:parent-style-name="Text_20_body">
      <style:text-properties officeooo:paragraph-rsid="011733c7"/>
    </style:style>
    <style:style style:name="P44" style:family="paragraph" style:parent-style-name="Text_20_body">
      <style:text-properties officeooo:paragraph-rsid="011cc60f"/>
    </style:style>
    <style:style style:name="P45" style:family="paragraph" style:parent-style-name="Text_20_body">
      <style:text-properties officeooo:paragraph-rsid="011de5ca"/>
    </style:style>
    <style:style style:name="P46" style:family="paragraph" style:parent-style-name="Text_20_body">
      <style:text-properties officeooo:paragraph-rsid="0121b526"/>
    </style:style>
    <style:style style:name="P47" style:family="paragraph" style:parent-style-name="Text_20_body">
      <style:text-properties officeooo:paragraph-rsid="0122dd8d"/>
    </style:style>
    <style:style style:name="P48" style:family="paragraph" style:parent-style-name="Text_20_body">
      <style:text-properties officeooo:paragraph-rsid="012460eb"/>
    </style:style>
    <style:style style:name="P49" style:family="paragraph" style:parent-style-name="Text_20_body">
      <style:text-properties officeooo:rsid="012624be" officeooo:paragraph-rsid="012624be"/>
    </style:style>
    <style:style style:name="P50" style:family="paragraph" style:parent-style-name="Text_20_body">
      <style:text-properties officeooo:paragraph-rsid="012624be"/>
    </style:style>
    <style:style style:name="P51" style:family="paragraph" style:parent-style-name="Text_20_body">
      <style:text-properties officeooo:paragraph-rsid="012b9196"/>
    </style:style>
    <style:style style:name="P52" style:family="paragraph" style:parent-style-name="Text_20_body">
      <style:text-properties officeooo:paragraph-rsid="01312049"/>
    </style:style>
    <style:style style:name="P53" style:family="paragraph" style:parent-style-name="Text_20_body">
      <style:paragraph-properties fo:margin-left="0.4925in" fo:margin-right="0in" fo:text-indent="0in" style:auto-text-indent="false"/>
      <style:text-properties officeooo:rsid="0017a831" officeooo:paragraph-rsid="0017a831"/>
    </style:style>
    <style:style style:name="P54"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55"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56"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57" style:family="paragraph" style:parent-style-name="Text_20_body">
      <style:paragraph-properties fo:margin-left="0.4925in" fo:margin-right="0in" fo:text-indent="0in" style:auto-text-indent="false"/>
      <style:text-properties officeooo:rsid="00303cac" officeooo:paragraph-rsid="00303cac"/>
    </style:style>
    <style:style style:name="P58"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59"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60"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61"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62"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63"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64"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65" style:family="paragraph" style:parent-style-name="Text_20_body">
      <style:paragraph-properties fo:margin-left="0.4925in" fo:margin-right="0in" fo:text-indent="0in" style:auto-text-indent="false"/>
      <style:text-properties officeooo:rsid="0034ee78" officeooo:paragraph-rsid="0034ee78"/>
    </style:style>
    <style:style style:name="P66" style:family="paragraph" style:parent-style-name="Text_20_body">
      <style:paragraph-properties fo:margin-left="0.4925in" fo:margin-right="0in" fo:text-indent="0in" style:auto-text-indent="false"/>
      <style:text-properties officeooo:rsid="003bbddc" officeooo:paragraph-rsid="003bbddc"/>
    </style:style>
    <style:style style:name="P67" style:family="paragraph" style:parent-style-name="Text_20_body">
      <style:paragraph-properties fo:margin-left="0.4925in" fo:margin-right="0in" fo:text-indent="0in" style:auto-text-indent="false"/>
      <style:text-properties officeooo:rsid="004142be" officeooo:paragraph-rsid="0045cf64"/>
    </style:style>
    <style:style style:name="P68"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69"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70"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71"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72" style:family="paragraph" style:parent-style-name="Text_20_body">
      <style:paragraph-properties fo:margin-left="0.4925in" fo:margin-right="0in" fo:text-indent="0in" style:auto-text-indent="false"/>
      <style:text-properties officeooo:rsid="008b6fed" officeooo:paragraph-rsid="008b6fed"/>
    </style:style>
    <style:style style:name="P73" style:family="paragraph" style:parent-style-name="Text_20_body">
      <style:paragraph-properties fo:margin-left="0.4925in" fo:margin-right="0in" fo:text-indent="0in" style:auto-text-indent="false"/>
      <style:text-properties officeooo:rsid="00756402" officeooo:paragraph-rsid="00799fed"/>
    </style:style>
    <style:style style:name="P74" style:family="paragraph" style:parent-style-name="Text_20_body">
      <style:paragraph-properties fo:margin-left="0.4925in" fo:margin-right="0in" fo:text-indent="0in" style:auto-text-indent="false"/>
      <style:text-properties officeooo:rsid="00756402" officeooo:paragraph-rsid="011de5ca"/>
    </style:style>
    <style:style style:name="P75" style:family="paragraph" style:parent-style-name="Text_20_body">
      <style:paragraph-properties fo:margin-left="0.4925in" fo:margin-right="0in" fo:text-indent="0in" style:auto-text-indent="false"/>
      <style:text-properties officeooo:rsid="00a9c690" officeooo:paragraph-rsid="00a9c690"/>
    </style:style>
    <style:style style:name="P76" style:family="paragraph" style:parent-style-name="Text_20_body">
      <style:paragraph-properties fo:margin-left="0.4925in" fo:margin-right="0in" fo:text-indent="0in" style:auto-text-indent="false"/>
      <style:text-properties officeooo:paragraph-rsid="00ab6fa9"/>
    </style:style>
    <style:style style:name="P77" style:family="paragraph" style:parent-style-name="Text_20_body">
      <style:paragraph-properties fo:margin-left="0.4925in" fo:margin-right="0in" fo:text-indent="0in" style:auto-text-indent="false"/>
      <style:text-properties officeooo:paragraph-rsid="00c1f9fd"/>
    </style:style>
    <style:style style:name="P78" style:family="paragraph" style:parent-style-name="Text_20_body">
      <style:paragraph-properties fo:margin-left="0.4925in" fo:margin-right="0in" fo:text-indent="0in" style:auto-text-indent="false"/>
      <style:text-properties officeooo:paragraph-rsid="00c561db"/>
    </style:style>
    <style:style style:name="P79" style:family="paragraph" style:parent-style-name="Text_20_body">
      <style:paragraph-properties fo:margin-left="0.4925in" fo:margin-right="0in" fo:text-indent="0in" style:auto-text-indent="false"/>
      <style:text-properties officeooo:rsid="0083723e" officeooo:paragraph-rsid="0083723e"/>
    </style:style>
    <style:style style:name="P80" style:family="paragraph" style:parent-style-name="Text_20_body">
      <style:paragraph-properties fo:margin-left="0.4925in" fo:margin-right="0in" fo:text-indent="0in" style:auto-text-indent="false"/>
      <style:text-properties officeooo:rsid="003ae6ef" officeooo:paragraph-rsid="003ae6ef"/>
    </style:style>
    <style:style style:name="P81" style:family="paragraph" style:parent-style-name="Text_20_body">
      <style:paragraph-properties fo:margin-left="0.4925in" fo:margin-right="0in" fo:text-indent="0in" style:auto-text-indent="false"/>
      <style:text-properties officeooo:rsid="00eb3af6" officeooo:paragraph-rsid="00eb3af6"/>
    </style:style>
    <style:style style:name="P82" style:family="paragraph" style:parent-style-name="Text_20_body">
      <style:paragraph-properties fo:margin-left="0.4925in" fo:margin-right="0in" fo:text-indent="0in" style:auto-text-indent="false"/>
      <style:text-properties officeooo:rsid="00f5ac7f" officeooo:paragraph-rsid="00f792ad"/>
    </style:style>
    <style:style style:name="P83" style:family="paragraph" style:parent-style-name="Text_20_body">
      <style:paragraph-properties fo:margin-left="0.4925in" fo:margin-right="0in" fo:text-indent="0in" style:auto-text-indent="false"/>
      <style:text-properties officeooo:rsid="00f5ac7f" officeooo:paragraph-rsid="00f5ac7f"/>
    </style:style>
    <style:style style:name="P84" style:family="paragraph" style:parent-style-name="Text_20_body">
      <style:paragraph-properties fo:margin-left="0.4925in" fo:margin-right="0in" fo:text-indent="0in" style:auto-text-indent="false"/>
      <style:text-properties officeooo:rsid="00f792ad" officeooo:paragraph-rsid="00f792ad"/>
    </style:style>
    <style:style style:name="P85" style:family="paragraph" style:parent-style-name="Text_20_body">
      <style:paragraph-properties fo:margin-left="0.4925in" fo:margin-right="0in" fo:text-indent="0in" style:auto-text-indent="false"/>
      <style:text-properties officeooo:paragraph-rsid="0045cf64"/>
    </style:style>
    <style:style style:name="P86" style:family="paragraph" style:parent-style-name="Text_20_body">
      <style:paragraph-properties fo:margin-left="0.4925in" fo:margin-right="0in" fo:text-indent="0in" style:auto-text-indent="false"/>
      <style:text-properties officeooo:rsid="0107ca75" officeooo:paragraph-rsid="0107ca75"/>
    </style:style>
    <style:style style:name="P87" style:family="paragraph" style:parent-style-name="Text_20_body">
      <style:paragraph-properties fo:margin-left="0.9846in" fo:margin-right="0in" fo:text-indent="0in" style:auto-text-indent="false"/>
      <style:text-properties officeooo:rsid="00303cac" officeooo:paragraph-rsid="00303cac"/>
    </style:style>
    <style:style style:name="P88"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89"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90"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91"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92"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93" style:family="paragraph" style:parent-style-name="Text_20_body">
      <style:paragraph-properties fo:margin-left="0.9846in" fo:margin-right="0in" fo:text-indent="0in" style:auto-text-indent="false"/>
      <style:text-properties officeooo:rsid="0060e2c2" officeooo:paragraph-rsid="0060e2c2"/>
    </style:style>
    <style:style style:name="P94"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95" style:family="paragraph" style:parent-style-name="Text_20_body">
      <style:paragraph-properties fo:margin-left="0.9846in" fo:margin-right="0in" fo:text-indent="0in" style:auto-text-indent="false"/>
      <style:text-properties officeooo:rsid="008b6fed" officeooo:paragraph-rsid="008b6fed"/>
    </style:style>
    <style:style style:name="P96" style:family="paragraph" style:parent-style-name="Text_20_body">
      <style:paragraph-properties fo:margin-left="0.9846in" fo:margin-right="0in" fo:text-indent="0in" style:auto-text-indent="false"/>
      <style:text-properties officeooo:rsid="0107ca75" officeooo:paragraph-rsid="0107ca75"/>
    </style:style>
    <style:style style:name="P97" style:family="paragraph" style:parent-style-name="Text_20_body">
      <style:paragraph-properties fo:margin-left="0in" fo:margin-right="0in" fo:text-indent="0in" style:auto-text-indent="false"/>
      <style:text-properties officeooo:rsid="0034ee78" officeooo:paragraph-rsid="0034ee78"/>
    </style:style>
    <style:style style:name="P98" style:family="paragraph" style:parent-style-name="Text_20_body">
      <style:paragraph-properties fo:margin-left="0in" fo:margin-right="0in" fo:text-indent="0in" style:auto-text-indent="false"/>
      <style:text-properties officeooo:rsid="004142be" officeooo:paragraph-rsid="0045cf64"/>
    </style:style>
    <style:style style:name="P99"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100"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101" style:family="paragraph" style:parent-style-name="Text_20_body">
      <style:paragraph-properties fo:margin-left="0in" fo:margin-right="0in" fo:text-indent="0in" style:auto-text-indent="false"/>
      <style:text-properties officeooo:rsid="0068a657" officeooo:paragraph-rsid="0068a657"/>
    </style:style>
    <style:style style:name="P102"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103" style:family="paragraph" style:parent-style-name="Text_20_body">
      <style:paragraph-properties fo:margin-left="0in" fo:margin-right="0in" fo:text-indent="0in" style:auto-text-indent="false"/>
      <style:text-properties officeooo:rsid="008b6fed" officeooo:paragraph-rsid="008b6fed"/>
    </style:style>
    <style:style style:name="P104"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105" style:family="paragraph" style:parent-style-name="Text_20_body">
      <style:paragraph-properties fo:margin-left="0in" fo:margin-right="0in" fo:text-indent="0in" style:auto-text-indent="false"/>
      <style:text-properties officeooo:rsid="0083723e" officeooo:paragraph-rsid="0083723e"/>
    </style:style>
    <style:style style:name="P106" style:family="paragraph" style:parent-style-name="Text_20_body">
      <style:paragraph-properties fo:margin-left="0in" fo:margin-right="0in" fo:text-indent="0in" style:auto-text-indent="false"/>
      <style:text-properties officeooo:paragraph-rsid="00cfaff1"/>
    </style:style>
    <style:style style:name="P107" style:family="paragraph" style:parent-style-name="Text_20_body">
      <style:paragraph-properties fo:margin-left="0in" fo:margin-right="0in" fo:text-indent="0in" style:auto-text-indent="false"/>
      <style:text-properties officeooo:rsid="00f5ac7f" officeooo:paragraph-rsid="00f792ad"/>
    </style:style>
    <style:style style:name="P108" style:family="paragraph" style:parent-style-name="Text_20_body">
      <style:paragraph-properties fo:margin-left="0in" fo:margin-right="0in" fo:text-indent="0in" style:auto-text-indent="false"/>
      <style:text-properties officeooo:paragraph-rsid="00f792ad"/>
    </style:style>
    <style:style style:name="P109" style:family="paragraph" style:parent-style-name="Text_20_body">
      <style:paragraph-properties fo:margin-left="0in" fo:margin-right="0in" fo:text-indent="0in" style:auto-text-indent="false"/>
      <style:text-properties officeooo:rsid="00fa266b" officeooo:paragraph-rsid="00fa266b"/>
    </style:style>
    <style:style style:name="P110" style:family="paragraph" style:parent-style-name="Text_20_body">
      <style:paragraph-properties fo:margin-left="0in" fo:margin-right="0in" fo:text-indent="0in" style:auto-text-indent="false"/>
      <style:text-properties officeooo:paragraph-rsid="010d6fab"/>
    </style:style>
    <style:style style:name="P111"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112"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113"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114"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115"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116"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117"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118"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19" style:family="paragraph" style:parent-style-name="Text_20_body">
      <style:paragraph-properties fo:margin-left="1.4772in" fo:margin-right="0in" fo:text-indent="0in" style:auto-text-indent="false"/>
      <style:text-properties officeooo:rsid="008b6fed" officeooo:paragraph-rsid="008b6fed"/>
    </style:style>
    <style:style style:name="P120" style:family="paragraph" style:parent-style-name="Text_20_body">
      <style:paragraph-properties fo:margin-left="1.4772in" fo:margin-right="0in" fo:text-indent="0in" style:auto-text-indent="false"/>
      <style:text-properties officeooo:rsid="0107ca75" officeooo:paragraph-rsid="0107ca75"/>
    </style:style>
    <style:style style:name="P121"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22"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23"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24" style:family="paragraph" style:parent-style-name="Subtitle">
      <style:paragraph-properties fo:text-align="start" style:justify-single-word="false"/>
      <style:text-properties officeooo:rsid="0006243a" officeooo:paragraph-rsid="0006243a"/>
    </style:style>
    <style:style style:name="P125" style:family="paragraph" style:parent-style-name="Table_20_Contents">
      <style:text-properties officeooo:rsid="004c85fe" officeooo:paragraph-rsid="004c85fe"/>
    </style:style>
    <style:style style:name="P126" style:family="paragraph" style:parent-style-name="Table_20_Contents">
      <style:text-properties officeooo:rsid="004d180e" officeooo:paragraph-rsid="004d180e"/>
    </style:style>
    <style:style style:name="P127" style:family="paragraph" style:parent-style-name="Table_20_Contents">
      <style:text-properties officeooo:rsid="004df5b9" officeooo:paragraph-rsid="004df5b9"/>
    </style:style>
    <style:style style:name="P128" style:family="paragraph" style:parent-style-name="Table_20_Contents">
      <style:text-properties officeooo:rsid="004fd811" officeooo:paragraph-rsid="004fd811"/>
    </style:style>
    <style:style style:name="P129" style:family="paragraph" style:parent-style-name="Table_20_Contents">
      <style:text-properties officeooo:rsid="00743ec0" officeooo:paragraph-rsid="00743ec0"/>
    </style:style>
    <style:style style:name="P130" style:family="paragraph" style:parent-style-name="Table_20_Contents">
      <style:text-properties officeooo:rsid="0096c97e" officeooo:paragraph-rsid="0096c97e"/>
    </style:style>
    <style:style style:name="P131" style:family="paragraph" style:parent-style-name="Table_20_Contents">
      <style:text-properties officeooo:rsid="0098506f" officeooo:paragraph-rsid="0098506f"/>
    </style:style>
    <style:style style:name="P132" style:family="paragraph" style:parent-style-name="Table_20_Contents">
      <style:text-properties officeooo:rsid="009aeccb" officeooo:paragraph-rsid="009aeccb"/>
    </style:style>
    <style:style style:name="P133" style:family="paragraph" style:parent-style-name="Table_20_Contents">
      <style:text-properties officeooo:rsid="009e02b3" officeooo:paragraph-rsid="009e02b3"/>
    </style:style>
    <style:style style:name="P134" style:family="paragraph" style:parent-style-name="Table_20_Contents">
      <style:text-properties officeooo:rsid="00a2205e" officeooo:paragraph-rsid="00a2205e"/>
    </style:style>
    <style:style style:name="P135" style:family="paragraph" style:parent-style-name="Table_20_Contents">
      <style:text-properties officeooo:rsid="00a26629" officeooo:paragraph-rsid="00a26629"/>
    </style:style>
    <style:style style:name="P136" style:family="paragraph" style:parent-style-name="Table_20_Contents">
      <style:text-properties officeooo:rsid="00a43d20" officeooo:paragraph-rsid="00a43d20"/>
    </style:style>
    <style:style style:name="P137" style:family="paragraph" style:parent-style-name="Table_20_Contents">
      <style:text-properties officeooo:rsid="00a579fc" officeooo:paragraph-rsid="00a579fc"/>
    </style:style>
    <style:style style:name="P138" style:family="paragraph" style:parent-style-name="Table_20_Contents">
      <style:text-properties officeooo:rsid="00a8c3e6" officeooo:paragraph-rsid="00a8c3e6"/>
    </style:style>
    <style:style style:name="P139" style:family="paragraph" style:parent-style-name="Table_20_Contents">
      <style:text-properties officeooo:rsid="00a9421a" officeooo:paragraph-rsid="00a9421a"/>
    </style:style>
    <style:style style:name="P140" style:family="paragraph" style:parent-style-name="Table_20_Contents">
      <style:text-properties officeooo:rsid="00d45834" officeooo:paragraph-rsid="00d45834"/>
    </style:style>
    <style:style style:name="P141" style:family="paragraph" style:parent-style-name="Table_20_Contents">
      <style:text-properties officeooo:paragraph-rsid="00d45834"/>
    </style:style>
    <style:style style:name="P142" style:family="paragraph" style:parent-style-name="Table_20_Contents">
      <style:text-properties officeooo:rsid="00d796ec" officeooo:paragraph-rsid="00d796ec"/>
    </style:style>
    <style:style style:name="P143" style:family="paragraph" style:parent-style-name="Table_20_Contents">
      <style:text-properties officeooo:rsid="00d796ec" officeooo:paragraph-rsid="00d8650e"/>
    </style:style>
    <style:style style:name="P144" style:family="paragraph" style:parent-style-name="Table_20_Contents">
      <style:text-properties officeooo:paragraph-rsid="00d8650e"/>
    </style:style>
    <style:style style:name="P145" style:family="paragraph" style:parent-style-name="Table_20_Contents">
      <style:text-properties officeooo:rsid="00e04ce4" officeooo:paragraph-rsid="00e04ce4"/>
    </style:style>
    <style:style style:name="P146" style:family="paragraph" style:parent-style-name="Table_20_Contents">
      <style:text-properties officeooo:rsid="00f20fc4" officeooo:paragraph-rsid="00f20fc4"/>
    </style:style>
    <style:style style:name="P147" style:family="paragraph" style:parent-style-name="Table_20_Contents">
      <style:text-properties officeooo:rsid="00f3b0d8" officeooo:paragraph-rsid="00f3b0d8"/>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12b9578" officeooo:paragraph-rsid="012b9578"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2b9578" officeooo:paragraph-rsid="012b957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5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5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5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55"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Contents_20_3">
      <style:paragraph-properties>
        <style:tab-stops>
          <style:tab-stop style:position="6.5319in" style:type="right" style:leader-style="dotted" style:leader-text="."/>
        </style:tab-stops>
      </style:paragraph-properties>
    </style:style>
    <style:style style:name="P158" style:family="paragraph" style:parent-style-name="Contents_20_4">
      <style:paragraph-properties>
        <style:tab-stops>
          <style:tab-stop style:position="6.3354in" style:type="right" style:leader-style="dotted" style:leader-text="."/>
        </style:tab-stops>
      </style:paragraph-properties>
    </style:style>
    <style:style style:name="P159" style:family="paragraph" style:parent-style-name="Title" style:master-page-name="First_20_Page">
      <style:paragraph-properties fo:text-align="start" style:justify-single-word="false" style:page-number="auto"/>
    </style:style>
    <style:style style:name="P160" style:family="paragraph" style:parent-style-name="Heading_20_2">
      <style:text-properties officeooo:paragraph-rsid="00099e08"/>
    </style:style>
    <style:style style:name="P161" style:family="paragraph" style:parent-style-name="Heading_20_2">
      <style:text-properties officeooo:rsid="003ae6ef" officeooo:paragraph-rsid="003ae6ef"/>
    </style:style>
    <style:style style:name="P162" style:family="paragraph" style:parent-style-name="Heading_20_2">
      <style:text-properties officeooo:rsid="003bbddc" officeooo:paragraph-rsid="003bbddc"/>
    </style:style>
    <style:style style:name="P163" style:family="paragraph" style:parent-style-name="Heading_20_2">
      <style:text-properties officeooo:rsid="00081ff8" officeooo:paragraph-rsid="00099e08"/>
    </style:style>
    <style:style style:name="P164" style:family="paragraph" style:parent-style-name="Heading_20_2">
      <style:text-properties officeooo:rsid="00081ff8" officeooo:paragraph-rsid="00407f7b"/>
    </style:style>
    <style:style style:name="P165" style:family="paragraph" style:parent-style-name="Heading_20_2" style:list-style-name="">
      <style:text-properties officeooo:paragraph-rsid="00d8650e"/>
    </style:style>
    <style:style style:name="P166" style:family="paragraph" style:parent-style-name="Heading_20_2" style:list-style-name="">
      <style:text-properties officeooo:rsid="004142be" officeooo:paragraph-rsid="0045cf64"/>
    </style:style>
    <style:style style:name="P167" style:family="paragraph" style:parent-style-name="Heading_20_2" style:list-style-name="">
      <style:text-properties officeooo:rsid="000a7aef" officeooo:paragraph-rsid="000a7aef"/>
    </style:style>
    <style:style style:name="P168" style:family="paragraph" style:parent-style-name="Heading_20_2">
      <style:text-properties officeooo:rsid="00f5ac7f" officeooo:paragraph-rsid="00f5ac7f"/>
    </style:style>
    <style:style style:name="P169" style:family="paragraph" style:parent-style-name="Heading_20_2">
      <style:text-properties officeooo:rsid="011733c7" officeooo:paragraph-rsid="011733c7"/>
    </style:style>
    <style:style style:name="P170" style:family="paragraph" style:parent-style-name="Heading_20_2">
      <style:text-properties officeooo:paragraph-rsid="00d8650e"/>
    </style:style>
    <style:style style:name="P171" style:family="paragraph" style:parent-style-name="Heading_20_2" style:list-style-name="">
      <style:text-properties officeooo:rsid="00745285" officeooo:paragraph-rsid="00745285"/>
    </style:style>
    <style:style style:name="P172" style:family="paragraph" style:parent-style-name="Heading_20_2">
      <style:text-properties officeooo:rsid="00cf3228" officeooo:paragraph-rsid="00cf3228"/>
    </style:style>
    <style:style style:name="P173" style:family="paragraph" style:parent-style-name="Heading_20_2">
      <style:text-properties officeooo:rsid="011cc60f" officeooo:paragraph-rsid="011cc60f"/>
    </style:style>
    <style:style style:name="P174" style:family="paragraph" style:parent-style-name="Heading_20_2">
      <style:text-properties officeooo:rsid="0121b526"/>
    </style:style>
    <style:style style:name="P175" style:family="paragraph" style:parent-style-name="Heading_20_2">
      <style:paragraph-properties fo:break-before="page"/>
      <style:text-properties officeooo:rsid="0034ee78" officeooo:paragraph-rsid="0034ee78"/>
    </style:style>
    <style:style style:name="P176" style:family="paragraph" style:parent-style-name="Heading_20_2">
      <style:paragraph-properties fo:break-before="page"/>
      <style:text-properties officeooo:rsid="004142be" officeooo:paragraph-rsid="0045cf64"/>
    </style:style>
    <style:style style:name="P177" style:family="paragraph" style:parent-style-name="Heading_20_2">
      <style:paragraph-properties fo:break-before="page"/>
      <style:text-properties officeooo:rsid="000a7aef" officeooo:paragraph-rsid="000a7aef"/>
    </style:style>
    <style:style style:name="P178" style:family="paragraph" style:parent-style-name="Heading_20_2">
      <style:paragraph-properties fo:break-before="page"/>
      <style:text-properties officeooo:paragraph-rsid="00d8650e"/>
    </style:style>
    <style:style style:name="P179" style:family="paragraph" style:parent-style-name="Heading_20_2">
      <style:paragraph-properties fo:break-before="page"/>
      <style:text-properties officeooo:rsid="00c18e70" officeooo:paragraph-rsid="00c18e70"/>
    </style:style>
    <style:style style:name="P180" style:family="paragraph" style:parent-style-name="Heading_20_2">
      <style:paragraph-properties fo:break-before="page"/>
      <style:text-properties officeooo:rsid="00745285" officeooo:paragraph-rsid="00745285"/>
    </style:style>
    <style:style style:name="P181" style:family="paragraph" style:parent-style-name="Heading_20_2">
      <style:paragraph-properties fo:break-before="page"/>
      <style:text-properties officeooo:rsid="00a9c690" officeooo:paragraph-rsid="00a9c690"/>
    </style:style>
    <style:style style:name="P182" style:family="paragraph" style:parent-style-name="Heading_20_2">
      <style:paragraph-properties fo:break-before="page"/>
      <style:text-properties officeooo:rsid="010352e6" officeooo:paragraph-rsid="01034031"/>
    </style:style>
    <style:style style:name="P183" style:family="paragraph" style:parent-style-name="Heading_20_3">
      <style:text-properties officeooo:rsid="001227db" officeooo:paragraph-rsid="001227db"/>
    </style:style>
    <style:style style:name="P184" style:family="paragraph" style:parent-style-name="Heading_20_3" style:list-style-name=""/>
    <style:style style:name="P185" style:family="paragraph" style:parent-style-name="Heading_20_3" style:list-style-name="">
      <style:text-properties officeooo:rsid="006c6a19" officeooo:paragraph-rsid="006c6a19"/>
    </style:style>
    <style:style style:name="P186" style:family="paragraph" style:parent-style-name="Heading_20_3">
      <style:text-properties officeooo:rsid="00799fed"/>
    </style:style>
    <style:style style:name="P187" style:family="paragraph" style:parent-style-name="Heading_20_3">
      <style:text-properties officeooo:rsid="00799fed" officeooo:paragraph-rsid="00799fed"/>
    </style:style>
    <style:style style:name="P188" style:family="paragraph" style:parent-style-name="Heading_20_3">
      <style:text-properties officeooo:paragraph-rsid="00756402"/>
    </style:style>
    <style:style style:name="P189" style:family="paragraph" style:parent-style-name="Heading_20_3">
      <style:text-properties officeooo:rsid="0083723e" officeooo:paragraph-rsid="0083723e"/>
    </style:style>
    <style:style style:name="P190" style:family="paragraph" style:parent-style-name="Heading_20_3">
      <style:text-properties officeooo:rsid="0083723e" officeooo:paragraph-rsid="00c9ff6a"/>
    </style:style>
    <style:style style:name="P191" style:family="paragraph" style:parent-style-name="Heading_20_3">
      <style:text-properties officeooo:rsid="00855711" officeooo:paragraph-rsid="00855711"/>
    </style:style>
    <style:style style:name="P192" style:family="paragraph" style:parent-style-name="Heading_20_3">
      <style:text-properties officeooo:rsid="008981ec" officeooo:paragraph-rsid="008981ec"/>
    </style:style>
    <style:style style:name="P193" style:family="paragraph" style:parent-style-name="Heading_20_3">
      <style:text-properties officeooo:rsid="008d1afc" officeooo:paragraph-rsid="008d1afc"/>
    </style:style>
    <style:style style:name="P194" style:family="paragraph" style:parent-style-name="Heading_20_3">
      <style:text-properties officeooo:rsid="0106c5d7" officeooo:paragraph-rsid="0107ca75"/>
    </style:style>
    <style:style style:name="P195" style:family="paragraph" style:parent-style-name="Heading_20_3">
      <style:text-properties officeooo:rsid="00a9c690" officeooo:paragraph-rsid="00a9c690"/>
    </style:style>
    <style:style style:name="P196" style:family="paragraph" style:parent-style-name="Heading_20_3">
      <style:text-properties officeooo:rsid="00ab6fa9" officeooo:paragraph-rsid="00ab6fa9"/>
    </style:style>
    <style:style style:name="P197" style:family="paragraph" style:parent-style-name="Heading_20_3">
      <style:text-properties officeooo:rsid="00cf3228"/>
    </style:style>
    <style:style style:name="P198" style:family="paragraph" style:parent-style-name="Heading_20_3">
      <style:text-properties officeooo:rsid="00d62498"/>
    </style:style>
    <style:style style:name="P199" style:family="paragraph" style:parent-style-name="Heading_20_3">
      <style:text-properties officeooo:rsid="00d45834"/>
    </style:style>
    <style:style style:name="P200" style:family="paragraph" style:parent-style-name="Heading_20_3">
      <style:text-properties officeooo:paragraph-rsid="01034031"/>
    </style:style>
    <style:style style:name="P201" style:family="paragraph" style:parent-style-name="Heading_20_3">
      <style:text-properties officeooo:rsid="010d975b" officeooo:paragraph-rsid="01034031"/>
    </style:style>
    <style:style style:name="P202" style:family="paragraph" style:parent-style-name="Heading_20_3">
      <style:text-properties officeooo:rsid="01053274" officeooo:paragraph-rsid="01034031"/>
    </style:style>
    <style:style style:name="P203" style:family="paragraph" style:parent-style-name="Heading_20_3">
      <style:text-properties officeooo:rsid="010861ce" officeooo:paragraph-rsid="01034031"/>
    </style:style>
    <style:style style:name="P204" style:family="paragraph" style:parent-style-name="Heading_20_3">
      <style:text-properties officeooo:rsid="010a22ce" officeooo:paragraph-rsid="01034031"/>
    </style:style>
    <style:style style:name="P205" style:family="paragraph" style:parent-style-name="Heading_20_3">
      <style:text-properties officeooo:rsid="011de5ca" officeooo:paragraph-rsid="011de5ca"/>
    </style:style>
    <style:style style:name="P206" style:family="paragraph" style:parent-style-name="Heading_20_3">
      <style:text-properties officeooo:rsid="011e3c87" officeooo:paragraph-rsid="011e3c87"/>
    </style:style>
    <style:style style:name="P207" style:family="paragraph" style:parent-style-name="Heading_20_3">
      <style:text-properties style:text-line-through-style="none" style:text-line-through-type="none" officeooo:rsid="012b9196"/>
    </style:style>
    <style:style style:name="P208" style:family="paragraph" style:parent-style-name="Heading_20_3">
      <style:text-properties style:text-line-through-style="none" style:text-line-through-type="none" officeooo:rsid="012c9423"/>
    </style:style>
    <style:style style:name="P209" style:family="paragraph" style:parent-style-name="Heading_20_3">
      <style:paragraph-properties fo:break-before="page"/>
    </style:style>
    <style:style style:name="P210" style:family="paragraph" style:parent-style-name="Heading_20_3">
      <style:paragraph-properties fo:break-before="page"/>
      <style:text-properties officeooo:rsid="0055c0fb"/>
    </style:style>
    <style:style style:name="P211" style:family="paragraph" style:parent-style-name="Heading_20_4">
      <style:text-properties officeooo:rsid="00271556" officeooo:paragraph-rsid="00271556"/>
    </style:style>
    <style:style style:name="P212" style:family="paragraph" style:parent-style-name="Heading_20_4">
      <style:text-properties officeooo:rsid="00303cac" officeooo:paragraph-rsid="00303cac"/>
    </style:style>
    <style:style style:name="P213" style:family="paragraph" style:parent-style-name="Heading_20_4">
      <style:text-properties officeooo:rsid="0029204a" officeooo:paragraph-rsid="00331c06"/>
    </style:style>
    <style:style style:name="P214" style:family="paragraph" style:parent-style-name="Text_20_body" style:list-style-name="L1">
      <style:text-properties officeooo:paragraph-rsid="00e87709"/>
    </style:style>
    <style:style style:name="P215" style:family="paragraph" style:parent-style-name="Text_20_body" style:list-style-name="L1">
      <style:text-properties officeooo:rsid="00e87709" officeooo:paragraph-rsid="00e87709"/>
    </style:style>
    <style:style style:name="P216" style:family="paragraph" style:parent-style-name="Text_20_body" style:list-style-name="L1">
      <style:text-properties officeooo:rsid="0034ee78" officeooo:paragraph-rsid="00e87709"/>
    </style:style>
    <style:style style:name="P217" style:family="paragraph" style:parent-style-name="Text_20_body" style:list-style-name="L2">
      <style:text-properties officeooo:rsid="0017a831" officeooo:paragraph-rsid="001941a9"/>
    </style:style>
    <style:style style:name="P218" style:family="paragraph" style:parent-style-name="Text_20_body" style:list-style-name="L2">
      <style:text-properties officeooo:rsid="001941a9" officeooo:paragraph-rsid="001941a9"/>
    </style:style>
    <style:style style:name="P219" style:family="paragraph" style:parent-style-name="Text_20_body" style:list-style-name="L3">
      <style:text-properties officeooo:paragraph-rsid="00b133a5"/>
    </style:style>
    <style:style style:name="P220" style:family="paragraph" style:parent-style-name="Text_20_body" style:list-style-name="L3">
      <style:text-properties officeooo:rsid="00b133a5" officeooo:paragraph-rsid="00b133a5"/>
    </style:style>
    <style:style style:name="P221" style:family="paragraph" style:parent-style-name="Text_20_body" style:list-style-name="L4">
      <style:text-properties style:text-line-through-style="none" style:text-line-through-type="none" officeooo:rsid="00b67533" officeooo:paragraph-rsid="00b999cc"/>
    </style:style>
    <style:style style:name="P222" style:family="paragraph" style:parent-style-name="Text_20_body" style:list-style-name="L5">
      <style:text-properties style:text-line-through-style="none" style:text-line-through-type="none" officeooo:rsid="00b7b2be" officeooo:paragraph-rsid="00b999cc"/>
    </style:style>
    <style:style style:name="P223" style:family="paragraph" style:parent-style-name="Text_20_body">
      <style:text-properties style:text-line-through-style="none" style:text-line-through-type="none" officeooo:rsid="012c9423"/>
    </style:style>
    <style:style style:name="P224" style:family="paragraph" style:parent-style-name="Text_20_body">
      <style:text-properties style:text-line-through-style="none" style:text-line-through-type="none" officeooo:rsid="012c9423" officeooo:paragraph-rsid="012c9423"/>
    </style:style>
    <style:style style:name="P225" style:family="paragraph" style:parent-style-name="Text_20_body" style:list-style-name="L5">
      <style:text-properties officeooo:paragraph-rsid="00b999cc"/>
    </style:style>
    <style:style style:name="P226" style:family="paragraph" style:parent-style-name="Text_20_body" style:list-style-name="L6">
      <style:text-properties officeooo:paragraph-rsid="00bb075f"/>
    </style:style>
    <style:style style:name="P227" style:family="paragraph" style:parent-style-name="Text_20_body" style:list-style-name="L6">
      <style:text-properties officeooo:rsid="00bb075f" officeooo:paragraph-rsid="00bd05ee"/>
    </style:style>
    <style:style style:name="P228" style:family="paragraph" style:parent-style-name="Text_20_body" style:list-style-name="L9">
      <style:text-properties officeooo:rsid="00e3f7f7" officeooo:paragraph-rsid="00e3f7f7"/>
    </style:style>
    <style:style style:name="P229"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230"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231"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232"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233" style:family="paragraph" style:parent-style-name="Text_20_body">
      <style:paragraph-properties fo:margin-left="1.9693in" fo:margin-right="0in" fo:text-indent="0in" style:auto-text-indent="false"/>
      <style:text-properties style:font-name="Liberation Serif" officeooo:rsid="0021975e" officeooo:paragraph-rsid="013c427c"/>
    </style:style>
    <style:style style:name="P234"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style:style>
    <style:style style:name="T13" style:family="text">
      <style:text-properties style:font-name="Liberation Serif" officeooo:rsid="002a8c7a"/>
    </style:style>
    <style:style style:name="T14" style:family="text">
      <style:text-properties style:font-name="Liberation Serif" officeooo:rsid="002d3b83"/>
    </style:style>
    <style:style style:name="T15" style:family="text">
      <style:text-properties style:font-name="Liberation Serif" fo:font-size="12pt" style:font-size-asian="10.5pt" style:font-size-complex="12pt"/>
    </style:style>
    <style:style style:name="T16" style:family="text">
      <style:text-properties style:font-name="Liberation Serif" fo:font-size="12pt" officeooo:rsid="008981ec" style:font-size-asian="10.5pt" style:font-size-complex="12pt"/>
    </style:style>
    <style:style style:name="T17" style:family="text">
      <style:text-properties style:font-name="Liberation Serif" officeooo:rsid="012c9423"/>
    </style:style>
    <style:style style:name="T18" style:family="text">
      <style:text-properties style:font-name="Liberation Serif" officeooo:rsid="01312049"/>
    </style:style>
    <style:style style:name="T19" style:family="text">
      <style:text-properties style:font-name="Liberation Serif" officeooo:rsid="0131ea5b"/>
    </style:style>
    <style:style style:name="T20" style:family="text">
      <style:text-properties style:font-name="Liberation Serif" officeooo:rsid="0133c8e3"/>
    </style:style>
    <style:style style:name="T21" style:family="text">
      <style:text-properties officeooo:rsid="0038026f"/>
    </style:style>
    <style:style style:name="T22" style:family="text">
      <style:text-properties officeooo:rsid="00388f7e"/>
    </style:style>
    <style:style style:name="T23" style:family="text">
      <style:text-properties officeooo:rsid="0038ca6d"/>
    </style:style>
    <style:style style:name="T24" style:family="text">
      <style:text-properties officeooo:rsid="003c93d2"/>
    </style:style>
    <style:style style:name="T25" style:family="text">
      <style:text-properties officeooo:rsid="003df9fe"/>
    </style:style>
    <style:style style:name="T26" style:family="text">
      <style:text-properties officeooo:rsid="003e9dce"/>
    </style:style>
    <style:style style:name="T27" style:family="text">
      <style:text-properties officeooo:rsid="00427cb4"/>
    </style:style>
    <style:style style:name="T28" style:family="text">
      <style:text-properties officeooo:rsid="00434882"/>
    </style:style>
    <style:style style:name="T29" style:family="text">
      <style:text-properties officeooo:rsid="00449974"/>
    </style:style>
    <style:style style:name="T30" style:family="text">
      <style:text-properties officeooo:rsid="004af5c5"/>
    </style:style>
    <style:style style:name="T31" style:family="text">
      <style:text-properties officeooo:rsid="004c85fe"/>
    </style:style>
    <style:style style:name="T32" style:family="text">
      <style:text-properties officeooo:rsid="004d180e"/>
    </style:style>
    <style:style style:name="T33" style:family="text">
      <style:text-properties officeooo:rsid="004df5b9"/>
    </style:style>
    <style:style style:name="T34" style:family="text">
      <style:text-properties officeooo:rsid="004fd811"/>
    </style:style>
    <style:style style:name="T35" style:family="text">
      <style:text-properties officeooo:rsid="0051b1c8"/>
    </style:style>
    <style:style style:name="T36" style:family="text">
      <style:text-properties officeooo:rsid="0051db38"/>
    </style:style>
    <style:style style:name="T37" style:family="text">
      <style:text-properties officeooo:rsid="0054fcc8"/>
    </style:style>
    <style:style style:name="T38" style:family="text">
      <style:text-properties officeooo:rsid="0055c0fb"/>
    </style:style>
    <style:style style:name="T39" style:family="text">
      <style:text-properties officeooo:rsid="00569874"/>
    </style:style>
    <style:style style:name="T40" style:family="text">
      <style:text-properties officeooo:rsid="0056d0fe"/>
    </style:style>
    <style:style style:name="T41" style:family="text">
      <style:text-properties officeooo:rsid="005be705"/>
    </style:style>
    <style:style style:name="T42" style:family="text">
      <style:text-properties officeooo:rsid="005c2ab2"/>
    </style:style>
    <style:style style:name="T43" style:family="text">
      <style:text-properties officeooo:rsid="005e3184"/>
    </style:style>
    <style:style style:name="T44" style:family="text">
      <style:text-properties officeooo:rsid="00603ee3"/>
    </style:style>
    <style:style style:name="T45" style:family="text">
      <style:text-properties officeooo:rsid="0060e2c2"/>
    </style:style>
    <style:style style:name="T46" style:family="text">
      <style:text-properties officeooo:rsid="0061af26"/>
    </style:style>
    <style:style style:name="T47" style:family="text">
      <style:text-properties officeooo:rsid="00634407"/>
    </style:style>
    <style:style style:name="T48" style:family="text">
      <style:text-properties officeooo:rsid="0066bb0e"/>
    </style:style>
    <style:style style:name="T49" style:family="text">
      <style:text-properties officeooo:rsid="0069e514"/>
    </style:style>
    <style:style style:name="T50" style:family="text">
      <style:text-properties officeooo:rsid="006b45b6"/>
    </style:style>
    <style:style style:name="T51" style:family="text">
      <style:text-properties officeooo:rsid="006c6a19"/>
    </style:style>
    <style:style style:name="T52" style:family="text">
      <style:text-properties fo:font-weight="normal" officeooo:rsid="006c6a19" style:font-weight-asian="normal" style:font-weight-complex="normal"/>
    </style:style>
    <style:style style:name="T53" style:family="text">
      <style:text-properties officeooo:rsid="006f4920"/>
    </style:style>
    <style:style style:name="T54" style:family="text">
      <style:text-properties officeooo:rsid="006f6fdf"/>
    </style:style>
    <style:style style:name="T55" style:family="text">
      <style:text-properties officeooo:rsid="00700b4b"/>
    </style:style>
    <style:style style:name="T56" style:family="text">
      <style:text-properties officeooo:rsid="005b8496"/>
    </style:style>
    <style:style style:name="T57" style:family="text">
      <style:text-properties officeooo:rsid="00712972"/>
    </style:style>
    <style:style style:name="T58" style:family="text">
      <style:text-properties officeooo:rsid="0071e569"/>
    </style:style>
    <style:style style:name="T59" style:family="text">
      <style:text-properties officeooo:rsid="00756402"/>
    </style:style>
    <style:style style:name="T60" style:family="text">
      <style:text-properties officeooo:rsid="00799fed"/>
    </style:style>
    <style:style style:name="T61" style:family="text">
      <style:text-properties fo:font-size="10pt" style:font-size-asian="10pt" style:font-size-complex="10pt"/>
    </style:style>
    <style:style style:name="T62" style:family="text">
      <style:text-properties fo:font-size="10pt" officeooo:rsid="008981ec" style:font-size-asian="10pt" style:font-size-complex="10pt"/>
    </style:style>
    <style:style style:name="T63" style:family="text">
      <style:text-properties fo:font-size="10pt" officeooo:rsid="008e2f8f" style:font-size-asian="10pt" style:font-size-complex="10pt"/>
    </style:style>
    <style:style style:name="T64" style:family="text">
      <style:text-properties officeooo:rsid="008a9d89"/>
    </style:style>
    <style:style style:name="T65" style:family="text">
      <style:text-properties officeooo:rsid="008d1afc"/>
    </style:style>
    <style:style style:name="T66" style:family="text">
      <style:text-properties officeooo:rsid="008fc5df"/>
    </style:style>
    <style:style style:name="T67" style:family="text">
      <style:text-properties officeooo:rsid="008fe717"/>
    </style:style>
    <style:style style:name="T68" style:family="text">
      <style:text-properties officeooo:rsid="009260c3"/>
    </style:style>
    <style:style style:name="T69" style:family="text">
      <style:text-properties officeooo:rsid="009627e9"/>
    </style:style>
    <style:style style:name="T70" style:family="text">
      <style:text-properties officeooo:rsid="0096c97e"/>
    </style:style>
    <style:style style:name="T71" style:family="text">
      <style:text-properties officeooo:rsid="0098d4f6"/>
    </style:style>
    <style:style style:name="T72" style:family="text">
      <style:text-properties officeooo:rsid="00a9c690"/>
    </style:style>
    <style:style style:name="T73" style:family="text">
      <style:text-properties officeooo:rsid="00aa152f"/>
    </style:style>
    <style:style style:name="T74" style:family="text">
      <style:text-properties style:text-line-through-style="none" style:text-line-through-type="none"/>
    </style:style>
    <style:style style:name="T75" style:family="text">
      <style:text-properties style:text-line-through-style="none" style:text-line-through-type="none" officeooo:rsid="00aa152f"/>
    </style:style>
    <style:style style:name="T76" style:family="text">
      <style:text-properties style:text-line-through-style="none" style:text-line-through-type="none" officeooo:rsid="00addb07"/>
    </style:style>
    <style:style style:name="T77" style:family="text">
      <style:text-properties style:text-line-through-style="none" style:text-line-through-type="none" officeooo:rsid="00b169fc"/>
    </style:style>
    <style:style style:name="T78" style:family="text">
      <style:text-properties style:text-line-through-style="none" style:text-line-through-type="none" officeooo:rsid="00b67533"/>
    </style:style>
    <style:style style:name="T79" style:family="text">
      <style:text-properties style:text-line-through-style="none" style:text-line-through-type="none" officeooo:rsid="00b7b2be"/>
    </style:style>
    <style:style style:name="T80" style:family="text">
      <style:text-properties style:text-line-through-style="none" style:text-line-through-type="none" officeooo:rsid="00bfa837"/>
    </style:style>
    <style:style style:name="T81" style:family="text">
      <style:text-properties style:text-line-through-style="none" style:text-line-through-type="none" fo:font-style="normal" fo:font-weight="normal" style:font-style-asian="normal" style:font-weight-asian="normal" style:font-style-complex="normal" style:font-weight-complex="normal"/>
    </style:style>
    <style:style style:name="T82"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83"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84"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85"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6" style:family="text">
      <style:text-properties style:text-line-through-style="none" style:text-line-through-type="none" officeooo:rsid="010d6fab"/>
    </style:style>
    <style:style style:name="T87" style:family="text">
      <style:text-properties style:text-line-through-style="none" style:text-line-through-type="none" officeooo:rsid="010f43a7"/>
    </style:style>
    <style:style style:name="T88" style:family="text">
      <style:text-properties style:text-line-through-style="none" style:text-line-through-type="none" officeooo:rsid="0110423a"/>
    </style:style>
    <style:style style:name="T89" style:family="text">
      <style:text-properties style:text-line-through-style="none" style:text-line-through-type="none" officeooo:rsid="010cbab2"/>
    </style:style>
    <style:style style:name="T90" style:family="text">
      <style:text-properties style:text-line-through-style="none" style:text-line-through-type="none" officeooo:rsid="01110947"/>
    </style:style>
    <style:style style:name="T91" style:family="text">
      <style:text-properties style:text-line-through-style="none" style:text-line-through-type="none" officeooo:rsid="01119495"/>
    </style:style>
    <style:style style:name="T92" style:family="text">
      <style:text-properties style:text-line-through-style="none" style:text-line-through-type="none" officeooo:rsid="01137398"/>
    </style:style>
    <style:style style:name="T93" style:family="text">
      <style:text-properties style:text-line-through-style="none" style:text-line-through-type="none" officeooo:rsid="011733c7"/>
    </style:style>
    <style:style style:name="T94" style:family="text">
      <style:text-properties style:text-line-through-style="none" style:text-line-through-type="none" officeooo:rsid="0117fa58"/>
    </style:style>
    <style:style style:name="T95" style:family="text">
      <style:text-properties style:text-line-through-style="none" style:text-line-through-type="none" fo:font-weight="bold" officeooo:rsid="0117fa58" style:font-weight-asian="bold" style:font-weight-complex="bold"/>
    </style:style>
    <style:style style:name="T96" style:family="text">
      <style:text-properties style:text-line-through-style="none" style:text-line-through-type="none" officeooo:rsid="011945a7"/>
    </style:style>
    <style:style style:name="T97" style:family="text">
      <style:text-properties style:text-line-through-style="none" style:text-line-through-type="none" officeooo:rsid="011bdeea"/>
    </style:style>
    <style:style style:name="T98" style:family="text">
      <style:text-properties style:text-line-through-style="none" style:text-line-through-type="none" officeooo:rsid="01270be1"/>
    </style:style>
    <style:style style:name="T99" style:family="text">
      <style:text-properties style:text-line-through-style="none" style:text-line-through-type="none" officeooo:rsid="012ab241"/>
    </style:style>
    <style:style style:name="T100" style:family="text">
      <style:text-properties style:text-line-through-style="none" style:text-line-through-type="none" officeooo:rsid="012b9196"/>
    </style:style>
    <style:style style:name="T101" style:family="text">
      <style:text-properties style:text-line-through-style="none" style:text-line-through-type="none" officeooo:rsid="012c9423"/>
    </style:style>
    <style:style style:name="T102" style:family="text">
      <style:text-properties style:text-line-through-style="none" style:text-line-through-type="none" officeooo:rsid="0132a56b"/>
    </style:style>
    <style:style style:name="T103" style:family="text">
      <style:text-properties style:text-line-through-style="none" style:text-line-through-type="none" officeooo:rsid="0133c8e3"/>
    </style:style>
    <style:style style:name="T104" style:family="text">
      <style:text-properties style:text-line-through-style="none" style:text-line-through-type="none" officeooo:rsid="0137a097"/>
    </style:style>
    <style:style style:name="T105" style:family="text">
      <style:text-properties officeooo:rsid="00ab6fa9"/>
    </style:style>
    <style:style style:name="T106" style:family="text">
      <style:text-properties officeooo:rsid="00ac68f1"/>
    </style:style>
    <style:style style:name="T107" style:family="text">
      <style:text-properties officeooo:rsid="00ad7dbb"/>
    </style:style>
    <style:style style:name="T108" style:family="text">
      <style:text-properties officeooo:rsid="00addb07"/>
    </style:style>
    <style:style style:name="T109" style:family="text">
      <style:text-properties officeooo:rsid="00adedc7"/>
    </style:style>
    <style:style style:name="T110" style:family="text">
      <style:text-properties officeooo:rsid="00b09751"/>
    </style:style>
    <style:style style:name="T111" style:family="text">
      <style:text-properties officeooo:rsid="00b0b94e"/>
    </style:style>
    <style:style style:name="T112" style:family="text">
      <style:text-properties officeooo:rsid="00b133a5"/>
    </style:style>
    <style:style style:name="T113" style:family="text">
      <style:text-properties officeooo:rsid="00b48c82"/>
    </style:style>
    <style:style style:name="T114" style:family="text">
      <style:text-properties officeooo:rsid="00b7b2be"/>
    </style:style>
    <style:style style:name="T115" style:family="text">
      <style:text-properties officeooo:rsid="00b999cc"/>
    </style:style>
    <style:style style:name="T116" style:family="text">
      <style:text-properties officeooo:rsid="00ba5997"/>
    </style:style>
    <style:style style:name="T117" style:family="text">
      <style:text-properties officeooo:rsid="00bb075f"/>
    </style:style>
    <style:style style:name="T118" style:family="text">
      <style:text-properties officeooo:rsid="00bc585b"/>
    </style:style>
    <style:style style:name="T119" style:family="text">
      <style:text-properties officeooo:rsid="00bd05ee"/>
    </style:style>
    <style:style style:name="T120" style:family="text">
      <style:text-properties officeooo:rsid="00bea67a"/>
    </style:style>
    <style:style style:name="T121" style:family="text">
      <style:text-properties officeooo:rsid="00c16e52"/>
    </style:style>
    <style:style style:name="T122" style:family="text">
      <style:text-properties officeooo:rsid="00c18e70"/>
    </style:style>
    <style:style style:name="T123" style:family="text">
      <style:text-properties officeooo:rsid="00c1f9fd"/>
    </style:style>
    <style:style style:name="T124" style:family="text">
      <style:text-properties officeooo:rsid="0034ee78"/>
    </style:style>
    <style:style style:name="T125" style:family="text">
      <style:text-properties officeooo:rsid="00c3cf85"/>
    </style:style>
    <style:style style:name="T126" style:family="text">
      <style:text-properties style:text-position="super 58%"/>
    </style:style>
    <style:style style:name="T127" style:family="text">
      <style:text-properties style:text-position="super 58%" officeooo:rsid="00d46098"/>
    </style:style>
    <style:style style:name="T128" style:family="text">
      <style:text-properties officeooo:rsid="00c561db"/>
    </style:style>
    <style:style style:name="T129" style:family="text">
      <style:text-properties officeooo:rsid="00c7a8bf"/>
    </style:style>
    <style:style style:name="T130" style:family="text">
      <style:text-properties officeooo:rsid="00c99392"/>
    </style:style>
    <style:style style:name="T131" style:family="text">
      <style:text-properties officeooo:rsid="00c9ff6a"/>
    </style:style>
    <style:style style:name="T132" style:family="text">
      <style:text-properties officeooo:rsid="00cad0f2"/>
    </style:style>
    <style:style style:name="T133" style:family="text">
      <style:text-properties officeooo:rsid="00cb40c8"/>
    </style:style>
    <style:style style:name="T134" style:family="text">
      <style:text-properties officeooo:rsid="00cc9caf"/>
    </style:style>
    <style:style style:name="T135" style:family="text">
      <style:text-properties officeooo:rsid="00cd1b29"/>
    </style:style>
    <style:style style:name="T136" style:family="text">
      <style:text-properties officeooo:rsid="00ceb68f"/>
    </style:style>
    <style:style style:name="T137" style:family="text">
      <style:text-properties officeooo:rsid="00cf3228"/>
    </style:style>
    <style:style style:name="T138" style:family="text">
      <style:text-properties officeooo:rsid="00cfaff1"/>
    </style:style>
    <style:style style:name="T139" style:family="text">
      <style:text-properties officeooo:rsid="00d295a1"/>
    </style:style>
    <style:style style:name="T140" style:family="text">
      <style:text-properties officeooo:rsid="00d45834"/>
    </style:style>
    <style:style style:name="T141" style:family="text">
      <style:text-properties officeooo:rsid="00d46098"/>
    </style:style>
    <style:style style:name="T142" style:family="text">
      <style:text-properties officeooo:rsid="00d48856"/>
    </style:style>
    <style:style style:name="T143" style:family="text">
      <style:text-properties officeooo:rsid="00d5e85d"/>
    </style:style>
    <style:style style:name="T144" style:family="text">
      <style:text-properties officeooo:rsid="00d62498"/>
    </style:style>
    <style:style style:name="T145" style:family="text">
      <style:text-properties officeooo:rsid="00d796ec"/>
    </style:style>
    <style:style style:name="T146" style:family="text">
      <style:text-properties officeooo:rsid="00d91719"/>
    </style:style>
    <style:style style:name="T147" style:family="text">
      <style:text-properties officeooo:rsid="00dad67e"/>
    </style:style>
    <style:style style:name="T148" style:family="text">
      <style:text-properties officeooo:rsid="00dbdf43"/>
    </style:style>
    <style:style style:name="T149" style:family="text">
      <style:text-properties officeooo:rsid="00dccd84"/>
    </style:style>
    <style:style style:name="T150" style:family="text">
      <style:text-properties officeooo:rsid="00de3e64"/>
    </style:style>
    <style:style style:name="T151" style:family="text">
      <style:text-properties officeooo:rsid="00de964f"/>
    </style:style>
    <style:style style:name="T152" style:family="text">
      <style:text-properties officeooo:rsid="00e3f7f7"/>
    </style:style>
    <style:style style:name="T153" style:family="text">
      <style:text-properties officeooo:rsid="00e5b0a3"/>
    </style:style>
    <style:style style:name="T154" style:family="text">
      <style:text-properties officeooo:rsid="00e773b3"/>
    </style:style>
    <style:style style:name="T155" style:family="text">
      <style:text-properties officeooo:rsid="00e87709"/>
    </style:style>
    <style:style style:name="T156" style:family="text">
      <style:text-properties officeooo:rsid="00e9ed1d"/>
    </style:style>
    <style:style style:name="T157" style:family="text">
      <style:text-properties officeooo:rsid="00eaaeba"/>
    </style:style>
    <style:style style:name="T158" style:family="text">
      <style:text-properties officeooo:rsid="00eb3af6"/>
    </style:style>
    <style:style style:name="T159" style:family="text">
      <style:text-properties officeooo:rsid="00ed6788"/>
    </style:style>
    <style:style style:name="T160" style:family="text">
      <style:text-properties officeooo:rsid="00f0f259"/>
    </style:style>
    <style:style style:name="T161" style:family="text">
      <style:text-properties officeooo:rsid="00f5ac7f"/>
    </style:style>
    <style:style style:name="T162" style:family="text">
      <style:text-properties officeooo:rsid="00f792ad"/>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f792ad" style:font-style-asian="normal" style:font-weight-asian="normal" style:font-style-complex="normal" style:font-weight-complex="normal"/>
    </style:style>
    <style:style style:name="T165" style:family="text">
      <style:text-properties fo:font-style="normal" fo:font-weight="normal" officeooo:rsid="00fc65c8" style:font-style-asian="normal" style:font-weight-asian="normal" style:font-style-complex="normal" style:font-weight-complex="normal"/>
    </style:style>
    <style:style style:name="T166" style:family="text">
      <style:text-properties fo:font-style="normal" fo:font-weight="normal" officeooo:rsid="00fe0fb6" style:font-style-asian="normal" style:font-weight-asian="normal" style:font-style-complex="normal" style:font-weight-complex="normal"/>
    </style:style>
    <style:style style:name="T167" style:family="text">
      <style:text-properties officeooo:rsid="00f961cb"/>
    </style:style>
    <style:style style:name="T168" style:family="text">
      <style:text-properties officeooo:rsid="00fc65c8"/>
    </style:style>
    <style:style style:name="T169" style:family="text">
      <style:text-properties officeooo:rsid="0102b46b"/>
    </style:style>
    <style:style style:name="T170" style:family="text">
      <style:text-properties officeooo:rsid="004142be"/>
    </style:style>
    <style:style style:name="T171" style:family="text">
      <style:text-properties officeooo:rsid="010a22ce"/>
    </style:style>
    <style:style style:name="T172" style:family="text">
      <style:text-properties officeooo:rsid="010861ce"/>
    </style:style>
    <style:style style:name="T173" style:family="text">
      <style:text-properties officeooo:rsid="01053274"/>
    </style:style>
    <style:style style:name="T174" style:family="text">
      <style:text-properties officeooo:rsid="01100fcf"/>
    </style:style>
    <style:style style:name="T175" style:family="text">
      <style:text-properties officeooo:rsid="010d975b"/>
    </style:style>
    <style:style style:name="T176" style:family="text">
      <style:text-properties officeooo:rsid="010eb6af"/>
    </style:style>
    <style:style style:name="T177" style:family="text">
      <style:text-properties officeooo:rsid="01067ded"/>
    </style:style>
    <style:style style:name="T178" style:family="text">
      <style:text-properties officeooo:rsid="0108aa5e"/>
    </style:style>
    <style:style style:name="T179" style:family="text">
      <style:text-properties fo:font-style="italic" officeooo:rsid="0108aa5e" style:font-style-asian="italic" style:font-style-complex="italic"/>
    </style:style>
    <style:style style:name="T180" style:family="text">
      <style:text-properties fo:font-style="italic" officeooo:rsid="01100fcf" style:font-style-asian="italic" style:font-style-complex="italic"/>
    </style:style>
    <style:style style:name="T181" style:family="text">
      <style:text-properties officeooo:rsid="01112685"/>
    </style:style>
    <style:style style:name="T182" style:family="text">
      <style:text-properties officeooo:rsid="0103797d"/>
    </style:style>
    <style:style style:name="T183" style:family="text">
      <style:text-properties officeooo:rsid="0107ca75"/>
    </style:style>
    <style:style style:name="T184" style:family="text">
      <style:text-properties officeooo:rsid="0109512a"/>
    </style:style>
    <style:style style:name="T185" style:family="text">
      <style:text-properties officeooo:rsid="010b75f2"/>
    </style:style>
    <style:style style:name="T186" style:family="text">
      <style:text-properties officeooo:rsid="010cbab2"/>
    </style:style>
    <style:style style:name="T187" style:family="text">
      <style:text-properties officeooo:rsid="010f43a7"/>
    </style:style>
    <style:style style:name="T188" style:family="text">
      <style:text-properties officeooo:rsid="01162d28"/>
    </style:style>
    <style:style style:name="T189" style:family="text">
      <style:text-properties officeooo:rsid="011733c7"/>
    </style:style>
    <style:style style:name="T190" style:family="text">
      <style:text-properties style:text-line-through-style="solid" style:text-line-through-type="single" officeooo:rsid="011733c7"/>
    </style:style>
    <style:style style:name="T191" style:family="text">
      <style:text-properties officeooo:rsid="011cc60f"/>
    </style:style>
    <style:style style:name="T192" style:family="text">
      <style:text-properties officeooo:rsid="011de5ca"/>
    </style:style>
    <style:style style:name="T193" style:family="text">
      <style:text-properties officeooo:rsid="011e3c87"/>
    </style:style>
    <style:style style:name="T194" style:family="text">
      <style:text-properties officeooo:rsid="011e8b98"/>
    </style:style>
    <style:style style:name="T195" style:family="text">
      <style:text-properties officeooo:rsid="011e9054"/>
    </style:style>
    <style:style style:name="T196" style:family="text">
      <style:text-properties officeooo:rsid="011fa69e"/>
    </style:style>
    <style:style style:name="T197" style:family="text">
      <style:text-properties officeooo:rsid="01208a5a"/>
    </style:style>
    <style:style style:name="T198" style:family="text">
      <style:text-properties officeooo:rsid="0121b526"/>
    </style:style>
    <style:style style:name="T199" style:family="text">
      <style:text-properties officeooo:rsid="0122dd8d"/>
    </style:style>
    <style:style style:name="T200" style:family="text">
      <style:text-properties officeooo:rsid="012460eb"/>
    </style:style>
    <style:style style:name="T201" style:family="text">
      <style:text-properties officeooo:rsid="01271fd7"/>
    </style:style>
    <style:style style:name="T202" style:family="text">
      <style:text-properties officeooo:rsid="01290d4d"/>
    </style:style>
    <style:style style:name="T203" style:family="text">
      <style:text-properties officeooo:rsid="012b9196"/>
    </style:style>
    <style:style style:name="T204" style:family="text">
      <style:text-properties officeooo:rsid="012c9423"/>
    </style:style>
    <style:style style:name="T205" style:family="text">
      <style:text-properties style:font-name="Liberation Sans"/>
    </style:style>
    <style:style style:name="T206" style:family="text">
      <style:text-properties officeooo:rsid="0132a56b"/>
    </style:style>
    <style:style style:name="T207" style:family="text">
      <style:text-properties officeooo:rsid="0134966a"/>
    </style:style>
    <style:style style:name="T208" style:family="text">
      <style:text-properties officeooo:rsid="01367092"/>
    </style:style>
    <style:style style:name="T209" style:family="text">
      <style:text-properties officeooo:rsid="0136c04c"/>
    </style:style>
    <style:style style:name="T210" style:family="text">
      <style:text-properties officeooo:rsid="013905ae"/>
    </style:style>
    <style:style style:name="T211" style:family="text">
      <style:text-properties officeooo:rsid="013c42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Koviz User's Guide</text:p>
      <text:p text:style-name="P3"><draw:line text:anchor-type="paragraph" draw:z-index="0" draw:name="Shape1" draw:style-name="gr1" draw:text-style-name="P234" svg:x1="0.0457in" svg:y1="0.2016in" svg:x2="6.3567in" svg:y2="0.2016in"><text:p/></draw:line></text:p>
      <text:p text:style-name="P124"><draw:line text:anchor-type="paragraph" draw:z-index="1" draw:name="Shape2" draw:style-name="gr1" draw:text-style-name="P234" svg:x1="6.3571in" svg:y1="-0.1256in" svg:x2="6.4264in" svg:y2="8.1579in"><text:p/></draw:line>Version <text:span text:style-name="T188">0</text:span>.0.<text:span text:style-name="T188">1</text:span></text:p>
      <text:p text:style-name="P124"><text:span text:style-name="T198">June</text:span><text:span text:style-name="T191"> </text:span>20<text:span text:style-name="T57">2</text:span><text:span text:style-name="T191">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60"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56"><text:a xlink:type="simple" xlink:href="#__RefHeading__232_403196617" text:style-name="Index_20_Link" text:visited-style-name="Index_20_Link"><text:tab/>2</text:a></text:p>
          <text:p text:style-name="P156"><text:a xlink:type="simple" xlink:href="#__RefHeading__252_403196617" text:style-name="Index_20_Link" text:visited-style-name="Index_20_Link">Introduction<text:tab/>4</text:a></text:p>
          <text:p text:style-name="P156"><text:a xlink:type="simple" xlink:href="#__RefHeading__645_403196617" text:style-name="Index_20_Link" text:visited-style-name="Index_20_Link">RUN Directories<text:tab/>4</text:a></text:p>
          <text:p text:style-name="P156"><text:a xlink:type="simple" xlink:href="#__RefHeading___Toc1918_3517546431" text:style-name="Index_20_Link" text:visited-style-name="Index_20_Link">RUN Files<text:tab/>4</text:a></text:p>
          <text:p text:style-name="P156"><text:a xlink:type="simple" xlink:href="#__RefHeading__655_403196617" text:style-name="Index_20_Link" text:visited-style-name="Index_20_Link">MONTE Directories<text:tab/>4</text:a></text:p>
          <text:p text:style-name="P156"><text:a xlink:type="simple" xlink:href="#__RefHeading__234_403196617" text:style-name="Index_20_Link" text:visited-style-name="Index_20_Link">DP Files<text:tab/>5</text:a></text:p>
          <text:p text:style-name="P158"><text:a xlink:type="simple" xlink:href="#__RefHeading__475_403196617" text:style-name="Index_20_Link" text:visited-style-name="Index_20_Link">DP File Syntax<text:tab/>5</text:a></text:p>
          <text:p text:style-name="P158"><text:a xlink:type="simple" xlink:href="#__RefHeading__560_403196617" text:style-name="Index_20_Link" text:visited-style-name="Index_20_Link">DP Line and Symbol Styles<text:tab/>7</text:a></text:p>
          <text:p text:style-name="P158"><text:a xlink:type="simple" xlink:href="#__RefHeading__595_403196617" text:style-name="Index_20_Link" text:visited-style-name="Index_20_Link">DP File Example<text:tab/>7</text:a></text:p>
          <text:p text:style-name="P156"><text:a xlink:type="simple" xlink:href="#__RefHeading__759_403196617" text:style-name="Index_20_Link" text:visited-style-name="Index_20_Link">Session Files<text:tab/>8</text:a></text:p>
          <text:p text:style-name="P156"><text:a xlink:type="simple" xlink:href="#__RefHeading__254_403196617" text:style-name="Index_20_Link" text:visited-style-name="Index_20_Link">External Programs<text:tab/>10</text:a></text:p>
          <text:p text:style-name="P157"><text:a xlink:type="simple" xlink:href="#__RefHeading__264_403196617" text:style-name="Index_20_Link" text:visited-style-name="Index_20_Link">External Program DP File Specification<text:tab/>10</text:a></text:p>
          <text:p text:style-name="P157"><text:a xlink:type="simple" xlink:href="#__RefHeading__381_403196617" text:style-name="Index_20_Link" text:visited-style-name="Index_20_Link">External Program DP File Example<text:tab/>10</text:a></text:p>
          <text:p text:style-name="P157"><text:a xlink:type="simple" xlink:href="#__RefHeading__383_403196617" text:style-name="Index_20_Link" text:visited-style-name="Index_20_Link">External Program Source Code Example<text:tab/>11</text:a></text:p>
          <text:p text:style-name="P157"><text:a xlink:type="simple" xlink:href="#__RefHeading___Toc907_1341101074" text:style-name="Index_20_Link" text:visited-style-name="Index_20_Link">Building Example External Program On Linux<text:tab/>11</text:a></text:p>
          <text:p text:style-name="P157"><text:a xlink:type="simple" xlink:href="#__RefHeading__385_403196617" text:style-name="Index_20_Link" text:visited-style-name="Index_20_Link">External Program Building<text:tab/>12</text:a></text:p>
          <text:p text:style-name="P158"><text:a xlink:type="simple" xlink:href="#__RefHeading__387_403196617" text:style-name="Index_20_Link" text:visited-style-name="Index_20_Link">Linux<text:tab/>12</text:a></text:p>
          <text:p text:style-name="P158"><text:a xlink:type="simple" xlink:href="#__RefHeading__389_403196617" text:style-name="Index_20_Link" text:visited-style-name="Index_20_Link">MacOS X<text:tab/>12</text:a></text:p>
          <text:p text:style-name="P157"><text:a xlink:type="simple" xlink:href="#__RefHeading__391_403196617" text:style-name="Index_20_Link" text:visited-style-name="Index_20_Link">External Program Summary<text:tab/>12</text:a></text:p>
          <text:p text:style-name="P157"><text:a xlink:type="simple" xlink:href="#__RefHeading__393_403196617" text:style-name="Index_20_Link" text:visited-style-name="Index_20_Link">External Program Problems And Caveats<text:tab/>12</text:a></text:p>
          <text:p text:style-name="P156"><text:a xlink:type="simple" xlink:href="#__RefHeading___Toc1920_3517546431" text:style-name="Index_20_Link" text:visited-style-name="Index_20_Link">Scripts<text:tab/>13</text:a></text:p>
          <text:p text:style-name="P156"><text:a xlink:type="simple" xlink:href="#__RefHeading___Toc2384_1878335349" text:style-name="Index_20_Link" text:visited-style-name="Index_20_Link">Commandline Options<text:tab/>14</text:a></text:p>
          <text:p text:style-name="P156"><text:a xlink:type="simple" xlink:href="#__RefHeading__761_403196617" text:style-name="Index_20_Link" text:visited-style-name="Index_20_Link">Plot Interaction<text:tab/>15</text:a></text:p>
          <text:p text:style-name="P156"><text:a xlink:type="simple" xlink:href="#__RefHeading__853_403196617" text:style-name="Index_20_Link" text:visited-style-name="Index_20_Link">Maps<text:tab/>17</text:a></text:p>
          <text:p text:style-name="P156"><text:a xlink:type="simple" xlink:href="#__RefHeading___Toc1404_4203752023" text:style-name="Index_20_Link" text:visited-style-name="Index_20_Link">Groups<text:tab/>18</text:a></text:p>
          <text:p text:style-name="P156"><text:a xlink:type="simple" xlink:href="#__RefHeading___Toc811_3249638883" text:style-name="Index_20_Link" text:visited-style-name="Index_20_Link">Video<text:tab/>19</text:a></text:p>
          <text:p text:style-name="P157"><text:a xlink:type="simple" xlink:href="#__RefHeading___Toc948_3009348355" text:style-name="Index_20_Link" text:visited-style-name="Index_20_Link">Introduction<text:tab/>19</text:a></text:p>
          <text:p text:style-name="P157"><text:a xlink:type="simple" xlink:href="#__RefHeading___Toc950_3009348355" text:style-name="Index_20_Link" text:visited-style-name="Index_20_Link">Building Koviz with MPV Support<text:tab/>19</text:a></text:p>
          <text:p text:style-name="P157"><text:a xlink:type="simple" xlink:href="#__RefHeading___Toc952_3009348355" text:style-name="Index_20_Link" text:visited-style-name="Index_20_Link">Data Synchronization<text:tab/>19</text:a></text:p>
          <text:p text:style-name="P157"><text:a xlink:type="simple" xlink:href="#__RefHeading___Toc954_3009348355" text:style-name="Index_20_Link" text:visited-style-name="Index_20_Link">Commandline -video and -videoOffset options<text:tab/>19</text:a></text:p>
          <text:p text:style-name="P157"><text:a xlink:type="simple" xlink:href="#__RefHeading___Toc1683_1107607212" text:style-name="Index_20_Link" text:visited-style-name="Index_20_Link">Commandline -videoList option<text:tab/>20</text:a></text:p>
          <text:p text:style-name="P157"><text:a xlink:type="simple" xlink:href="#__RefHeading___Toc1076_3009348355" text:style-name="Index_20_Link" text:visited-style-name="Index_20_Link">Session Files<text:tab/>20</text:a></text:p>
          <text:p text:style-name="P157"><text:a xlink:type="simple" xlink:href="#__RefHeading___Toc1078_3009348355" text:style-name="Index_20_Link" text:visited-style-name="Index_20_Link">Video Directory Within RUN<text:tab/>20</text:a></text:p>
          <text:p text:style-name="P157"><text:a xlink:type="simple" xlink:href="#__RefHeading___Toc1080_3009348355" text:style-name="Index_20_Link" text:visited-style-name="Index_20_Link">Multiple RUNs And Multiple Videos<text:tab/>21</text:a></text:p>
          <text:p text:style-name="P157"><text:a xlink:type="simple" xlink:href="#__RefHeading___Toc4425_149071425" text:style-name="Index_20_Link" text:visited-style-name="Index_20_Link">Custom Video Directory Path<text:tab/>22</text:a></text:p>
          <text:p text:style-name="P156"><text:a xlink:type="simple" xlink:href="#__RefHeading___Toc1340_1544136475" text:style-name="Index_20_Link" text:visited-style-name="Index_20_Link">Blender<text:tab/>23</text:a></text:p>
          <text:p text:style-name="P157"><text:a xlink:type="simple" xlink:href="#__RefHeading___Toc1342_1544136475" text:style-name="Index_20_Link" text:visited-style-name="Index_20_Link">Introduction<text:tab/>23</text:a></text:p>
          <text:p text:style-name="P157"><text:a xlink:type="simple" xlink:href="#__RefHeading___Toc1344_1544136475" text:style-name="Index_20_Link" text:visited-style-name="Index_20_Link">Blender Addon Setup<text:tab/>23</text:a></text:p>
          <text:p text:style-name="P157"><text:a xlink:type="simple" xlink:href="#__RefHeading___Toc1346_1544136475" text:style-name="Index_20_Link" text:visited-style-name="Index_20_Link">Animate Blender Default Cube<text:tab/>23</text:a></text:p>
          <text:p text:style-name="P157"><text:a xlink:type="simple" xlink:href="#__RefHeading___Toc1348_1544136475" text:style-name="Index_20_Link" text:visited-style-name="Index_20_Link">Sync Koviz To Default Cube Animation<text:tab/>24</text:a></text:p>
          <text:p text:style-name="P157"><text:soft-page-break/><text:a xlink:type="simple" xlink:href="#__RefHeading___Toc1350_1544136475" text:style-name="Index_20_Link" text:visited-style-name="Index_20_Link">Sync Blender To Koviz With ES’s Vismo<text:tab/>25</text:a></text:p>
          <text:p text:style-name="P156"><text:a xlink:type="simple" xlink:href="#__RefHeading___Toc1685_1107607212" text:style-name="Index_20_Link" text:visited-style-name="Index_20_Link">Live Trick TV Plots<text:tab/>26</text:a></text:p>
          <text:p text:style-name="P157"><text:a xlink:type="simple" xlink:href="#__RefHeading___Toc1687_1107607212" text:style-name="Index_20_Link" text:visited-style-name="Index_20_Link">Introduction<text:tab/>26</text:a></text:p>
          <text:p text:style-name="P157"><text:a xlink:type="simple" xlink:href="#__RefHeading___Toc1689_1107607212" text:style-name="Index_20_Link" text:visited-style-name="Index_20_Link">Plotting TV Params<text:tab/>26</text:a></text:p>
          <text:p text:style-name="P157"><text:a xlink:type="simple" xlink:href="#__RefHeading___Toc1691_1107607212" text:style-name="Index_20_Link" text:visited-style-name="Index_20_Link">Changing Live Plot Domain<text:tab/>27</text:a></text:p>
          <text:p text:style-name="P157"><text:a xlink:type="simple" xlink:href="#__RefHeading___Toc1693_1107607212" text:style-name="Index_20_Link" text:visited-style-name="Index_20_Link">Live DP Files<text:tab/>27</text:a></text:p>
          <text:p text:style-name="P157"><text:a xlink:type="simple" xlink:href="#__RefHeading___Toc1780_3036021424" text:style-name="Index_20_Link" text:visited-style-name="Index_20_Link">Live Spring Plot Example<text:tab/>27</text:a></text:p>
          <text:p text:style-name="P156"><text:a xlink:type="simple" xlink:href="#__RefHeading___Toc4053_2364949263" text:style-name="Index_20_Link" text:visited-style-name="Index_20_Link">Profiling Trick Jobs<text:tab/>29</text:a></text:p>
          <text:p text:style-name="P157"><text:a xlink:type="simple" xlink:href="#__RefHeading___Toc2091_3967031703" text:style-name="Index_20_Link" text:visited-style-name="Index_20_Link">Add Sleeps To Ball L2 Sim<text:tab/>29</text:a></text:p>
          <text:p text:style-name="P157"><text:a xlink:type="simple" xlink:href="#__RefHeading___Toc2093_3967031703" text:style-name="Index_20_Link" text:visited-style-name="Index_20_Link">Run And View Sleep Effect<text:tab/>29</text:a></text:p>
          <text:p text:style-name="P157"><text:a xlink:type="simple" xlink:href="#__RefHeading___Toc2095_3967031703" text:style-name="Index_20_Link" text:visited-style-name="Index_20_Link">Modify and Build Profiler<text:tab/>30</text:a></text:p>
          <text:p text:style-name="P157"><text:a xlink:type="simple" xlink:href="#__RefHeading___Toc2097_3967031703" text:style-name="Index_20_Link" text:visited-style-name="Index_20_Link">Add Profiler To Sim<text:tab/>30</text:a></text:p>
          <text:p text:style-name="P157"><text:a xlink:type="simple" xlink:href="#__RefHeading___Toc2099_3967031703" text:style-name="Index_20_Link" text:visited-style-name="Index_20_Link">Run Sim And See Profile Results<text:tab/>30</text:a></text:p>
          <text:p text:style-name="P156"><text:a xlink:type="simple" xlink:href="#__RefHeading___Toc2386_1878335349" text:style-name="Index_20_Link" text:visited-style-name="Index_20_Link">HDF5<text:tab/>31</text:a></text:p>
          <text:p text:style-name="P157"><text:a xlink:type="simple" xlink:href="#__RefHeading___Toc2388_1878335349" text:style-name="Index_20_Link" text:visited-style-name="Index_20_Link">Building Koviz With HDF5<text:tab/>31</text:a></text:p>
          <text:p text:style-name="P157"><text:a xlink:type="simple" xlink:href="#__RefHeading___Toc2390_1878335349" text:style-name="Index_20_Link" text:visited-style-name="Index_20_Link">Generic HDF5 Parameters<text:tab/>31</text:a></text:p>
          <text:p text:style-name="P156"><text:a xlink:type="simple" xlink:href="#__RefHeading___Toc2812_1878335349" text:style-name="Index_20_Link" text:visited-style-name="Index_20_Link">Parquet<text:tab/>32</text:a></text:p>
          <text:p text:style-name="P157"><text:a xlink:type="simple" xlink:href="#__RefHeading___Toc2814_1878335349" text:style-name="Index_20_Link" text:visited-style-name="Index_20_Link">Building Koviz With Parquet<text:tab/>32</text:a></text:p>
          <text:p text:style-name="P157"><text:a xlink:type="simple" xlink:href="#__RefHeading___Toc2816_1878335349" text:style-name="Index_20_Link" text:visited-style-name="Index_20_Link">Parquet Data Layout<text:tab/>33</text:a></text:p>
          <text:p text:style-name="P157"><text:a xlink:type="simple" xlink:href="#__RefHeading___Toc2818_1878335349" text:style-name="Index_20_Link" text:visited-style-name="Index_20_Link">Parquet Units<text:tab/>33</text:a></text:p>
          <text:p text:style-name="P157"><text:a xlink:type="simple" xlink:href="#__RefHeading___Toc2820_1878335349" text:style-name="Index_20_Link" text:visited-style-name="Index_20_Link">Koviz Parquet Test<text:tab/>33</text:a></text:p>
        </text:index-body>
      </text:table-of-content>
      <text:p text:style-name="P6"/>
      <text:p text:style-name="P6"/>
      <text:h text:style-name="P175" text:outline-level="2"><text:bookmark-start text:name="__RefHeading__252_403196617"/>Introduction<text:bookmark-end text:name="__RefHeading__252_403196617"/></text:h>
      <text:p text:style-name="P35">Koviz is a simulation data <text:span text:style-name="T155">plotting and </text:span><text:span text:style-name="T23">visualization tool. <text:s/>It is </text:span>designed especially for<text:span text:style-name="T22"> Trick </text:span>monte carlo data <text:span text:style-name="T23">analysis</text:span>, comparing simulation runs, <text:span text:style-name="T23">analyzing data spikes and creating report quality plot booklets</text:span>. <text:s/>Koviz can be run interactively via the GUI or can be run in batch. <text:s/>Koviz supports Trick binary data and CSV. <text:s/><text:span text:style-name="T22">Koviz </text:span><text:span text:style-name="T155">also </text:span><text:span text:style-name="T22">offers:</text:span></text:p>
      <text:list xml:id="list1189133589" text:style-name="L1">
        <text:list-item>
          <text:p text:style-name="P215">A real-time analysis report <text:span text:style-name="T22">for Trick real-time data recordings</text:span></text:p>
        </text:list-item>
        <text:list-item>
          <text:p text:style-name="P216"><text:span text:style-name="T155">A</text:span><text:span text:style-name="T22"> plugin-like functionality, external programs, to transform simulation data</text:span></text:p>
        </text:list-item>
        <text:list-item>
          <text:p text:style-name="P214"><text:span text:style-name="T155">Data/video synchronization to</text:span><text:span text:style-name="T22"> view video alongside associated data </text:span><text:span text:style-name="T155">plots</text:span></text:p>
        </text:list-item>
        <text:list-item>
          <text:p text:style-name="P215">Data/Blender graphics synchronization</text:p>
        </text:list-item>
        <text:list-item>
          <text:p text:style-name="P215">Live Trick simulation plots</text:p>
        </text:list-item>
      </text:list>
      <text:p text:style-name="P35">The <text:span text:style-name="T155">main </text:span>usage for koviz <text:span text:style-name="T45">is</text:span>: </text:p>
      <text:p text:style-name="P65"><text:span text:style-name="T45">UNIX Prompt&gt; </text:span>koviz <text:span text:style-name="T21">&lt;</text:span>RUN_<text:span text:style-name="T21">dir|MONTE_dir</text:span><text:span text:style-name="T158">|RUN file</text:span>&gt; [DP_<text:span text:style-name="T21">file1</text:span>...] [options]</text:p>
      <text:p text:style-name="P97">To see a list of options:</text:p>
      <text:p text:style-name="P65">UNIX Prompt&gt; koviz <text:span text:style-name="T30">&lt;ENTER&gt;</text:span></text:p>
      <text:h text:style-name="P161" text:outline-level="2"><text:bookmark-start text:name="__RefHeading__645_403196617"/>RUN Directories<text:bookmark-end text:name="__RefHeading__645_403196617"/></text:h>
      <text:p text:style-name="P11"><text:span text:style-name="T158">Koviz plots data from </text:span>RUN directories <text:span text:style-name="T158">which </text:span>contain log files <text:span text:style-name="T158">(normally </text:span>from <text:span text:style-name="T158">Trick </text:span>simulation run<text:span text:style-name="T158">s)</text:span>. <text:s/><text:span text:style-name="T26">Koviz is efficient at coplotting multiple RUN</text:span><text:span text:style-name="T158">s</text:span><text:span text:style-name="T26">:</text:span></text:p>
      <text:p text:style-name="P80">UNIX Prompt&gt; koviz RUN*</text:p>
      <text:h text:style-name="Heading_20_2" text:outline-level="2"><text:bookmark-start text:name="__RefHeading___Toc1918_3517546431"/>RUN Files<text:bookmark-end text:name="__RefHeading___Toc1918_3517546431"/></text:h>
      <text:p text:style-name="P36">Instead of giving koviz RUN directories that hold a set of log files, one can also directly plot files. <text:s/>For example, one can compare two *.csv files:</text:p>
      <text:p text:style-name="P81">UNIX Prompt&gt; koviz my-time-history.csv my-motion-capture.mot</text:p>
      <text:h text:style-name="P162" text:outline-level="2"><text:bookmark-start text:name="__RefHeading__655_403196617"/>M<text:span text:style-name="T24">ONTE</text:span> Directories<text:bookmark-end text:name="__RefHeading__655_403196617"/></text:h>
      <text:p text:style-name="P12">Trick Monte carlo directories, <text:span text:style-name="T25">typically prefixed by MONTE,</text:span> contain a set of RUNs and a monte carlo inputs file. <text:s/>The Koviz GUI correlates RUN inputs to plot curves:</text:p>
      <text:p text:style-name="P66">UNIX Prompt&gt; koviz MONTE_dir</text:p>
      <text:h text:style-name="P163" text:outline-level="2"><text:bookmark-start text:name="__RefHeading__234_403196617"/><text:soft-page-break/>DP Files<text:bookmark-end text:name="__RefHeading__234_403196617"/></text:h>
      <text:p text:style-name="P15">The <text:span text:style-name="T46">data </text:span>product <text:span text:style-name="T46">(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6">DP</text:span> file may contain any number of Pages and Tables. <text:s/>A page may <text:span text:style-name="T69">also </text:span>have <text:span text:style-name="T69">any number of </text:span>plot<text:span text:style-name="T69">s. <text:s/></text:span>PROGRAM refers to an external program – a user created shared library dynamically linked into koviz for manipulating recorded data for display. <text:s/>A DP file can be created from the koviz GUI using the main menu's “Save As DP” option.</text:p>
      <text:h text:style-name="P211" text:outline-level="4"><text:bookmark-start text:name="__RefHeading__475_403196617"/>DP File Syntax<text:bookmark-end text:name="__RefHeading__475_403196617"/></text:h>
      <text:p text:style-name="P63">[Title]</text:p>
      <text:p text:style-name="P59">[PLOTS: </text:p>
      <text:p text:style-name="P89">PAGE <text:span text:style-name="T159">page_number_integer</text:span>: “page_title” </text:p>
      <text:p text:style-name="P118"><text:span text:style-name="T182">[TAB_LABEL: “Widget Tab Label”]</text:span><text:line-break/>[FOREGROUND_COLOR: “#rrggbb|color_name”]<text:line-break/>[BACKGROUND_COLOR: “#rrggbb|color_name”]</text:p>
      <text:p text:style-name="P114">PLOT plot_number: “plot title” </text:p>
      <text:p text:style-name="P233">[X_AXIS_LABEL: “x_axis_label" <text:span text:style-name="T44">]<text:line-break/></text:span>[Y_AXIS_LABEL: “y_axis_label”] <text:line-break/>[X_MIN_RANGE: x_min_value] <text:line-break/>[X_MAX_RANGE: x_max_value] <text:line-break/>[Y_MIN_RANGE: y_min_value] <text:line-break/>[Y_MAX_RANGE: y_max_value]<text:line-break/><text:span text:style-name="T66">[PLOT_X_SCALE: “log|linear”]<text:line-break/>[PLOT_Y_SCALE: “log|linear”]</text:span><text:line-break/><text:span text:style-name="T47">[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59">continued on next page</text:span><text:span text:style-name="T47"><text:line-break/><text:line-break/></text:span><text:soft-page-break/><text:span text:style-name="T47"><text:line-break/></text:span><text:span text:style-name="T159">[HLINE: float]<text:line-break/> <text:s text:c="7"/>[COLOR: “#rrggbb|color_name”]<text:line-break/> <text:s text:c="7"/></text:span><text:span text:style-name="T211">[THICKNESS: &lt;double&gt; (0.0 is cosmetic 1 pixel pen default)]</text:span><text:span text:style-name="T159"><text:line-break/> <text:s text:c="7"/>[LABEL: “printf format - %g for value, %s for unit”]<text:line-break/> <text:s text:c="7"/>[UNITS: “unit”]<text:line-break/> <text:s text:c="7"/>[LABEL_UNITS: “unit”]<text:line-break/> <text:s text:c="7"/></text:span><text:span text:style-name="T160">[LABEL_ORIENT: “left|center|right|0&lt;=placement&lt;=1”]</text:span></text:p>
      <text:p text:style-name="P121">X_VARIABLE: “param_name” </text:p>
      <text:p text:style-name="P122">[LABEL: “label”] <text:line-break/>[UNITS: “unit”] <text:line-break/>[SCALE_FACTOR: scale_value] <text:line-break/>[BIAS: bias_value] </text:p>
      <text:p text:style-name="P121">Y_VARIABLE: “param_name” </text:p>
      <text:p text:style-name="P123"><text:span text:style-name="T9">(</text:span>Same attributes as X_VARIABLE<text:span text:style-name="T9">)</text:span> <text:line-break/>[SYMBOL_STYLE: symbol_style] <text:line-break/>[SYMBOL_SIZE: symbol_size]<text:line-break/><text:span text:style-name="T157">[SYMBOL_END: symbol_style]</text:span><text:line-break/>[LINE_STYLE: line_style] <text:line-break/>[LINE_COLOR: <text:span text:style-name="T7">“#rrggbb|color_name”</text:span>] </text:p>
      <text:p text:style-name="P121">[Y_VARIABLE: ... ] </text:p>
      <text:p text:style-name="P60">]</text:p>
      <text:p text:style-name="P60">[TABLES: </text:p>
      <text:p text:style-name="P90">TABLE table_number_<text:span text:style-name="T159">integer</text:span>: “table_title” <text:line-break/> <text:s text:c="3"/><text:span text:style-name="T182">[TAB_LABEL: “Widget Tab Label”]</text:span></text:p>
      <text:p text:style-name="P114">VARIABLE: “param_name” <text:line-break/><text:span text:style-name="T8">(S</text:span>ame <text:span text:style-name="T8">attributes </text:span>as X_VARIABLE in PLOT<text:span text:style-name="T8">)</text:span> <text:line-break/>[VARIABLE: ...] </text:p>
      <text:p text:style-name="P60">] </text:p>
      <text:p text:style-name="P60">[PROGRAM: “<text:span text:style-name="T159">path_to_</text:span>program_<text:span text:style-name="T159">shared_library</text:span>”: </text:p>
      <text:p text:style-name="P90">IN: “param_name1” “param_name2” ... <text:line-break/>OUT: “param_name1” param_name2” ... </text:p>
      <text:p text:style-name="P54"><text:soft-page-break/>]</text:p>
      <text:h text:style-name="P212" text:outline-level="4"><text:bookmark-start text:name="__RefHeading__560_403196617"/><text:span text:style-name="T39">DP </text:span>Line and Symbol Styles<text:bookmark-end text:name="__RefHeading__560_403196617"/></text:h>
      <text:p text:style-name="P57">SYMBOL_STYLE:</text:p>
      <text:p text:style-name="P87">None|Square|Circle|Star|XX|Triangle|<text:line-break/>Solid_Square|Solid_Circle|Thick_Square|Thick_Circle<text:span text:style-name="T46">|<text:line-break/>Number_[0-9]</text:span><text:span text:style-name="T156">|sa</text:span><text:span text:style-name="T157">tellite</text:span></text:p>
      <text:p text:style-name="P153">SYMBOL_END:</text:p>
      <text:p text:style-name="P155">Same symbols as SYMBOL_STYLE</text:p>
      <text:p text:style-name="P57">SYMBOL_SIZE: </text:p>
      <text:p text:style-name="P87">Tiny|Small|Medium|Large</text:p>
      <text:p text:style-name="P57">LINE_STYLE: </text:p>
      <text:p text:style-name="P87">“No_Line|Thick_Line|X_Thick_Line|Fine_Dash|Med_Fine_Dash|<text:line-break/>Long_Dash|X_Long_Dash|Dot_Dash|2_Dot_Dash|3_Dot_Dash| <text:line-break/>4_Dot_Dash|Plain|Dash<text:span text:style-name="T67">|Scatter</text:span>”</text:p>
      <text:p text:style-name="P57">LINE_COLOR: </text:p>
      <text:p text:style-name="P87">“#rrggbb|&lt;color_name&gt;” </text:p>
      <text:h text:style-name="P213" text:outline-level="4"/>
      <text:h text:style-name="P213"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58">PLOTS: </text:p>
      <text:p text:style-name="P58">PAGE 1: "<text:span text:style-name="T11">Page Title</text:span>" </text:p>
      <text:p text:style-name="P88">PLOT 1: "<text:span text:style-name="T11">Ball X Position</text:span>" </text:p>
      <text:p text:style-name="P113"><text:span text:style-name="T13">X_VARIABLE: "</text:span><text:span text:style-name="T14">sys.exec.out.time</text:span><text:span text:style-name="T13">" <text:line-break/>Y_VARIABLE: "ball.state.out.position[</text:span><text:span text:style-name="T14">0</text:span><text:span text:style-name="T13">]"</text:span></text:p>
      <text:h text:style-name="P166" text:outline-level="2"/>
      <text:h text:style-name="P176" text:outline-level="2"><text:bookmark-start text:name="__RefHeading__759_403196617"/>Session Files<text:bookmark-end text:name="__RefHeading__759_403196617"/></text:h>
      <text:p text:style-name="P13">To launch koviz with a set of RUNs and DPs, the -session command-line option may be used:</text:p>
      <text:p text:style-name="P67">UNIX Prompt&gt; koviz -session &lt;session_file&gt;</text:p>
      <text:p text:style-name="P98">The syntax for the session file is as follows:</text:p>
      <text:p text:style-name="P85"><text:span text:style-name="T169">[# At beginning of line is a comment]</text:span><text:span text:style-name="T170"><text:line-break/>[Title] <text:line-break/>[DEVICE: &lt;File &lt;file_name&gt;|Terminal&gt; ]<text:line-break/>[FREQUENCY: cycle_time] <text:line-break/>[TIME_MATCH_TOLERANCE: delta_time] <text:line-break/>[PRESENTATION: Compare|Error|Error+Compare] <text:line-break/>PRODUCT: </text:span><text:span text:style-name="T28">DP</text:span><text:span text:style-name="T170">_file</text:span><text:span text:style-name="T29">name</text:span><text:span text:style-name="T170"> <text:line-break/>[PRODUCT: </text:span><text:span text:style-name="T28">DP</text:span><text:span text:style-name="T170">_file</text:span><text:span text:style-name="T29">name</text:span><text:span text:style-name="T170">_n ...] <text:line-break/>RUN: RUN_directory <text:line-break/>[RUN: RUN_directory_n …]<text:line-break/></text:span><text:span text:style-name="T48">[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text:span><text:soft-page-break/><text:span text:style-name="T48">[PlotLegendPosition: ne|e|se|s|sw|w|nw|n]</text:span></text:p>
      <text:p text:style-name="P98">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98">The FREQUENCY: statement specifies the delta time between data points <text:span text:style-name="T27">when loading curve data</text:span>. &lt;cycle_time&gt; <text:span text:style-name="T27">is</text:span> specified in seconds. <text:s/><text:span text:style-name="T27">If the optional FREQUENCY statement is unspecified or if the &lt;cycle_time&gt; is less than the recorded data cycle time, all recorded curve data will be loaded</text:span>. <text:s/><text:span text:style-name="T27">If the &lt;cycle_time&gt; is larger, curve data points will be culled.</text:span></text:p>
      <text:p text:style-name="P98">The TIME_MATCH_TOLERANCE: statement specifies the maximum allowed delta between the time stamps for two sets of data points used in generating the error plot. The default value is 1.0e-<text:span text:style-name="T27">6</text:span>. <text:s/><text:span text:style-name="T48">Koviz <text:s/>does a best match for timestamps within the tolerance.</text:span></text:p>
      <text:p text:style-name="P98">The PRESENTATION: statement is only useful when <text:span text:style-name="T27">two RUNs are specified</text:span>. <text:s/><text:span text:style-name="T28">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98">The PRODUCT: statement specifies a <text:span text:style-name="T28">data </text:span>product <text:span text:style-name="T28">(DP) </text:span>file. <text:span text:style-name="T28">One or more DP files must be specified. <text:s/>DP</text:span> files specify the <text:span text:style-name="T28">simulation </text:span>parameters to display, and the display attributes for each parameter. <text:s/><text:span text:style-name="T28">See </text:span><text:span text:style-name="T28"><text:bookmark-ref text:reference-format="text" text:ref-name="__RefHeading__234_403196617">DP Files</text:bookmark-ref></text:span><text:span text:style-name="T28"><text:s/>for more detail.</text:span></text:p>
      <text:p text:style-name="P98">The RUN: statement specifies a simulation RUN directory from which to retrieve logged data, &lt;RUN_directory&gt;. <text:s/>One or more RUNs must be specified.</text:p>
      <text:p text:style-name="P101">The SHIFT: statement is used to shift RUN time(s). <text:s/>If there is a single RUN, specify a double value e.g. SHIFT: 13.56. <text:s/>If there are multiple RUNs, use a comma delimited list of RUN:&lt;shift_value&gt; specs e.g. SHIFT: RUN_a:13.56,RUN_b:77.28,RUN_c:23.0.</text:p>
      <text:p text:style-name="P101">The TimeName: statement is used when time is not the default “sys.exec.out.time” e.g. TimeName: myTimeName.</text:p>
      <text:p text:style-name="P101">The MapFile: statement is used to tell koviz where the map file is located. <text:s/>Maps are described later in this document, but in a nutshell maps are used to map RUNs with different parameter names so that the RUNs can be compared and difference plotted.</text:p>
      <text:p text:style-name="P101">The EXCLUDE: and FILTER: statements <text:span text:style-name="T49">either cull out or filter for logfiles within the RUN directories. <text:s/>This can help speed up data loading and/or show a subset of all variables logged.</text:span></text:p>
      <text:h text:style-name="P167" text:outline-level="2"/>
      <text:h text:style-name="P177"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53">Koviz</text:span> for manipulating data specified in the DP specification file. </text:p>
      <text:h text:style-name="Heading_20_3" text:outline-level="3"><text:bookmark-start text:name="__RefHeading__264_403196617"/><text:span text:style-name="T38">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53">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53">variable</text:span> name is used. </text:p>
      <text:p text:style-name="P7">Inputs will be cast to doubles going to the external program, and outputs must be doubles as well. </text:p>
      <text:p text:style-name="P7">As an example, a user would like <text:span text:style-name="T53">to plot </text:span>t<text:span text:style-name="T53">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8">External Program </text:span>DP <text:span text:style-name="T37">File Example</text:span><text:bookmark-end text:name="__RefHeading__381_403196617"/></text:h>
      <text:p text:style-name="P62">PROGRAM: “<text:span text:style-name="T53">/home/kvetter/test/ext_programs/librss.so</text:span>” </text:p>
      <text:p text:style-name="P91">IN: </text:p>
      <text:p text:style-name="P116">“<text:span text:style-name="T53">Chaser.stVeh.stFFrDock.vecF_Frame[0]</text:span>”<text:line-break/>“<text:span text:style-name="T53">Chaser.stVeh.stFFrDock.vecF_Frame[1]</text:span>”<text:line-break/>“<text:span text:style-name="T53">Chaser.stVeh.stFFrDock.vecF_Frame[2]</text:span>”</text:p>
      <text:p text:style-name="P91">OUT: </text:p>
      <text:p text:style-name="P115">“<text:span text:style-name="T53">vecF_Frame_rss</text:span>” </text:p>
      <text:p text:style-name="P61"><text:span text:style-name="T53">PLOTS:<text:line-break/></text:span><text:line-break/>PAGE 1: "<text:span text:style-name="T53">External Program Example</text:span>" </text:p>
      <text:p text:style-name="P92">PLOT 1: “<text:span text:style-name="T53">RSS</text:span>”</text:p>
      <text:p text:style-name="P117">X_VARIABLE: "sys.exec.out.time" <text:line-break/>Y_VARIABLE: "<text:span text:style-name="T53">vecF_Frame_rss</text:span>" <text:line-break/></text:p>
      <text:h text:style-name="P183" text:outline-level="3"><text:bookmark-start text:name="__RefHeading__383_403196617"/><text:soft-page-break/>External Program Source Code <text:span text:style-name="T40">Example</text:span><text:bookmark-end text:name="__RefHeading__383_403196617"/></text:h>
      <text:p text:style-name="P8">The following is an example external program source file <text:span text:style-name="T54">(rss.c)</text:span> which takes <text:span text:style-name="T51">three</text:span> inputs and generates <text:span text:style-name="T51">a single </text:span>output. <text:s/><text:span text:style-name="T36">B</text:span>old font <text:span text:style-name="T36">indicates code that is mandatory (i.e. “kovizProgram” is the function name that koviz expects for external programs).</text:span></text:p>
      <text:p text:style-name="P56"><text:span text:style-name="T52">#include &lt;math.h&gt;<text:line-break/></text:span><text:span text:style-name="T4"><text:line-break/>void</text:span><text:span text:style-name="T3"> kovizProgram( double* in, int numIn, double* out, int numOut )</text:span><text:line-break/><text:span text:style-name="T3">{</text:span></text:p>
      <text:p text:style-name="P94">out[0] = sqrt(in[0]*in[0] + in[1]*in[1] + in[2]*in[2]);</text:p>
      <text:p text:style-name="P55">}</text:p>
      <text:h text:style-name="P185" text:outline-level="3"><text:bookmark-start text:name="__RefHeading___Toc907_1341101074"/>Building <text:span text:style-name="T54">Example </text:span>External Program On Linux<text:line-break/><text:bookmark-end text:name="__RefHeading___Toc907_1341101074"/></text:h>
      <text:p text:style-name="P69">% cc -fPIC -c rss.c<text:line-break/>% ld -shared -o librss.so rss.o -lm -lc</text:p>
      <text:h text:style-name="P210"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53">Step 1. cc <text:span text:style-name="T51">-fPIC </text:span>-c &lt;myprogram1&gt;.c (compile all individual object this way) </text:p>
      <text:p text:style-name="P53">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53">Step 1. cc -c &lt;myprogram1&gt;.c (compile all individual object this way) </text:p>
      <text:p text:style-name="P53">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6">Set </text:span>LD_LIBRARY_PATH <text:span text:style-name="T36">so that koviz can find the </text:span>shared object. </text:p>
      <text:p text:style-name="P9"><text:span text:style-name="T6">Try</text:span> the following to see if <text:span text:style-name="T6">the</text:span> newly create shared object has unresolved dependencies: </text:p>
      <text:p text:style-name="P53">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43">UNIX Prompt&gt; koviz DP_external_program RUN_name</text:span></text:p>
      <text:h text:style-name="Heading_20_3" text:outline-level="3"><text:bookmark-start text:name="__RefHeading__393_403196617"/>External Program Problems And Caveats <text:bookmark-end text:name="__RefHeading__393_403196617"/></text:h>
      <text:list xml:id="list4113570790" text:style-name="L2">
        <text:list-item>
          <text:p text:style-name="P217">Can’t load shared library!!! Ensure that $LD_LIBRARY_PATH is set so that koviz can find the *.so file. <text:s/>The external program (*.so program) may have unresolved dependencies. Try “nm” on the external program, and look for “U”s.</text:p>
        </text:list-item>
        <text:list-item>
          <text:p text:style-name="P218">Koviz will not scale or bias X values with external programs.</text:p>
        </text:list-item>
        <text:list-item>
          <text:p text:style-name="P217">External programs convert everything to doubles, and only accept and output doubles. </text:p>
        </text:list-item>
        <text:list-item>
          <text:p text:style-name="P217">External programs have no notion of unit conversion. </text:p>
        </text:list-item>
      </text:list>
      <text:h text:style-name="P168" text:outline-level="2"><text:bookmark-start text:name="__RefHeading___Toc1920_3517546431"/><text:soft-page-break/>Scripts<text:bookmark-end text:name="__RefHeading___Toc1920_3517546431"/></text:h>
      <text:p text:style-name="P37">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83">koviz -script “script1 arg1 arg2… argN, script2 arg1 arg2… argN, …”</text:p>
      <text:p text:style-name="P108"><text:span text:style-name="T161">When koviz is brought up the UI will put the scripts in </text:span><text:span text:style-name="T167">koviz’</text:span><text:span text:style-name="T161"> main menu. <text:s/>When the user selects the sc</text:span><text:span text:style-name="T162">r</text:span><text:span text:style-name="T161">ipt off the menu, the script will be called with the current RUN as the first argument followed by the user supplied arguments. <text:s/></text:span><text:span text:style-name="T162">Additionally, one may place an ampersand in front of a character to hot-key the menu item.</text:span></text:p>
      <text:p text:style-name="P108"><text:span text:style-name="T162">For example, suppose one has a this bash script, </text:span><text:span text:style-name="T168">show</text:span><text:span text:style-name="T162">-run.sh:</text:span></text:p>
      <text:p text:style-name="P82"><text:span text:style-name="T162">#! /</text:span><text:span text:style-name="T164">usr/bin/env bash<text:line-break/></text:span><text:span text:style-name="T165">xmessage</text:span><text:span text:style-name="T164"> “$1”</text:span></text:p>
      <text:p text:style-name="P108"><text:span text:style-name="T164">Try </text:span><text:span text:style-name="T166">the following with some RUN. <text:s/>Make sure double and single quotes are normal ASCII for this commandline call i.e. beware of cut-n-paste:</text:span></text:p>
      <text:p text:style-name="P84"><text:span text:style-name="T163">% koviz -</text:span><text:span text:style-name="T81">script “&amp;</text:span><text:span text:style-name="T83">show</text:span><text:span text:style-name="T81">-run.sh, &amp;koviz -t1 ‘Calling Koviz’” </text:span><text:span text:style-name="T82">&lt;RUN&gt;</text:span></text:p>
      <text:p text:style-name="P109"><text:span text:style-name="T81">Once koviz comes up, </text:span><text:span text:style-name="T84">select </text:span><text:span text:style-name="T85">Scripts &gt; show-run.sh</text:span></text:p>
      <text:p text:style-name="P107"><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62"><text:s/></text:span><text:s/></text:p>
      <text:h text:style-name="P169" text:outline-level="2"><text:bookmark-start text:name="__RefHeading___Toc2384_1878335349"/><text:soft-page-break/>Commandline Options<text:bookmark-end text:name="__RefHeading___Toc2384_1878335349"/></text:h>
      <text:p text:style-name="P43"><text:span text:style-name="T189">This section covers some of the commandline options that koviz offers.</text:span><text:span text:style-name="T190"><text:line-break/><text:line-break/>-</text:span><text:span text:style-name="T95">vars2csv &lt;csvfile.csv&gt;</text:span><text:span text:style-name="T93"><text:line-break/>This option will create a csv </text:span><text:span text:style-name="T97">from the list of variables given in the -vars option</text:span><text:span text:style-name="T93">. <text:s/>The -vars option must be used. <text:s text:c="2"/></text:span><text:span text:style-name="T94">The variable</text:span><text:span text:style-name="T97">s</text:span><text:span text:style-name="T94"> can be scaled, biased and given units. <text:s/>For example:<text:line-break/> koviz RUN_test -vars “ball.state.out.position[0]</text:span><text:span text:style-name="T93"> </text:span><text:span text:style-name="T94">{ft} scale(-1) bias(100), ball.state.out.velocity {mph}” <text:s text:c="2"/>-</text:span><text:span text:style-name="T96">vars2csv posvel.csv</text:span><text:span text:style-name="T94"><text:line-break/></text:span></text:p>
      <text:h text:style-name="P164" text:outline-level="2"><text:bookmark-start text:name="__RefHeading__761_403196617"/><text:soft-page-break/><text:span text:style-name="T31">Plot</text:span> Interaction<text:bookmark-end text:name="__RefHeading__761_403196617"/></text:h>
      <table:table table:name="Table1" table:style-name="Table1">
        <table:table-column table:style-name="Table1.A"/>
        <table:table-column table:style-name="Table1.B"/>
        <table:table-row table:style-name="TableLine94828016505616">
          <table:table-cell table:style-name="Table1.A1" office:value-type="string">
            <text:p text:style-name="P126">Select Curve</text:p>
          </table:table-cell>
          <table:table-cell table:style-name="Table1.B1" office:value-type="string">
            <text:p text:style-name="P126">Mouse Left Click Curve</text:p>
          </table:table-cell>
        </table:table-row>
        <table:table-row table:style-name="TableLine94828016410640">
          <table:table-cell table:style-name="Table1.A2" office:value-type="string">
            <text:p text:style-name="P133">Drag Curve</text:p>
          </table:table-cell>
          <table:table-cell table:style-name="Table1.B2" office:value-type="string">
            <text:p text:style-name="P133">Mouse Left Click Curve to select<text:line-break/>Then Keypress Crtl + Mouse Left Drag</text:p>
          </table:table-cell>
        </table:table-row>
        <table:table-row table:style-name="TableLine94828016416416">
          <table:table-cell table:style-name="Table1.A2" office:value-type="string">
            <text:p text:style-name="P133">Drag Curve Onto Another Curve</text:p>
          </table:table-cell>
          <table:table-cell table:style-name="Table1.B2" office:value-type="string">
            <text:p text:style-name="P133">Mouse Left Click Curve to select<text:line-break/>Then Keypress Alt+Ctrl+Mouse Left Drag<text:line-break/>making init points of both curves close enough to “snap”</text:p>
          </table:table-cell>
        </table:table-row>
        <table:table-row table:style-name="TableLine94828016420864">
          <table:table-cell table:style-name="Table1.A2" office:value-type="string">
            <text:p text:style-name="P125">Zoom In</text:p>
          </table:table-cell>
          <table:table-cell table:style-name="Table1.B2" office:value-type="string">
            <text:p text:style-name="P125">Mouse <text:span text:style-name="T32">Middle</text:span> Click <text:span text:style-name="T33">a</text:span>nd Drag Zoom Box</text:p>
          </table:table-cell>
        </table:table-row>
        <table:table-row table:style-name="TableLine94828016325488">
          <table:table-cell table:style-name="Table1.A2" office:value-type="string">
            <text:p text:style-name="P125">Zoom Out</text:p>
          </table:table-cell>
          <table:table-cell table:style-name="Table1.B2" office:value-type="string">
            <text:p text:style-name="P125">Mouse Right Click <text:span text:style-name="T68">or Keypress Escape</text:span></text:p>
          </table:table-cell>
        </table:table-row>
        <table:table-row table:style-name="TableLine94828016429856">
          <table:table-cell table:style-name="Table1.A2" office:value-type="string">
            <text:p text:style-name="P126">Pan</text:p>
          </table:table-cell>
          <table:table-cell table:style-name="Table1.B2" office:value-type="string">
            <text:p text:style-name="P126">Mouse Left Drag In Middle Of Plot</text:p>
          </table:table-cell>
        </table:table-row>
        <table:table-row table:style-name="TableLine94828016433136">
          <table:table-cell table:style-name="Table1.A2" office:value-type="string">
            <text:p text:style-name="P126">Scale</text:p>
          </table:table-cell>
          <table:table-cell table:style-name="Table1.B2" office:value-type="string">
            <text:p text:style-name="P126">Mouse Left Drag In Outter Extremity Of Plot</text:p>
          </table:table-cell>
        </table:table-row>
        <table:table-row table:style-name="TableLine94828016448688">
          <table:table-cell table:style-name="Table1.A2" office:value-type="string">
            <text:p text:style-name="P126"><text:span text:style-name="T50">Toggle Single/Multiplot </text:span>View</text:p>
          </table:table-cell>
          <table:table-cell table:style-name="Table1.B2" office:value-type="string">
            <text:p text:style-name="P126">Mouse Left Click <text:span text:style-name="T50">On Y-Axis Label or Plot Title</text:span></text:p>
          </table:table-cell>
        </table:table-row>
        <table:table-row table:style-name="TableLine94828016452032">
          <table:table-cell table:style-name="Table1.A2" office:value-type="string">
            <text:p text:style-name="P128"><text:span text:style-name="T35">Toggle</text:span> Y Axis Units</text:p>
          </table:table-cell>
          <table:table-cell table:style-name="Table1.B2" office:value-type="string">
            <text:p text:style-name="P128">Mouse Wheel Over Y-Axis Unit In Curly Braces {<text:span text:style-name="T35">unit</text:span>}</text:p>
          </table:table-cell>
        </table:table-row>
        <table:table-row table:style-name="TableLine94828016461760">
          <table:table-cell table:style-name="Table1.A2" office:value-type="string">
            <text:p text:style-name="P132">Toggle Linear/Logscale</text:p>
          </table:table-cell>
          <table:table-cell table:style-name="Table1.B2" office:value-type="string">
            <text:p text:style-name="P132">Mouse Wheel over x or y tic values</text:p>
          </table:table-cell>
        </table:table-row>
        <table:table-row table:style-name="TableLine94828016468928">
          <table:table-cell table:style-name="Table1.A2" office:value-type="string">
            <text:p text:style-name="P127">Suspend Live Coordinate Updates</text:p>
          </table:table-cell>
          <table:table-cell table:style-name="Table1.B2" office:value-type="string">
            <text:p text:style-name="P127">Keypress Shift While Mov<text:span text:style-name="T34">ing</text:span> Mouse Off Plot</text:p>
          </table:table-cell>
        </table:table-row>
        <table:table-row table:style-name="TableLine94828016516784">
          <table:table-cell table:style-name="Table1.A2" office:value-type="string">
            <text:p text:style-name="P128">Toggle Presentation <text:span text:style-name="T136">(compare/error)</text:span></text:p>
          </table:table-cell>
          <table:table-cell table:style-name="Table1.B2" office:value-type="string">
            <text:p text:style-name="P128">Keypress Spacebar</text:p>
          </table:table-cell>
        </table:table-row>
        <table:table-row table:style-name="TableLine94828016492640">
          <table:table-cell table:style-name="Table1.A2" office:value-type="string">
            <text:p text:style-name="P128">Print Current Coordinate <text:span text:style-name="T70">&amp; Dx,Dy</text:span></text:p>
          </table:table-cell>
          <table:table-cell table:style-name="Table1.B2" office:value-type="string">
            <text:p text:style-name="P128">Keypress Period</text:p>
          </table:table-cell>
        </table:table-row>
        <table:table-row table:style-name="TableLine94828016609328">
          <table:table-cell table:style-name="Table1.A2" office:value-type="string">
            <text:p text:style-name="P130">Measure Distance On Plot</text:p>
          </table:table-cell>
          <table:table-cell table:style-name="Table1.B2" office:value-type="string">
            <text:p text:style-name="P130">Keypress Alt + Mouse Left Drag (updates koviz status bar)</text:p>
          </table:table-cell>
        </table:table-row>
        <table:table-row table:style-name="TableLine94828016610080">
          <table:table-cell table:style-name="Table1.A2" office:value-type="string">
            <text:p text:style-name="P129">Hop To Prev/Next Plot Coord</text:p>
          </table:table-cell>
          <table:table-cell table:style-name="Table1.B2" office:value-type="string">
            <text:p text:style-name="P129">Keypress Left/Right Arrow (after curve selected)</text:p>
          </table:table-cell>
        </table:table-row>
        <table:table-row table:style-name="TableLine94828016610880">
          <table:table-cell table:style-name="Table1.A2" office:value-type="string">
            <text:p text:style-name="P129">Place Marker On Plot Coord</text:p>
          </table:table-cell>
          <table:table-cell table:style-name="Table1.B2" office:value-type="string">
            <text:p text:style-name="P129">Keypress Comma</text:p>
          </table:table-cell>
        </table:table-row>
        <table:table-row table:style-name="TableLine94828016611680">
          <table:table-cell table:style-name="Table1.A2" office:value-type="string">
            <text:p text:style-name="P131">Change X Axis Variable <text:span text:style-name="T145">(normal)</text:span></text:p>
          </table:table-cell>
          <table:table-cell table:style-name="Table1.B2" office:value-type="string">
            <text:p text:style-name="P131"><text:span text:style-name="T71">Options-&gt;</text:span>Drag-n-Drop. Drag-n-drop variable onto x-axis label.</text:p>
          </table:table-cell>
        </table:table-row>
        <table:table-row table:style-name="TableLine94828016612480">
          <table:table-cell table:style-name="Table1.A2" office:value-type="string">
            <text:p text:style-name="P142">Change X Axis Variable (live data)</text:p>
          </table:table-cell>
          <table:table-cell table:style-name="Table1.B2" office:value-type="string">
            <text:p text:style-name="P142">See section at end on Live Sim Data</text:p>
          </table:table-cell>
        </table:table-row>
        <table:table-row table:style-name="TableLine94828016613280">
          <table:table-cell table:style-name="Table1.A2" office:value-type="string">
            <text:p text:style-name="P134">Frequency Domain Toggle</text:p>
          </table:table-cell>
          <table:table-cell table:style-name="Table1.B2" office:value-type="string">
            <text:p text:style-name="P134">Keypress f</text:p>
          </table:table-cell>
        </table:table-row>
        <table:table-row table:style-name="TableLine94828016614080">
          <table:table-cell table:style-name="Table1.A2" office:value-type="string">
            <text:p text:style-name="P135">Butterworth Filter</text:p>
          </table:table-cell>
          <table:table-cell table:style-name="Table1.B2" office:value-type="string">
            <text:p text:style-name="P135">Keypress b</text:p>
          </table:table-cell>
        </table:table-row>
        <table:table-row table:style-name="TableLine94828016614880">
          <table:table-cell table:style-name="Table1.A2" office:value-type="string">
            <text:p text:style-name="P136">Savitzky-Golay Filter</text:p>
          </table:table-cell>
          <table:table-cell table:style-name="Table1.B2" office:value-type="string">
            <text:p text:style-name="P136">Keypress g</text:p>
          </table:table-cell>
        </table:table-row>
        <table:table-row table:style-name="TableLine94828016615680">
          <table:table-cell table:style-name="Table1.A2" office:value-type="string">
            <text:p text:style-name="P137">Flip Curve About <text:span text:style-name="T121">X</text:span>-Axis</text:p>
          </table:table-cell>
          <table:table-cell table:style-name="Table1.B2" office:value-type="string">
            <text:p text:style-name="P137">Keypress -</text:p>
          </table:table-cell>
        </table:table-row>
        <table:table-row table:style-name="TableLine94828016616480">
          <table:table-cell table:style-name="Table1.A2" office:value-type="string">
            <text:p text:style-name="P138">Derivative Of Curve</text:p>
          </table:table-cell>
          <table:table-cell table:style-name="Table1.B2" office:value-type="string">
            <text:p text:style-name="P138">Keypress d</text:p>
          </table:table-cell>
        </table:table-row>
        <table:table-row table:style-name="TableLine94828016617280">
          <table:table-cell table:style-name="Table1.A2" office:value-type="string">
            <text:p text:style-name="P139">Integral Of Curve</text:p>
          </table:table-cell>
          <table:table-cell table:style-name="Table1.B2" office:value-type="string">
            <text:p text:style-name="P139">Keypress i (use entry box for initial value, default to 0.0)</text:p>
          </table:table-cell>
        </table:table-row>
        <table:table-row table:style-name="TableLine94828016618080">
          <table:table-cell table:style-name="Table1.A2" office:value-type="string">
            <text:p text:style-name="P139">… <text:span text:style-name="T146">continued on next page</text:span></text:p>
          </table:table-cell>
          <table:table-cell table:style-name="Table1.B2" office:value-type="string">
            <text:p text:style-name="P139">...</text:p>
          </table:table-cell>
        </table:table-row>
      </table:table>
      <text:h text:style-name="P170" text:outline-level="2"><text:soft-page-break/></text:h>
      <table:table table:name="Table2" table:style-name="Table2">
        <table:table-column table:style-name="Table2.A"/>
        <table:table-column table:style-name="Table2.B"/>
        <table:table-row table:style-name="TableLine94828016619344">
          <table:table-cell table:style-name="Table2.A1" office:value-type="string">
            <text:p text:style-name="P146">Summation of all curves on plot</text:p>
          </table:table-cell>
          <table:table-cell table:style-name="Table2.B1" office:value-type="string">
            <text:p text:style-name="P146">Keypress s</text:p>
          </table:table-cell>
        </table:table-row>
        <table:table-row table:style-name="TableLine94828016637712">
          <table:table-cell table:style-name="Table2.A2" office:value-type="string">
            <text:p text:style-name="P147">Magnitude of all curves on plot</text:p>
          </table:table-cell>
          <table:table-cell table:style-name="Table2.B2" office:value-type="string">
            <text:p text:style-name="P147">Keypress m</text:p>
          </table:table-cell>
        </table:table-row>
        <table:table-row table:style-name="TableLine94828016638480">
          <table:table-cell table:style-name="Table2.A2" office:value-type="string">
            <text:p text:style-name="P144"><text:span text:style-name="T149">Plot e</text:span><text:span text:style-name="T140">xpand</text:span><text:span text:style-name="T149">ed</text:span><text:span text:style-name="T140"> </text:span><text:span text:style-name="T145">live sim </text:span><text:span text:style-name="T140">parameter</text:span><text:span text:style-name="T149">s</text:span><text:span text:style-name="T140"> </text:span><text:span text:style-name="T149">on</text:span><text:span text:style-name="T140"> individual pages</text:span></text:p>
          </table:table-cell>
          <table:table-cell table:style-name="Table2.B2" office:value-type="string">
            <text:p text:style-name="P143">Left Mouse Click Parameter</text:p>
          </table:table-cell>
        </table:table-row>
        <table:table-row table:style-name="TableLine94828016638736">
          <table:table-cell table:style-name="Table2.A2" office:value-type="string">
            <text:p text:style-name="P144"><text:span text:style-name="T149">Plot e</text:span><text:span text:style-name="T145">xpand</text:span><text:span text:style-name="T149">ed</text:span><text:span text:style-name="T145"> live sim parameter</text:span><text:span text:style-name="T149">s</text:span><text:span text:style-name="T145"> </text:span><text:span text:style-name="T149">on</text:span><text:span text:style-name="T145"> individual plots on same page</text:span></text:p>
          </table:table-cell>
          <table:table-cell table:style-name="Table2.B2" office:value-type="string">
            <text:p text:style-name="P143">Keypress Ctrl + Left Mouse Click Parameter</text:p>
          </table:table-cell>
        </table:table-row>
        <table:table-row table:style-name="TableLine94828016638992">
          <table:table-cell table:style-name="Table2.A2" office:value-type="string">
            <text:p text:style-name="P144"><text:span text:style-name="T151">Co</text:span><text:span text:style-name="T149">Plot e</text:span><text:span text:style-name="T145">xpand</text:span><text:span text:style-name="T149">ed</text:span><text:span text:style-name="T145"> live sim parameter</text:span><text:span text:style-name="T149">s</text:span><text:span text:style-name="T145"> </text:span><text:span text:style-name="T149">on</text:span><text:span text:style-name="T145"> same plot</text:span></text:p>
          </table:table-cell>
          <table:table-cell table:style-name="Table2.B2" office:value-type="string">
            <text:p text:style-name="P143">Keypress Alt + Left Mouse Click Parameter</text:p>
          </table:table-cell>
        </table:table-row>
        <table:table-row table:style-name="TableLine94828016639584">
          <table:table-cell table:style-name="Table2.A2" office:value-type="string">
            <text:p text:style-name="P145">Start a new plot page<text:line-break/>and honor optional Ctrl and Alt keys</text:p>
          </table:table-cell>
          <table:table-cell table:style-name="Table2.B2" office:value-type="string">
            <text:p text:style-name="P145">Keypress Shift + [Ctrl|Alt] + Left Mouse click parameter</text:p>
          </table:table-cell>
        </table:table-row>
      </table:table>
      <text:h text:style-name="P165" text:outline-level="2"/>
      <text:h text:style-name="P178" text:outline-level="2"><text:bookmark-start text:name="__RefHeading__853_403196617"/>Maps<text:bookmark-end text:name="__RefHeading__853_403196617"/></text:h>
      <text:p text:style-name="Text_20_body"><text:span text:style-name="T56">Maps </text:span><text:span text:style-name="T41">are used to c</text:span><text:span text:style-name="T56">ompar</text:span><text:span text:style-name="T55">e</text:span><text:span text:style-name="T56"> simulation RUNs whose </text:span><text:span text:style-name="T55">variable</text:span><text:span text:style-name="T56"> names do not match. <text:s/>A map is either contained in a file or can be specified directly on the commandline. <text:s/></text:span><text:span text:style-name="T45">The map is a comma delimited set of key-values in the following form:</text:span></text:p>
      <text:p text:style-name="P93">“key1=value1=value2...,key2=value1=value2,...”</text:p>
      <text:p text:style-name="P17">Here is an example of comparing <text:span text:style-name="T56">simulation position </text:span>and velocity names differ.</text:p>
      <text:p text:style-name="P16">UNIX Prompt&gt; koviz -mapFile “spots2dyn.kvz” <text:span text:style-name="T58">RUN_spots RUN_dyn</text:span></text:p>
      <text:p text:style-name="P99">UNIX Prompt&gt; cat spots2dyn.kvz</text:p>
      <text:p text:style-name="P68">posx <text:s/>= <text:s/>spots.vehicle.pos[0] <text:s/>= <text:s/><text:span text:style-name="T42">veh[0].</text:span>dynamics.pos<text:span text:style-name="T42">X</text:span>,<text:line-break/>posy <text:s/>= <text:s/>spots.vehicle.pos[1] <text:s/>= <text:s/><text:span text:style-name="T42">veh[0].</text:span>dynamics.pos<text:span text:style-name="T42">Y,<text:line-break/>velx</text:span> <text:s text:c="2"/>= <text:s/>spots.vehicle.<text:span text:style-name="T42">vel</text:span>[1] <text:s/>= <text:s/><text:span text:style-name="T42">veh[0].</text:span>dynamics.<text:span text:style-name="T42">velY,<text:line-break/>vely </text:span><text:s text:c="2"/>= <text:s/>spots.vehicle.<text:span text:style-name="T42">vel</text:span>[1] <text:s/>= <text:s/><text:span text:style-name="T42">veh[0].</text:span>dynamics.<text:span text:style-name="T42">velY</text:span></text:p>
      <text:p text:style-name="P100">Maps may also be used to scale and bias variables. <text:s/>If the logged data has no units, units may be applied in the map file as well. <text:s/>Here is an example of map file with scale, bias and unit specs:</text:p>
      <text:p text:style-name="P70">ForceX = Fx <text:s text:c="14"/>= inertialForceZ {N},<text:line-break/>ForceY = Fy bias(-12.25) <text:s/>= inertialForceX {N},<text:line-break/>ForceZ = Fz scale(-1.0) <text:s text:c="2"/>= inertialForceY {N}</text:p>
      <text:h text:style-name="P171" text:outline-level="2"/>
      <text:h text:style-name="P179" text:outline-level="2"><text:bookmark-start text:name="__RefHeading___Toc1404_4203752023"/>Groups<text:bookmark-end text:name="__RefHeading___Toc1404_4203752023"/></text:h>
      <text:p text:style-name="P28"><text:span text:style-name="T122">When plotting multiple </text:span><text:span text:style-name="T123">RUNs</text:span><text:span text:style-name="T122">, one can group </text:span><text:span text:style-name="T123">RUN </text:span><text:span text:style-name="T122">subsets together for coloring, styling and labeling. <text:s/></text:span><text:span text:style-name="T123">Grouping is done via regular expressions and ranges. <text:s/>For example, </text:span><text:span text:style-name="T125">for the following</text:span><text:span text:style-name="T123"> set of RUNs: RUN_damp_1, RUN_damp_2, </text:span><text:span text:style-name="T125">RUN_clamped_1, RUN_clamped_2, </text:span><text:span text:style-name="T123">RUN_free_1, RUN_free_2, RUN_free_3, one could group “damped” </text:span><text:span text:style-name="T125">and “clamped” together </text:span><text:span text:style-name="T123"><text:s/>and </text:span><text:span text:style-name="T125">group </text:span><text:span text:style-name="T123">“free” </text:span><text:span text:style-name="T125">RUNs </text:span><text:span text:style-name="T123">with the following command:<text:line-break/></text:span></text:p>
      <text:p text:style-name="P77"><text:span text:style-name="T124">UNIX Prompt&gt; koviz </text:span><text:span text:style-name="T123">RUN* </text:span><text:span text:style-name="T125">\</text:span><text:span text:style-name="T123"><text:line-break/> <text:s text:c="38"/>-g1 “damp</text:span><text:span text:style-name="T125">|clamp”</text:span><text:span text:style-name="T123"> -l1 “Damped </text:span><text:span text:style-name="T125">and Clamped” </text:span><text:span text:style-name="T123">-c1 blue -ls1 </text:span><text:span text:style-name="T125">plain</text:span><text:span text:style-name="T123"> \</text:span></text:p>
      <text:p text:style-name="P77"><text:span text:style-name="T123"><text:s text:c="39"/>-g2 free -</text:span><text:span text:style-name="T125">l2 Free -c1 green -ls1 x_thick_line</text:span><text:span text:style-name="T123"><text:line-break/></text:span></text:p>
      <text:p text:style-name="P29">The following <text:span text:style-name="T128">command</text:span> uses ranges to <text:span text:style-name="T129">group the first ten RUNs as pink and</text:span> the 99<text:span text:style-name="T126">th</text:span> RUN as thick white:<text:line-break/></text:p>
      <text:p text:style-name="P78"><text:span text:style-name="T124">UNIX Prompt&gt; </text:span><text:span text:style-name="T128">koviz MONTE_RUN_test -bg black -fg "#ededed" \<text:line-break/> <text:s text:c="39"/>-g1 "0,10" -c1 pink -l1 "First </text:span><text:span text:style-name="T130">Ten</text:span><text:span text:style-name="T128"> Runs" \<text:line-break/> <text:s text:c="39"/>-g2 99 -c2 white -ls2 x_thick_line -l2 "Last Run" DP_pos_vs_acc</text:span></text:p>
      <text:h text:style-name="P171"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80" text:outline-level="2"><text:bookmark-start text:name="__RefHeading___Toc811_3249638883"/>Video<text:bookmark-end text:name="__RefHeading___Toc811_3249638883"/></text:h>
      <text:h text:style-name="P187" text:outline-level="3"><text:bookmark-start text:name="__RefHeading___Toc948_3009348355"/>Introduction<text:bookmark-end text:name="__RefHeading___Toc948_3009348355"/></text:h>
      <text:p text:style-name="P19">Koviz uses mpv <text:span text:style-name="T60">as</text:span> the backend video player. <text:s/><text:span text:style-name="T60">Any video that mpv can play e.g. *.mp4, *.avi can be tied to data.</text:span></text:p>
      <text:h text:style-name="P188" text:outline-level="3"><text:bookmark-start text:name="__RefHeading___Toc950_3009348355"/>Building <text:span text:style-name="T59">K</text:span>oviz with MPV <text:span text:style-name="T59">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60">the </text:span>mpv <text:span text:style-name="T60">dependencies and build koviz with video.</text:span></text:p>
      <text:p text:style-name="P73">% sudo yum install <text:s/>mpv-libs mpv-libs-devel mpv<text:line-break/>% cd &lt;koviz-repo&gt;<text:line-break/>% make distclean<text:line-break/>% qmake-qt5<text:line-break/>% make</text:p>
      <text:h text:style-name="P186"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89"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79">% koviz RUN_loadcell -video hammerstrike.mp4 -videoOffset 12.345</text:p>
      <text:p text:style-name="P105"/>
      <text:h text:style-name="P190" text:outline-level="3"><text:bookmark-start text:name="__RefHeading___Toc1683_1107607212"/><text:soft-page-break/>Commandline -video<text:span text:style-name="T131">List</text:span> option<text:bookmark-end text:name="__RefHeading___Toc1683_1107607212"/></text:h>
      <text:p text:style-name="P112"><text:span text:style-name="T131">The -videoList commandline option can be used to tie multiple videos to a single RUN. <text:s/>The -videoList option takes a </text:span><text:span text:style-name="T132">comma separate </text:span><text:span text:style-name="T131">list of video:offsets using </text:span><text:span text:style-name="T132">a </text:span><text:span text:style-name="T131">colon to separate the video file name from the offset e.g:<text:line-break/><text:tab/>% koviz RUN_fun -videoLis</text:span><text:span text:style-name="T132">t</text:span><text:span text:style-name="T13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91"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71"><text:span text:style-name="T61">Session – Hammer Video Sync<text:line-break/>RUN: RUN_loadcell<text:line-break/>PRODUCT: DP_</text:span><text:span text:style-name="T62">forces</text:span><text:span text:style-name="T61"><text:line-break/>video: Video</text:span><text:span text:style-name="T63">s</text:span><text:span text:style-name="T61">/</text:span><text:span text:style-name="T62">hammerstrike</text:span><text:span text:style-name="T61">.mp4<text:line-break/>videoOffset: 1</text:span><text:span text:style-name="T62">2</text:span><text:span text:style-name="T61">.</text:span><text:span text:style-name="T62">345</text:span></text:p>
      <text:p text:style-name="P102"><text:span text:style-name="T15">To</text:span><text:span text:style-name="T16"> run:</text:span></text:p>
      <text:p text:style-name="P64">% koviz -session session_hammer</text:p>
      <text:h text:style-name="P192" text:outline-level="3"><text:bookmark-start text:name="__RefHeading___Toc1078_3009348355"/>Video Directory Within RUN<text:bookmark-end text:name="__RefHeading___Toc1078_3009348355"/></text:h>
      <text:p text:style-name="P21">Another way, when there are multiple RUNs <text:span text:style-name="T64">tied to s</text:span><text:span text:style-name="T135">ingle</text:span><text:span text:style-name="T64"> videos, is to create a “video” directory </text:span><text:span text:style-name="T185">(or customize </text:span><text:span text:style-name="T185"><text:bookmark-ref text:reference-format="page" text:ref-name="__RefHeading___Toc4425_149071425">22</text:bookmark-ref></text:span><text:span text:style-name="T185">)</text:span><text:span text:style-name="T64">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72">RUN_loadcell/</text:p>
      <text:p text:style-name="P95">loadcell_data.csv<text:line-break/>video/</text:p>
      <text:p text:style-name="P119">hammerstrike.mp4<text:line-break/>video-offset.txt (containing 12.345)</text:p>
      <text:p text:style-name="P103">If the RUN directory is setup this way the following will bring up the data and the associated video:</text:p>
      <text:p text:style-name="P72">% koviz RUN_loadcel<text:span text:style-name="T65">l</text:span></text:p>
      <text:h text:style-name="P193" text:outline-level="3"><text:bookmark-start text:name="__RefHeading___Toc1080_3009348355"/><text:soft-page-break/>Multiple RUNs <text:span text:style-name="T132">And</text:span> Multiple Videos<text:bookmark-end text:name="__RefHeading___Toc1080_3009348355"/></text:h>
      <text:p text:style-name="P30"><text:span text:style-name="T132">Finally, </text:span><text:span text:style-name="T133">to tie</text:span><text:span text:style-name="T132"> multiple videos per RUN, <text:s/></text:span><text:span text:style-name="T133">place a set of videos in the “RUN/video” directory </text:span><text:span text:style-name="T185">(or customize </text:span><text:span text:style-name="T185"><text:bookmark-ref text:reference-format="page" text:ref-name="__RefHeading___Toc4425_149071425">22</text:bookmark-ref></text:span><text:span text:style-name="T185">)</text:span><text:span text:style-name="T133"> and create a file called “video-offsets”</text:span><text:span text:style-name="T184">. <text:s/></text:span><text:span text:style-name="T133">The format of “video-offsets” is </text:span><text:span text:style-name="T135">a </text:span><text:span text:style-name="T133">comma separated list of video/offsets as shown in the example below. <text:s/></text:span><text:span text:style-name="T6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34">Here is an example layout of two RUNs with multiple videos:</text:span></text:p>
      <text:p text:style-name="P152">RUN_a/<text:line-break/><text:tab/>log_RddrSimhost_DtaMtaRelMot.trk<text:line-break/><text:tab/><text:span text:style-name="T13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52"><text:span text:style-name="T134">RUN_b/<text:line-break/><text:tab/></text:span>log_RddrSimhost_DtaMtaRelMot.trk<text:span text:style-name="T13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34">cat RUN_a/video/video-offsets.txt:</text:span></text:p>
      <text:p text:style-name="P154"><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p text:style-name="P154"/>
      <text:h text:style-name="P194" text:outline-level="3"><text:bookmark-start text:name="__RefHeading___Toc4425_149071425"/><text:soft-page-break/>Custom Video Directory Path<text:bookmark-end text:name="__RefHeading___Toc4425_149071425"/></text:h>
      <text:p text:style-name="P42">By default, koviz will search for a “video” directory in the RUN directory. <text:s/>If one would rather place the videos associated with the RUN data in another location, one can give koviz a relative path from the RUN to the video directory. <text:s/>There are two ways to set the video directory. <text:s/>First, one can use the commandline option -videoDir. <text:s/>Second, one can set the video directory path in the main UI window: Options &gt; VideoDirectory. <text:s/>For example, if the data is structured like below, one would set the Option &gt; VideoDirectory to “../Video” <text:span text:style-name="T183">since the relative path from the directory with the sim data to the Video directory is “../Video”</text:span>:<text:line-break/></text:p>
      <text:p text:style-name="P86">RUN_a/</text:p>
      <text:p text:style-name="P96">DATA/</text:p>
      <text:p text:style-name="P120">log_Mars_environment.trk<text:line-break/>log_Mars_rover.trk</text:p>
      <text:p text:style-name="P96">Video/</text:p>
      <text:p text:style-name="P120">video-offsets.txt<text:line-break/>video-1.mp4<text:line-break/>video-2.mp4</text:p>
      <text:h text:style-name="P181" text:outline-level="2"><text:bookmark-start text:name="__RefHeading___Toc1340_1544136475"/>Blender<text:bookmark-end text:name="__RefHeading___Toc1340_1544136475"/></text:h>
      <text:h text:style-name="P195" text:outline-level="3"><text:bookmark-start text:name="__RefHeading___Toc1342_1544136475"/>Introduction<text:bookmark-end text:name="__RefHeading___Toc1342_1544136475"/></text:h>
      <text:p text:style-name="P24"><text:span text:style-name="T72">Koviz is able to synchronize its plots to Blender animations via a koviz Blender plugin. <text:s/></text:span><text:span text:style-name="T105">The start/end times of the koviz </text:span><text:span text:style-name="T107">simulation run </text:span><text:span text:style-name="T105">data are mapped to the begin/end frame</text:span><text:span text:style-name="T106">s </text:span><text:span text:style-name="T105">of the Blender animation. <text:s/>After selecting a koviz curve, mouse movement updates koviz </text:span><text:span text:style-name="T106">live </text:span><text:span text:style-name="T105">time interactively. <text:s/>Th</text:span><text:span text:style-name="T106">e</text:span><text:span text:style-name="T105"> koviz live time is sent to Blender while the mouse moves. <text:s/>Blender interpolates the koviz time to the animation frame and updates the Blender scene. <text:s/></text:span><text:span text:style-name="T106">The sync works from Blender to koviz as well. <text:s/>With mouse/keyboard focus on the Blender window, running the Blender animation will send koviz time updates </text:span><text:span text:style-name="T110">and update koviz plot live time.</text:span></text:p>
      <text:h text:style-name="P195" text:outline-level="3"><text:bookmark-start text:name="__RefHeading___Toc1344_1544136475"/>Blender Addon Setup<text:bookmark-end text:name="__RefHeading___Toc1344_1544136475"/></text:h>
      <text:p text:style-name="P24"><text:span text:style-name="T73">F</text:span><text:span text:style-name="T72">irst, add koviz to Blender’s addons. <text:s/></text:span><text:span text:style-name="T109">E</text:span><text:span text:style-name="T73">xample:</text:span></text:p>
      <text:p text:style-name="P75">% <text:span text:style-name="T73">cd $HOME/.config/blender/2.9</text:span><text:span text:style-name="T186">3</text:span><text:span text:style-name="T73">/scripts/addons</text:span></text:p>
      <text:p text:style-name="P75">% <text:span text:style-name="T73">ln </text:span><text:span text:style-name="T75">-s &lt;koviz-home&gt;/python/koviz.py koviz.py</text:span></text:p>
      <text:h text:style-name="P196" text:outline-level="3"><text:bookmark-start text:name="__RefHeading___Toc1346_1544136475"/>Animate Blender Default Cube<text:bookmark-end text:name="__RefHeading___Toc1346_1544136475"/></text:h>
      <text:p text:style-name="P25"><text:span text:style-name="T113">As an example, m</text:span><text:span text:style-name="T111">ake an animation of Blender’s cube:</text:span></text:p>
      <text:list xml:id="list2612911492" text:style-name="L3">
        <text:list-item>
          <text:p text:style-name="P219"><text:span text:style-name="T111">Bring up blender:<text:line-break/>% </text:span><text:span text:style-name="T112">blender</text:span></text:p>
        </text:list-item>
        <text:list-item>
          <text:p text:style-name="P220">Right click &gt; Insert Keyframe &gt; Location</text:p>
        </text:list-item>
        <text:list-item>
          <text:p text:style-name="P220">Slide animation frame to 250</text:p>
        </text:list-item>
        <text:list-item>
          <text:p text:style-name="P220">Move cube up 6: KeyPress gz6</text:p>
        </text:list-item>
        <text:list-item>
          <text:p text:style-name="P220">Right click &gt; Insert Keyframe &gt; Location</text:p>
        </text:list-item>
        <text:list-item>
          <text:p text:style-name="P220">Run animation by mouse clicking |&lt; followed by <text:s/>&gt;</text:p>
        </text:list-item>
        <text:list-item>
          <text:p text:style-name="P220">Save as cube.blend</text:p>
        </text:list-item>
        <text:list-item>
          <text:p text:style-name="P220">Close blender</text:p>
        </text:list-item>
      </text:list>
      <text:h text:style-name="P184" text:outline-level="3"/>
      <text:h text:style-name="P209"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76">% <text:span text:style-name="T108">blender cube.blend -P </text:span><text:span text:style-name="T76">&lt;koviz-home&gt;/blender/koviz-hello-world.py<text:line-break/></text:span><text:span text:style-name="T77"># Should see “Listen for koviz connection”</text:span></text:p>
      <text:p text:style-name="P110"><text:span text:style-name="T88">Run koviz on the supplied </text:span><text:span text:style-name="T86">position.csv file with 250 points. <text:s/>Note that time will go from 1 to 250 and map to the Blender frames. <text:s/>Position </text:span><text:span text:style-name="T90">linearly </text:span><text:span text:style-name="T86">moves from 0 to 6. <text:s/></text:span><text:span text:style-name="T91">This directly maps sim time to blender frames. <text:s/>It’s not necessary to make this direct frame to time map, it just made for a nice example. <text:s/></text:span><text:span text:style-name="T92">In general, koviz maps the start Blender frame to first time stamp and last Blender frame to the last time stamp.</text:span><text:span text:style-name="T86"><text:line-break/><text:line-break/></text:span><text:span text:style-name="T87">% </text:span><text:span text:style-name="T88">koviz &lt;koviz-home&gt;/blender/cube-position.csv</text:span><text:span text:style-name="T77"><text:line-break/># </text:span><text:span text:style-name="T89">Blender will say “Accept koviz connection!”</text:span></text:p>
      <text:p text:style-name="P104">To see koviz time synced to the Blender animation:</text:p>
      <text:list xml:id="list264953840" text:style-name="L4">
        <text:list-item>
          <text:p text:style-name="P221">In koviz, click <text:span text:style-name="T187">position</text:span></text:p>
        </text:list-item>
        <text:list-item>
          <text:p text:style-name="P221">Mouse select the curve</text:p>
        </text:list-item>
        <text:list-item>
          <text:p text:style-name="P221">Move mouse to see Blender animation sync<text:line-break/>!! If it does not sync, click off of koviz curve, reselect curve and try moving mouse again.</text:p>
        </text:list-item>
      </text:list>
      <text:p text:style-name="P104">To see Blender animation sync to koviz:</text:p>
      <text:list xml:id="list3974619742" text:style-name="L5">
        <text:list-item>
          <text:p text:style-name="P222"><text:s/>Select curve in koviz (if not already done)</text:p>
        </text:list-item>
        <text:list-item>
          <text:p text:style-name="P225"><text:span text:style-name="T79">Click </text:span><text:span text:style-name="T78">Blender </text:span><text:span text:style-name="T79">window so Blender has focus</text:span></text:p>
        </text:list-item>
        <text:list-item>
          <text:p text:style-name="P225"><text:span text:style-name="T79">R</text:span><text:span text:style-name="T78">un </text:span><text:span text:style-name="T79">Blender </text:span><text:span text:style-name="T78">animation </text:span><text:span text:style-name="T79">by mouse clicking </text:span><text:span text:style-name="T80">the play button </text:span><text:span text:style-name="T79">&gt;</text:span></text:p>
        </text:list-item>
      </text:list>
      <text:h text:style-name="Heading_20_3" text:outline-level="3"/>
      <text:h text:style-name="P209" text:outline-level="3"><text:bookmark-start text:name="__RefHeading___Toc1350_1544136475"/>Sync Blender To Koviz <text:span text:style-name="T114">With ES’s Vismo</text:span><text:bookmark-end text:name="__RefHeading___Toc1350_1544136475"/></text:h>
      <text:p text:style-name="P26"><text:span text:style-name="T114">The Engineering Structures group have tied their vismo Blender tool to koviz. <text:s/>If you are lucky enough to have vismo, </text:span><text:span text:style-name="T117">h</text:span><text:span text:style-name="T115">ere is an example. <text:s/></text:span><text:span text:style-name="T116">The -k option tells vismo to sync using koviz:</text:span><text:span text:style-name="T115"><text:line-break/></text:span></text:p>
      <text:list xml:id="list1124888811" text:style-name="L6">
        <text:list-header>
          <text:p text:style-name="P226"><text:span text:style-name="T114">% </text:span><text:span text:style-name="T116">cd &lt;rddr-nds&gt;<text:line-break/>% . .Trick_user_profile ; # To put vismo.py in $PATH<text:line-break/>% cd &lt;rddr-nds&gt;/sims/rddr/nds/SIM_nds<text:line-break/>% </text:span><text:span text:style-name="T117">trick-CP</text:span><text:span text:style-name="T116"><text:line-break/>% ./S_main* SET_checkout/SET_m1u/RUN_checkout_MaxJackknife/input.py<text:line-break/>% vismo.py -k SET_checkout/SET_m1u/RUN_checkout_MaxJackknife<text:line-break/> <text:s text:c="4"/></text:span><text:span text:style-name="T117"># Listen for koviz connection...<text:line-break/>% koviz </text:span><text:span text:style-name="T116">SET_checkout/SET_m1u/RUN_checkout_MaxJackknife </text:span></text:p>
          <text:list>
            <text:list-header>
              <text:p text:style-name="P227"># Should see “Connected to host=127.0.0.1 port=64053!”<text:line-break/></text:p>
            </text:list-header>
          </text:list>
        </text:list-header>
      </text:list>
      <text:p text:style-name="P111">To see the koviz to Blender sync:</text:p>
      <text:list xml:id="list2957270136" text:style-name="L7">
        <text:list-item>
          <text:p text:style-name="P229"><text:span text:style-name="T119">I</text:span><text:span text:style-name="T117">n </text:span><text:span text:style-name="T118">the </text:span><text:span text:style-name="T117">koviz search </text:span><text:span text:style-name="T118">box, </text:span><text:span text:style-name="T117">type “Fqu.daActuator”</text:span></text:p>
        </text:list-item>
        <text:list-item>
          <text:p text:style-name="P229"><text:span text:style-name="T117">Scroll over all 6 vars to coplot 6 actuators on s</text:span><text:span text:style-name="T119">i</text:span><text:span text:style-name="T117">ngle page</text:span></text:p>
        </text:list-item>
        <text:list-item>
          <text:p text:style-name="P231">Select a curve and move mouse to see data synced to docking animation</text:p>
        </text:list-item>
      </text:list>
      <text:p text:style-name="P150"><text:span text:style-name="T114"><text:line-break/></text:span><text:span text:style-name="T119">To see the Blender to koviz syn</text:span><text:span text:style-name="T120">c</text:span><text:span text:style-name="T119">:</text:span></text:p>
      <text:list xml:id="list1748348171" text:style-name="L8">
        <text:list-item>
          <text:p text:style-name="P232">In the Blender window click the |&lt; to put the animation at the beginning</text:p>
        </text:list-item>
        <text:list-item>
          <text:p text:style-name="P232">Press &gt; to play</text:p>
        </text:list-item>
        <text:list-item>
          <text:p text:style-name="P232">The koviz live time should update along with the animation</text:p>
        </text:list-item>
        <text:list-item>
          <text:p text:style-name="P232">Pause the Blender animation by pressing the | | pause button</text:p>
        </text:list-item>
        <text:list-item>
          <text:p text:style-name="P230"><text:span text:style-name="T120">Press the keyboard right and left arrow keys to step the animation and watch koviz update frame by frame</text:span><text:span text:style-name="T114"><text:line-break/></text:span></text:p>
        </text:list-item>
      </text:list>
      <text:p text:style-name="P151"/>
      <text:p text:style-name="P151"/>
      <text:p text:style-name="P151"/>
      <text:h text:style-name="P172" text:outline-level="2"><text:bookmark-start text:name="__RefHeading___Toc1685_1107607212"/><text:soft-page-break/>Live Trick <text:span text:style-name="T150">TV Plots</text:span><text:bookmark-end text:name="__RefHeading___Toc1685_1107607212"/></text:h>
      <text:h text:style-name="P197" text:outline-level="3"><text:bookmark-start text:name="__RefHeading___Toc1687_1107607212"/>Introduction<text:bookmark-end text:name="__RefHeading___Toc1687_1107607212"/></text:h>
      <text:p text:style-name="P106"><text:span text:style-name="T13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38">for example, to connect to a running sim on the localhost and port 4545:<text:line-break/><text:line-break/><text:tab/>% koviz RUN_realtime -trickport 4545<text:line-break/><text:line-break/></text:span><text:span text:style-name="T147">If the Trick sim is running on a different host, use the -trickhost &lt;host&gt; option.</text:span></text:p>
      <text:h text:style-name="P198"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44">variable</text:span>s since position has two dimensions <text:s/>e.g.:<text:line-break/><text:line-break/><text:tab/>ball.state.out.position[0]<text:line-break/><text:tab/>ball.state.out.position[1]<text:line-break/><text:line-break/>When one clicks a koviz-tv parameter, by default it makes a single plot <text:span text:style-name="T13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54">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828016714240">
          <table:table-cell table:style-name="LivePlotInteraction.A1" office:value-type="string">
            <text:p text:style-name="P141"><text:span text:style-name="T148">Plot e</text:span><text:span text:style-name="T140">xpand</text:span><text:span text:style-name="T148">ed</text:span><text:span text:style-name="T140"> parameter </text:span><text:span text:style-name="T148">o</text:span><text:span text:style-name="T140">n individual pages</text:span></text:p>
          </table:table-cell>
          <table:table-cell table:style-name="LivePlotInteraction.A1" office:value-type="string">
            <text:p text:style-name="P140">Left Mouse Click parameter</text:p>
          </table:table-cell>
        </table:table-row>
        <table:table-row table:style-name="TableLine94828016693616">
          <table:table-cell table:style-name="LivePlotInteraction.A1" office:value-type="string">
            <text:p text:style-name="P141"><text:span text:style-name="T148">Plot e</text:span><text:span text:style-name="T140">xpand</text:span><text:span text:style-name="T148">ed</text:span><text:span text:style-name="T140"> parameter </text:span><text:span text:style-name="T148">on</text:span><text:span text:style-name="T140"> different plots on same page</text:span></text:p>
          </table:table-cell>
          <table:table-cell table:style-name="LivePlotInteraction.A1" office:value-type="string">
            <text:p text:style-name="P140">Ctrl-Key + Left Mouse Click parameter</text:p>
          </table:table-cell>
        </table:table-row>
        <table:table-row table:style-name="TableLine94828016695856">
          <table:table-cell table:style-name="LivePlotInteraction.A1" office:value-type="string">
            <text:p text:style-name="P141"><text:span text:style-name="T151">Cop</text:span><text:span text:style-name="T148">lot expanded </text:span><text:span text:style-name="T140">parameter on same plot </text:span></text:p>
          </table:table-cell>
          <table:table-cell table:style-name="LivePlotInteraction.A1" office:value-type="string">
            <text:p text:style-name="P140">Alt-Key + Left Mouse Click parameter</text:p>
          </table:table-cell>
        </table:table-row>
        <table:table-row table:style-name="TableLine94828016697888">
          <table:table-cell table:style-name="LivePlotInteraction.A1" office:value-type="string">
            <text:p text:style-name="P145">Start a new plot page<text:line-break/>and honor optional Ctrl and Alt keys</text:p>
          </table:table-cell>
          <table:table-cell table:style-name="LivePlotInteraction.A1" office:value-type="string">
            <text:p text:style-name="P145">Shift-Key + [Ctrl|Alt] + Left Mouse click parameter</text:p>
          </table:table-cell>
        </table:table-row>
      </table:table>
      <text:h text:style-name="Heading_20_3" text:outline-level="3"><text:soft-page-break/></text:h>
      <text:h text:style-name="P199" text:outline-level="3"><text:bookmark-start text:name="__RefHeading___Toc1691_1107607212"/>Changing Live Plot Domain<text:bookmark-end text:name="__RefHeading___Toc1691_1107607212"/></text:h>
      <text:p text:style-name="P32"><text:span text:style-name="T140">To change the plot domain (x-axis variable) one must select Options-&gt;EnableDragAndDrop, then drag </text:span><text:span text:style-name="T141">a </text:span><text:span text:style-name="T140">TV parameter onto the x-axis of the plot to change. <text:s/></text:span><text:span text:style-name="T141">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27">th</text:span><text:span text:style-name="T141">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42">for both </text:span>recorded data and live sim data. <text:s/><text:span text:style-name="T142">One can either specify the DP files on commandline or select the DPs from the DP panel when in live mode. <text:s/>The example below </text:span><text:span text:style-name="T143">has </text:span><text:span text:style-name="T142"><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52">Live </text:span>Spring <text:span text:style-name="T153">Plot </text:span>Example<text:bookmark-end text:name="__RefHeading___Toc1780_3036021424"/></text:h>
      <text:p text:style-name="P34">Koviz contains a spring sim example. <text:s/>To try the spring sim with live plotting, follow these steps:<text:line-break/></text:p>
      <text:list xml:id="list4015734085" text:style-name="L9">
        <text:list-item>
          <text:p text:style-name="P228">Build the koviz spring sim<text:line-break/>% cd &lt;koviz-home&gt;/sims/SIM_spring<text:line-break/>% trick-CP</text:p>
        </text:list-item>
        <text:list-item>
          <text:p text:style-name="P228">Launch the realtime spring sim (do not press start yet)<text:line-break/>% ./S_main*.exe RUN_realtime/input.py &amp;</text:p>
        </text:list-item>
        <text:list-item>
          <text:p text:style-name="P228">Launch koviz and connect to the trick sim<text:line-break/>% koviz -trickport 4545</text:p>
        </text:list-item>
        <text:list-item>
          <text:p text:style-name="P228">Select params to plot<text:line-break/>While holding the Ctrl key down, click:<text:line-break/> spring.pos<text:line-break/> spring.vel<text:line-break/> spring.acc</text:p>
        </text:list-item>
        <text:list-item>
          <text:p text:style-name="P228"><text:soft-page-break/>Run sim by pressing “Start” button on sim control</text:p>
        </text:list-item>
        <text:list-item>
          <text:p text:style-name="P228">Plots should update after pressing start</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82" text:outline-level="2"><text:bookmark-start text:name="__RefHeading___Toc4053_2364949263"/>Profiling Trick Jobs<text:bookmark-end text:name="__RefHeading___Toc4053_2364949263"/></text:h>
      <text:p text:style-name="P40">This is an example of how to profile a Trick sim using koviz’ mini profiler. <text:s/>The example induces a <text:span text:style-name="T172">couple sleeps</text:span> in the Trick Ball L2 sim and shows how one would profile t<text:span text:style-name="T172">he sim</text:span>.</text:p>
      <text:h text:style-name="P200" text:outline-level="3"><text:bookmark-start text:name="__RefHeading___Toc2091_3967031703"/><text:span text:style-name="T173">Add Sleeps To</text:span> Ball L2 Sim<text:bookmark-end text:name="__RefHeading___Toc2091_3967031703"/></text:h>
      <text:p text:style-name="P41">% cd $HOME<text:line-break/>% mkdir sims<text:line-break/>% cd sims<text:line-break/>% cp -r &lt;trick&gt;/trick_sims/Ball .<text:line-break/>% cd Ball/models/ball/L2/src<text:line-break/>% vi ball_floor.c<text:line-break/> <text:s text:c="3"/># <text:span text:style-name="T174">Add this #include to top of floor function</text:span><text:line-break/> <text:s text:c="3"/>#include &lt;time.h&gt;</text:p>
      <text:p text:style-name="P41"><text:s text:c="4"/>// <text:span text:style-name="T175">Add 3ms and 7ms sleeps </text:span><text:span text:style-name="T174">to body of floor function</text:span><text:line-break/> <text:s text:c="3"/>struct timespec ts3;<text:line-break/> <text:s text:c="3"/>ts3.tv_sec = 0;<text:line-break/> <text:s text:c="3"/>ts3.tv_nsec = 3 * 1000000; <text:s/>// 3 ms</text:p>
      <text:p text:style-name="P41"><text:s text:c="4"/>struct timespec ts7;<text:line-break/> <text:s text:c="3"/>ts7.tv_sec = 0;<text:line-break/> <text:s text:c="3"/>ts7.tv_nsec = 7 * 1000000; <text:s/>// 7 ms</text:p>
      <text:p text:style-name="P41"><text:s text:c="4"/>// Two sleeps<text:line-break/> <text:s text:c="3"/>nanosleep(&amp;ts<text:span text:style-name="T175">3</text:span>, NULL);<text:line-break/> <text:s text:c="3"/>nanosleep(&amp;ts<text:span text:style-name="T175">7</text:span>, NULL);</text:p>
      <text:h text:style-name="P201" text:outline-level="3"><text:bookmark-start text:name="__RefHeading___Toc2093_3967031703"/>Run And View Sleep Effect<text:bookmark-end text:name="__RefHeading___Toc2093_3967031703"/></text:h>
      <text:p text:style-name="P41">% cd $HOME/sims/Ball/SIM_ball_L2<text:line-break/>% vi Modified_data/realtime.py<text:line-break/> <text:s text:c="3"/># Turn frame log on<text:line-break/> <text:s text:c="3"/>trick.frame_log_on()<text:line-break/>% <text:span text:style-name="T173">vi RUN_realtime/input.py<text:line-break/> <text:s text:c="3"/># Change stop time to 30 seconds<text:line-break/> <text:s text:c="3"/>trick.sim_services.exec_set_terminate_time(30.0)</text:span><text:line-break/>% trick-CP<text:line-break/>% ./S_main* RUN_realtime/input.py<text:line-break/>% koviz RUN_realtime<text:line-break/><text:soft-page-break/> <text:s text:c="3"/># See ball floor timing <text:span text:style-name="T175">(should be a </text:span><text:span text:style-name="T176">little over </text:span><text:span text:style-name="T175">10ms </text:span><text:span text:style-name="T176">with possible spikes</text:span><text:span text:style-name="T175">)</text:span></text:p>
      <text:h text:style-name="P202" text:outline-level="3"><text:bookmark-start text:name="__RefHeading___Toc2095_3967031703"/>Modify and Build Profiler<text:bookmark-end text:name="__RefHeading___Toc2095_3967031703"/></text:h>
      <text:p text:style-name="P41">% cd &lt;koviz&gt;/profiler<text:line-break/>% ./clean.sh<text:line-break/>% <text:span text:style-name="T173">vi koviz.h<text:line-break/> <text:s text:c="3"/>1. Uncomment out #define TRICK<text:line-break/> <text:s text:c="3"/>2. Change KOVIZ_MAX_STATS to 2 (</text:span><text:span text:style-name="T172">to </text:span><text:span text:style-name="T173">tim</text:span><text:span text:style-name="T172">e</text:span><text:span text:style-name="T173"> 2 sleeps)<text:line-break/> <text:s text:c="3"/>3. Change <text:s/>KOVIZ_NRECS 3000 (100Hz*30 second run)<text:line-break/>% </text:span><text:span text:style-name="T177">cc -I&lt;trick&gt;/include -c koviz.c<text:line-break/>% ar cr libkoviz.a koviz.o</text:span></text:p>
      <text:h text:style-name="P203" text:outline-level="3"><text:bookmark-start text:name="__RefHeading___Toc2097_3967031703"/>Add Profiler T<text:span text:style-name="T174">o Sim</text:span><text:bookmark-end text:name="__RefHeading___Toc2097_3967031703"/></text:h>
      <text:p text:style-name="P41">% vi $HOME/sims/Ball/models/ball/L2/src/ball_floor.c<text:line-break/> <text:s text:c="3"/><text:span text:style-name="T178"># </text:span><text:span text:style-name="T179">Add profiler header to ball_floor.c</text:span><text:span text:style-name="T178"><text:line-break/> <text:s text:c="3"/>#include &lt;koviz&gt;/profiler/koviz.h<text:line-break/></text:span><text:line-break/> <text:s text:c="3"/><text:span text:style-name="T172"># </text:span><text:span text:style-name="T179">Add two </text:span><text:span text:style-name="T180">profiler </text:span><text:span text:style-name="T179">tags</text:span><text:span text:style-name="T178"><text:line-break/> <text:s text:c="3"/>koviz_start(“gtod”, “koviz.sleep.</text:span><text:span text:style-name="T174">3</text:span><text:span text:style-name="T178">”);<text:line-break/> <text:s text:c="3"/>nanosleep(&amp;ts</text:span><text:span text:style-name="T174">3</text:span><text:span text:style-name="T178">, NULL);<text:line-break/> <text:s text:c="3"/>koviz_stop(“gtod”, “koviz.sleep.</text:span><text:span text:style-name="T174">3</text:span><text:span text:style-name="T178">”);<text:line-break/> <text:s text:c="3"/>koviz_start(“gtod”, “koviz.sleep.</text:span><text:span text:style-name="T174">7</text:span><text:span text:style-name="T178">”);<text:line-break/> <text:s text:c="3"/>nanosleep(&amp;ts</text:span><text:span text:style-name="T174">7</text:span><text:span text:style-name="T178">, NULL);<text:line-break/> <text:s text:c="3"/>koviz_stop(“gtod”, “koviz.sleep.</text:span><text:span text:style-name="T174">7</text:span><text:span text:style-name="T178">”);</text:span></text:p>
      <text:p text:style-name="P41">% <text:span text:style-name="T178">cd $HOME/sims/Ball/SIM_</text:span><text:span text:style-name="T181">b</text:span><text:span text:style-name="T178">all_L2<text:line-break/>% vi S_overrides.mk<text:line-break/> <text:s text:c="3"/># Add <text:line-break/> <text:s text:c="3"/>TRICK_USER_LINK_LIBS += &lt;koviz&gt;/profiler/libkoviz.a</text:span></text:p>
      <text:p text:style-name="P41"><text:span text:style-name="T171"># Rebuild sim with profiler</text:span><text:line-break/>% <text:span text:style-name="T171">trick-CP</text:span></text:p>
      <text:h text:style-name="P204" text:outline-level="3"><text:bookmark-start text:name="__RefHeading___Toc2099_3967031703"/>Run Sim And See Profile Results<text:bookmark-end text:name="__RefHeading___Toc2099_3967031703"/></text:h>
      <text:p text:style-name="P39">% ./<text:span text:style-name="T171">S_main* RUN_realtime/input.py<text:line-break/>% mv koviz.trk RUN_realtime<text:line-break/>% koviz RUN_realtime<text:line-break/> <text:s text:c="3"/># Put koviz|floor in search box and coplot</text:span></text:p>
      <text:h text:style-name="P173" text:outline-level="2"><text:bookmark-start text:name="__RefHeading___Toc2386_1878335349"/><text:soft-page-break/>HDF5<text:bookmark-end text:name="__RefHeading___Toc2386_1878335349"/></text:h>
      <text:p text:style-name="P44"><text:span text:style-name="T191">Koviz supports Trick HDF5 and </text:span><text:span text:style-name="T192">generic HDF5 time-history datasets. <text:s/></text:span>Generic HDF5 support is intended for telemetry/time-history style data: rank-1 compound datasets containing a time field and numeric signal fields. <text:s text:c="2"/><text:span text:style-name="T192">The time field must be given to Koviz via the -timeName option. <text:s/></text:span>Non-numeric fields are plotted as NaN<text:span text:style-name="T192">s </text:span><text:span text:style-name="T197">and will be empty.</text:span></text:p>
      <text:h text:style-name="P205" text:outline-level="3"><text:bookmark-start text:name="__RefHeading___Toc2388_1878335349"/>Building Koviz With HDF5<text:bookmark-end text:name="__RefHeading___Toc2388_1878335349"/></text:h>
      <text:p text:style-name="P45"><text:span text:style-name="T59">To build koviz with </text:span><text:span text:style-name="T192">HDF5</text:span><text:span text:style-name="T59"> support, the </text:span><text:span text:style-name="T192">HDF5</text:span><text:span text:style-name="T59"> development libraries must be installed. <text:s/>On </text:span><text:span text:style-name="T192">Redhat 8</text:span><text:span text:style-name="T59">, the following will install </text:span><text:span text:style-name="T60">the </text:span><text:span text:style-name="T192">HDF5</text:span><text:span text:style-name="T59"> </text:span><text:span text:style-name="T60">dependencies and build koviz with </text:span><text:span text:style-name="T192">HDF5 support:</text:span></text:p>
      <text:p text:style-name="P74">% sudo <text:span text:style-name="T192">dnf</text:span> install <text:span text:style-name="T193">hdf5-devel</text:span><text:line-break/>% cd &lt;koviz-repo&gt;<text:line-break/>% make distclean<text:line-break/>% qmake-qt5<text:line-break/>% make</text:p>
      <text:h text:style-name="P206" text:outline-level="3"><text:bookmark-start text:name="__RefHeading___Toc2390_1878335349"/>Generic HDF5 Parameters<text:bookmark-end text:name="__RefHeading___Toc2390_1878335349"/></text:h>
      <text:p text:style-name="P46"><text:span text:style-name="T193">If koviz is given a generic HDF5 file and -timeName &lt;time_name&gt;, koviz will search for paths that contain </text:span><text:span text:style-name="T197">rank-1 </text:span><text:span text:style-name="T193">compound datasets with </text:span><text:span text:style-name="T195">the given </text:span><text:span text:style-name="T193">&lt;time_name&gt; fiel</text:span><text:span text:style-name="T195">d</text:span><text:span text:style-name="T193">, and then make</text:span><text:span text:style-name="T197">s</text:span><text:span text:style-name="T193"> a list of plottable parameters from those fields. <text:s/><text:line-break/><text:line-break/>For example, </text:span><text:span text:style-name="T194">suppose a file called “orion.h5” </text:span><text:span text:style-name="T197">contains</text:span><text:span text:style-name="T194"> two paths: “/Storage/power” and “/Storage/dynamics”. <text:s text:c="2"/>Suppose “/Storage/power” </text:span><text:span text:style-name="T195">is </text:span><text:span text:style-name="T196">a </text:span><text:span text:style-name="T194">rank-1 compound dataset </text:span><text:span text:style-name="T195">with</text:span><text:span text:style-name="T194"> fields “time”, <text:s/>“battery_current” </text:span><text:span text:style-name="T195">and</text:span><text:span text:style-name="T194"> “solar_array_current”. <text:s/>And suppose “/</text:span><text:span text:style-name="T195">Storage/dynamics” had these fields: <text:s/></text:span><text:span text:style-name="T194">“time”, “mass”, “cg”, “position” and “velocity. <text:s/></text:span><text:span text:style-name="T195">Koviz would be launched like so:<text:line-break/><text:line-break/>% koviz -timeName “time” orion.h5 <text:line-break/></text:span><text:span text:style-name="T193"><text:line-break/></text:span><text:span text:style-name="T195">In this case, koviz’ list of plottable parameters would be:<text:line-break/><text:line-break/>time<text:line-break/>/Storage/power/battery_current<text:line-break/>/Storage/power/solar_array_current<text:line-break/></text:span><text:span text:style-name="T194">/</text:span><text:span text:style-name="T195">Storage/dynamics/mass<text:line-break/></text:span><text:span text:style-name="T194">/</text:span><text:span text:style-name="T195">Storage/dynamics/cg<text:line-break/></text:span><text:span text:style-name="T194">/</text:span><text:span text:style-name="T195">Storage/dynamics/velocity<text:line-break/></text:span><text:span text:style-name="T194">/</text:span><text:span text:style-name="T195">Storage/dynamics/position</text:span></text:p>
      <text:h text:style-name="P174" text:outline-level="2"><text:bookmark-start text:name="__RefHeading___Toc2812_1878335349"/><text:soft-page-break/>Parquet<text:bookmark-end text:name="__RefHeading___Toc2812_1878335349"/></text:h>
      <text:p text:style-name="P47"><text:span text:style-name="T199">Koviz supports </text:span><text:span text:style-name="T203">time-history data stored </text:span><text:span text:style-name="T199">Apache Parquet </text:span><text:span text:style-name="T203">files</text:span><text:span text:style-name="T199">. <text:s/></text:span><text:span text:style-name="T206">A single </text:span><text:span text:style-name="T203">Parquet file may </text:span><text:span text:style-name="T206">contain a</text:span><text:span text:style-name="T203"> Monte Carlo set of RUNs (format and example below).</text:span></text:p>
      <text:h text:style-name="Heading_20_3" text:outline-level="3"><text:bookmark-start text:name="__RefHeading___Toc2814_1878335349"/>Build<text:span text:style-name="T210">ing</text:span> Koviz With Parquet<text:bookmark-end text:name="__RefHeading___Toc2814_1878335349"/></text:h>
      <text:p text:style-name="P51"><text:span text:style-name="T203">Here are Redhat 8 instructions. <text:s/></text:span><text:span text:style-name="T199">The dnf packages for Parquet on Redhat 8 are out of date. <text:s/>The Parquet Arrow project needs to </text:span><text:span text:style-name="T207">be</text:span><text:span text:style-name="T199"> built from s</text:span><text:span text:style-name="T206">ource</text:span><text:span text:style-name="T199">.</text:span></text:p>
      <text:p text:style-name="P50"><text:span text:style-name="T206">1.</text:span><text:span text:style-name="T199"> One must </text:span><text:span text:style-name="T202">build with newer version</text:span><text:span text:style-name="T199"> </text:span><text:span text:style-name="T202">of </text:span><text:span text:style-name="T199">gcc<text:line-break/>% sudo dnf install gcc-toolset-11<text:line-break/>% </text:span>scl enable gcc-toolset-11 bash</text:p>
      <text:p text:style-name="P49"><text:span text:style-name="T206">2.</text:span> Lib Atomic Dependency (note th<text:span text:style-name="T208">e</text:span> link hack!)<text:line-break/>% <text:span text:style-name="T209">sudo </text:span>dnf install -y libatomic<text:line-break/>% sudo ln -s /usr/lib64/libatomic.so.1 /usr/lib64/libatomic.so</text:p>
      <text:p text:style-name="P48"><text:span text:style-name="T206">3.</text:span><text:span text:style-name="T200"> Build </text:span><text:span text:style-name="T206">Apache Arrow with </text:span><text:span text:style-name="T200">Parquet </text:span><text:span text:style-name="T206">support</text:span><text:span text:style-name="T199"><text:line-break/>% cd $HOME<text:line-break/>% mkdir -p $HOME/local/arrow<text:line-break/>% export PREFIX=$HOME/local/arrow<text:line-break/>% git clone </text:span><text:a xlink:type="simple" xlink:href="https://github.com/apache/arrow.git" text:style-name="Internet_20_link" text:visited-style-name="Visited_20_Internet_20_Link"><text:span text:style-name="T199">https://github.com/apache/arrow.git</text:span></text:a><text:span text:style-name="T199"><text:line-break/>% cd arrow/cpp<text:line-break/>% mkdir build<text:line-break/>% </text:span><text:span text:style-name="T201">cd build</text:span><text:span text:style-name="T199"><text:line-break/>% </text:span>cmake .. \<text:line-break/> <text:s text:c="7"/>-DCMAKE_BUILD_TYPE=Release \<text:line-break/> <text:s text:c="7"/>-DCMAKE_CXX_STANDARD=20 \<text:line-break/> <text:s text:c="7"/>-DARROW_PARQUET=ON \<text:line-break/> <text:s text:c="7"/>-DARROW_WITH_SNAPPY=ON \<text:line-break/> <text:s text:c="7"/><text:span text:style-name="T74">-</text:span><text:span text:style-name="T99">D</text:span><text:span text:style-name="T74">CMAKE_INSTALL_PREFIX=$HOME/local/arrow<text:line-break/>% </text:span><text:span text:style-name="T104">make -j$(nproc)</text:span><text:span text:style-name="T74"><text:line-break/>% </text:span><text:span text:style-name="T98">make install<text:line-break/><text:line-break/># Build koviz with locally built Parquet (Note: still using gcc11)<text:line-break/>% cd &lt;koviz-home&gt;<text:line-break/>% make distclean<text:line-break/>% qmake-qt5 ARROW_HOME=$HOME/local/arrow<text:line-break/>% make</text:span></text:p>
      <text:h text:style-name="P209" text:outline-level="3"><text:bookmark-start text:name="__RefHeading___Toc2816_1878335349"/><text:span text:style-name="T98">P</text:span><text:span text:style-name="T74">arquet Data Layout</text:span><text:bookmark-end text:name="__RefHeading___Toc2816_1878335349"/></text:h>
      <text:p text:style-name="Text_20_body"><text:span text:style-name="T74">Koviz expects </text:span><text:span text:style-name="T102">time-history </text:span><text:span text:style-name="T74">data to be organized </text:span><text:span text:style-name="T102">in columnar form</text:span><text:span text:style-name="T74">, where each row represents a sample. <text:s/></text:span><text:span text:style-name="T102">For</text:span><text:span text:style-name="T100"> Monte Carlo </text:span><text:span text:style-name="T102">datasets</text:span><text:span text:style-name="T100">, </text:span><text:span text:style-name="T102">a run </text:span><text:span text:style-name="T100">column </text:span><text:span text:style-name="T102">is required</text:span><text:span text:style-name="T100">. <text:s/></text:span><text:span text:style-name="T101">Run rows </text:span><text:span text:style-name="T102">may</text:span><text:span text:style-name="T101"> be </text:span><text:span text:style-name="T102">grouped or </text:span><text:span text:style-name="T101">interleaved. <text:s/>Example below shows runs grouped. <text:s/></text:span><text:span text:style-name="T103">As usual, a time column must be present too.</text:span><text:span text:style-name="T74"><text:line-break/><text:line-break/></text:span><text:span text:style-name="T100">Example: </text:span><text:span text:style-name="T101">2 runs, 3 samples </text:span><text:span text:style-name="T102">each</text:span><text:span text:style-name="T100">:</text:span></text:p>
      <table:table table:name="ExampleParquetLayout" table:style-name="ExampleParquetLayout" table:template-name="Elegant">
        <table:table-column table:style-name="ExampleParquetLayout.A" table:number-columns-repeated="3"/>
        <table:table-column table:style-name="ExampleParquetLayout.D"/>
        <table:table-row table:style-name="TableLine94828017020496">
          <table:table-cell table:style-name="ExampleParquetLayout.A1" office:value-type="string">
            <text:p text:style-name="P148"><text:span text:style-name="T204">t</text:span>ime</text:p>
          </table:table-cell>
          <table:table-cell table:style-name="ExampleParquetLayout.A1" office:value-type="string">
            <text:p text:style-name="P148"><text:span text:style-name="T204">r</text:span>un</text:p>
          </table:table-cell>
          <table:table-cell table:style-name="ExampleParquetLayout.A1" office:value-type="string">
            <text:p text:style-name="P148"><text:span text:style-name="T204">p</text:span>osition</text:p>
          </table:table-cell>
          <table:table-cell table:style-name="ExampleParquetLayout.A1" office:value-type="string">
            <text:p text:style-name="P148"><text:span text:style-name="T204">v</text:span>elocity</text:p>
          </table:table-cell>
        </table:table-row>
        <table:table-row table:style-name="TableLine94828016946768">
          <table:table-cell table:style-name="ExampleParquetLayout.A2" office:value-type="string">
            <text:p text:style-name="P149">0</text:p>
          </table:table-cell>
          <table:table-cell table:style-name="ExampleParquetLayout.B2" office:value-type="float" office:value="0">
            <text:p text:style-name="P149">0</text:p>
          </table:table-cell>
          <table:table-cell table:style-name="ExampleParquetLayout.B2" office:value-type="float" office:value="0">
            <text:p text:style-name="P149">0</text:p>
          </table:table-cell>
          <table:table-cell table:style-name="ExampleParquetLayout.B2" office:value-type="float" office:value="0.1">
            <text:p text:style-name="P149">0.1</text:p>
          </table:table-cell>
        </table:table-row>
        <table:table-row table:style-name="ExampleParquetLayout.3">
          <table:table-cell table:style-name="ExampleParquetLayout.A2" office:value-type="string">
            <text:p text:style-name="P149">1</text:p>
          </table:table-cell>
          <table:table-cell table:style-name="ExampleParquetLayout.B2" office:value-type="float" office:value="0">
            <text:p text:style-name="P149">0</text:p>
          </table:table-cell>
          <table:table-cell table:style-name="ExampleParquetLayout.B2" office:value-type="float" office:value="1">
            <text:p text:style-name="P149">1</text:p>
          </table:table-cell>
          <table:table-cell table:style-name="ExampleParquetLayout.B2" office:value-type="float" office:value="0.2">
            <text:p text:style-name="P149">0.2</text:p>
          </table:table-cell>
        </table:table-row>
        <table:table-row table:style-name="ExampleParquetLayout.3">
          <table:table-cell table:style-name="ExampleParquetLayout.A2" office:value-type="string">
            <text:p text:style-name="P149">2</text:p>
          </table:table-cell>
          <table:table-cell table:style-name="ExampleParquetLayout.B2" office:value-type="float" office:value="0">
            <text:p text:style-name="P149">0</text:p>
          </table:table-cell>
          <table:table-cell table:style-name="ExampleParquetLayout.B2" office:value-type="float" office:value="2">
            <text:p text:style-name="P149">2</text:p>
          </table:table-cell>
          <table:table-cell table:style-name="ExampleParquetLayout.B2" office:value-type="float" office:value="0.3">
            <text:p text:style-name="P149">0.3</text:p>
          </table:table-cell>
        </table:table-row>
        <table:table-row table:style-name="ExampleParquetLayout.3">
          <table:table-cell table:style-name="ExampleParquetLayout.A2" office:value-type="string">
            <text:p text:style-name="P149">0</text:p>
          </table:table-cell>
          <table:table-cell table:style-name="ExampleParquetLayout.B2" office:value-type="float" office:value="1">
            <text:p text:style-name="P149">1</text:p>
          </table:table-cell>
          <table:table-cell table:style-name="ExampleParquetLayout.B2" office:value-type="float" office:value="0.66">
            <text:p text:style-name="P149">0.66</text:p>
          </table:table-cell>
          <table:table-cell table:style-name="ExampleParquetLayout.B2" office:value-type="float" office:value="0.11">
            <text:p text:style-name="P149">0.11</text:p>
          </table:table-cell>
        </table:table-row>
        <table:table-row table:style-name="ExampleParquetLayout.3">
          <table:table-cell table:style-name="ExampleParquetLayout.A2" office:value-type="string">
            <text:p text:style-name="P149">1</text:p>
          </table:table-cell>
          <table:table-cell table:style-name="ExampleParquetLayout.B2" office:value-type="float" office:value="1">
            <text:p text:style-name="P149">1</text:p>
          </table:table-cell>
          <table:table-cell table:style-name="ExampleParquetLayout.B2" office:value-type="float" office:value="0.77">
            <text:p text:style-name="P149">0.77</text:p>
          </table:table-cell>
          <table:table-cell table:style-name="ExampleParquetLayout.B2" office:value-type="float" office:value="0.22">
            <text:p text:style-name="P149">0.22</text:p>
          </table:table-cell>
        </table:table-row>
        <table:table-row table:style-name="ExampleParquetLayout.3">
          <table:table-cell table:style-name="ExampleParquetLayout.A2" office:value-type="string">
            <text:p text:style-name="P149">2</text:p>
          </table:table-cell>
          <table:table-cell table:style-name="ExampleParquetLayout.B2" office:value-type="float" office:value="1">
            <text:p text:style-name="P149">1</text:p>
          </table:table-cell>
          <table:table-cell table:style-name="ExampleParquetLayout.B2" office:value-type="float" office:value="0.88">
            <text:p text:style-name="P149">0.88</text:p>
          </table:table-cell>
          <table:table-cell table:style-name="ExampleParquetLayout.B2" office:value-type="float" office:value="0.33">
            <text:p text:style-name="P149">0.33</text:p>
          </table:table-cell>
        </table:table-row>
        <table:table-row table:style-name="ExampleParquetLayout.3">
          <table:table-cell table:style-name="ExampleParquetLayout.A8" office:value-type="string">
            <text:p text:style-name="P149"/>
          </table:table-cell>
          <table:table-cell table:style-name="ExampleParquetLayout.B8">
            <text:p text:style-name="P149"/>
          </table:table-cell>
          <table:table-cell table:style-name="ExampleParquetLayout.B8">
            <text:p text:style-name="P149"/>
          </table:table-cell>
          <table:table-cell table:style-name="ExampleParquetLayout.B8">
            <text:p text:style-name="P149"/>
          </table:table-cell>
        </table:table-row>
      </table:table>
      <text:h text:style-name="P207" text:outline-level="3"/>
      <text:h text:style-name="P208" text:outline-level="3"><text:bookmark-start text:name="__RefHeading___Toc2818_1878335349"/>Parquet Units<text:bookmark-end text:name="__RefHeading___Toc2818_1878335349"/></text:h>
      <text:p text:style-name="P223">Koviz reads parameter units from Parquet key/value metadata. <text:s/>The metadata key must match the corresponding column name. <text:s/>If no unit metadata is present, Koviz displays the parameter as unitless. <text:s/>Parquet files often contain additional internal metadata entries such as: ARROW:schema. These entries are generated by Apache Arrow and are ignored by Koviz.</text:p>
      <text:p text:style-name="P224">Meta data for table above:</text:p>
      <text:p text:style-name="Text_20_body"><text:span text:style-name="Source_20_Text"><text:span text:style-name="T12">time = s<text:line-break/></text:span></text:span><text:span text:style-name="Source_20_Text"><text:span text:style-name="T17">position</text:span></text:span><text:span text:style-name="Source_20_Text"><text:span text:style-name="T12"> = m<text:line-break/></text:span></text:span><text:span text:style-name="Source_20_Text"><text:span text:style-name="T17">v</text:span></text:span><text:span text:style-name="Source_20_Text"><text:span text:style-name="T12">elocity = m/s</text:span></text:span></text:p>
      <text:h text:style-name="Heading_20_3" text:outline-level="3"><text:bookmark-start text:name="__RefHeading___Toc2820_1878335349"/><text:span text:style-name="Source_20_Text"><text:span text:style-name="T205">Koviz Parquet Test</text:span></text:span><text:bookmark-end text:name="__RefHeading___Toc2820_1878335349"/></text:h>
      <text:p text:style-name="P52"><text:span text:style-name="Source_20_Text"><text:span text:style-name="T18">Koviz contains a test Parquet file and python scripts that generated the test file </text:span></text:span><text:span text:style-name="Source_20_Text"><text:span text:style-name="T19">as well as a script that shows the meta data</text:span></text:span><text:span text:style-name="Source_20_Text"><text:span text:style-name="T18">. <text:s/></text:span></text:span><text:span text:style-name="Source_20_Text"><text:span text:style-name="T19">The python scripts require python3.11 and a pip install of some arrow/parquet libs and is more there </text:span></text:span><text:span text:style-name="Source_20_Text"><text:span text:style-name="T20">for reference</text:span></text:span><text:span text:style-name="Source_20_Text"><text:span text:style-name="T19">. <text:s/></text:span></text:span><text:span text:style-name="Source_20_Text"><text:span text:style-name="T20">To run the test</text:span></text:span><text:span text:style-name="Source_20_Text"><text:span text:style-name="T18">:</text:span></text:span></text:p>
      <text:p text:style-name="P52"><text:span text:style-name="Source_20_Text"><text:span text:style-name="T18">% cd &lt;koviz-home&gt;/tests/test57<text:line-break/>% koviz -runColumnName run monte_test.parquet</text:span></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33</text:page-number></text:p>
      </style:header>
      <style:footer>
        <text:p text:style-name="MP2"><text:span text:style-name="MT1">Page </text:span><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6-06-08T14:29:55.528420328</dc:date>
    <meta:editing-duration>P6DT26M24S</meta:editing-duration>
    <meta:editing-cycles>240</meta:editing-cycles>
    <meta:generator>LibreOffice/6.4.7.2$Linux_X86_64 LibreOffice_project/40$Build-2</meta:generator>
    <meta:document-statistic meta:table-count="4" meta:image-count="3" meta:object-count="0" meta:page-count="33" meta:paragraph-count="452" meta:word-count="5462" meta:character-count="36560" meta:non-whitespace-character-count="30837"/>
  </office:meta>
</office:document-meta>
</file>