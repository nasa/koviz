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ExampleParquetLayout" style:family="table" style:master-page-name="">
      <style:table-properties style:width="6.925in" style:page-number="auto" table:align="margins" style:shadow="none" style:may-break-between-rows="true" table:border-model="collapsing"/>
    </style:style>
    <style:style style:name="ExampleParquetLayout.A" style:family="table-column">
      <style:table-column-properties style:column-width="1.7313in" style:rel-column-width="16383*"/>
    </style:style>
    <style:style style:name="ExampleParquetLayout.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ExampleParquetLayout.A2" style:family="table-cell">
      <style:table-cell-properties fo:background-color="#eeeeee" fo:padding="0in" fo:border-left="none" fo:border-right="none" fo:border-top="none" fo:border-bottom="0.75pt solid #999999" style:writing-mode="page">
        <style:background-image/>
      </style:table-cell-properties>
    </style:style>
    <style:style style:name="ExampleParquetLayout.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ExampleParquetLayout.3" style:family="table-row">
      <style:table-row-properties fo:keep-together="auto"/>
    </style:style>
    <style:style style:name="ExampleParquetLayout.A8"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ExampleParquetLayout.B8"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text-properties officeooo:rsid="00e3f7f7" officeooo:paragraph-rsid="00e3f7f7"/>
    </style:style>
    <style:style style:name="P39" style:family="paragraph" style:parent-style-name="Text_20_body">
      <style:text-properties officeooo:rsid="00e3f7f7" officeooo:paragraph-rsid="01034031"/>
    </style:style>
    <style:style style:name="P40" style:family="paragraph" style:parent-style-name="Text_20_body">
      <style:text-properties officeooo:rsid="010352e6" officeooo:paragraph-rsid="01034031"/>
    </style:style>
    <style:style style:name="P41" style:family="paragraph" style:parent-style-name="Text_20_body">
      <style:text-properties officeooo:paragraph-rsid="01034031"/>
    </style:style>
    <style:style style:name="P42" style:family="paragraph" style:parent-style-name="Text_20_body">
      <style:text-properties officeooo:rsid="0106c5d7" officeooo:paragraph-rsid="0106c5d7"/>
    </style:style>
    <style:style style:name="P43" style:family="paragraph" style:parent-style-name="Text_20_body">
      <style:text-properties officeooo:paragraph-rsid="011733c7"/>
    </style:style>
    <style:style style:name="P44" style:family="paragraph" style:parent-style-name="Text_20_body">
      <style:text-properties officeooo:paragraph-rsid="011cc60f"/>
    </style:style>
    <style:style style:name="P45" style:family="paragraph" style:parent-style-name="Text_20_body">
      <style:text-properties officeooo:paragraph-rsid="011de5ca"/>
    </style:style>
    <style:style style:name="P46" style:family="paragraph" style:parent-style-name="Text_20_body">
      <style:paragraph-properties fo:margin-left="0.4925in" fo:margin-right="0in" fo:text-indent="0in" style:auto-text-indent="false"/>
      <style:text-properties officeooo:rsid="0017a831" officeooo:paragraph-rsid="0017a831"/>
    </style:style>
    <style:style style:name="P47"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8"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9"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50" style:family="paragraph" style:parent-style-name="Text_20_body">
      <style:paragraph-properties fo:margin-left="0.4925in" fo:margin-right="0in" fo:text-indent="0in" style:auto-text-indent="false"/>
      <style:text-properties officeooo:rsid="00303cac" officeooo:paragraph-rsid="00303cac"/>
    </style:style>
    <style:style style:name="P51"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52"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53"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54"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55"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56"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57"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8" style:family="paragraph" style:parent-style-name="Text_20_body">
      <style:paragraph-properties fo:margin-left="0.4925in" fo:margin-right="0in" fo:text-indent="0in" style:auto-text-indent="false"/>
      <style:text-properties officeooo:rsid="0034ee78" officeooo:paragraph-rsid="0034ee78"/>
    </style:style>
    <style:style style:name="P59" style:family="paragraph" style:parent-style-name="Text_20_body">
      <style:paragraph-properties fo:margin-left="0.4925in" fo:margin-right="0in" fo:text-indent="0in" style:auto-text-indent="false"/>
      <style:text-properties officeooo:rsid="003bbddc" officeooo:paragraph-rsid="003bbddc"/>
    </style:style>
    <style:style style:name="P60" style:family="paragraph" style:parent-style-name="Text_20_body">
      <style:paragraph-properties fo:margin-left="0.4925in" fo:margin-right="0in" fo:text-indent="0in" style:auto-text-indent="false"/>
      <style:text-properties officeooo:rsid="004142be" officeooo:paragraph-rsid="0045cf64"/>
    </style:style>
    <style:style style:name="P61"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62"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63"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64"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65" style:family="paragraph" style:parent-style-name="Text_20_body">
      <style:paragraph-properties fo:margin-left="0.4925in" fo:margin-right="0in" fo:text-indent="0in" style:auto-text-indent="false"/>
      <style:text-properties officeooo:rsid="008b6fed" officeooo:paragraph-rsid="008b6fed"/>
    </style:style>
    <style:style style:name="P66" style:family="paragraph" style:parent-style-name="Text_20_body">
      <style:paragraph-properties fo:margin-left="0.4925in" fo:margin-right="0in" fo:text-indent="0in" style:auto-text-indent="false"/>
      <style:text-properties officeooo:rsid="00756402" officeooo:paragraph-rsid="00799fed"/>
    </style:style>
    <style:style style:name="P67" style:family="paragraph" style:parent-style-name="Text_20_body">
      <style:paragraph-properties fo:margin-left="0.4925in" fo:margin-right="0in" fo:text-indent="0in" style:auto-text-indent="false"/>
      <style:text-properties officeooo:rsid="00756402" officeooo:paragraph-rsid="011de5ca"/>
    </style:style>
    <style:style style:name="P68" style:family="paragraph" style:parent-style-name="Text_20_body">
      <style:paragraph-properties fo:margin-left="0.4925in" fo:margin-right="0in" fo:text-indent="0in" style:auto-text-indent="false"/>
      <style:text-properties officeooo:rsid="00a9c690" officeooo:paragraph-rsid="00a9c690"/>
    </style:style>
    <style:style style:name="P69" style:family="paragraph" style:parent-style-name="Text_20_body">
      <style:paragraph-properties fo:margin-left="0.4925in" fo:margin-right="0in" fo:text-indent="0in" style:auto-text-indent="false"/>
      <style:text-properties officeooo:paragraph-rsid="00ab6fa9"/>
    </style:style>
    <style:style style:name="P70" style:family="paragraph" style:parent-style-name="Text_20_body">
      <style:paragraph-properties fo:margin-left="0.4925in" fo:margin-right="0in" fo:text-indent="0in" style:auto-text-indent="false"/>
      <style:text-properties officeooo:paragraph-rsid="00c1f9fd"/>
    </style:style>
    <style:style style:name="P71" style:family="paragraph" style:parent-style-name="Text_20_body">
      <style:paragraph-properties fo:margin-left="0.4925in" fo:margin-right="0in" fo:text-indent="0in" style:auto-text-indent="false"/>
      <style:text-properties officeooo:paragraph-rsid="00c561db"/>
    </style:style>
    <style:style style:name="P72" style:family="paragraph" style:parent-style-name="Text_20_body">
      <style:paragraph-properties fo:margin-left="0.4925in" fo:margin-right="0in" fo:text-indent="0in" style:auto-text-indent="false"/>
      <style:text-properties officeooo:rsid="0083723e" officeooo:paragraph-rsid="0083723e"/>
    </style:style>
    <style:style style:name="P73" style:family="paragraph" style:parent-style-name="Text_20_body">
      <style:paragraph-properties fo:margin-left="0.4925in" fo:margin-right="0in" fo:text-indent="0in" style:auto-text-indent="false"/>
      <style:text-properties officeooo:rsid="003ae6ef" officeooo:paragraph-rsid="003ae6ef"/>
    </style:style>
    <style:style style:name="P74" style:family="paragraph" style:parent-style-name="Text_20_body">
      <style:paragraph-properties fo:margin-left="0.4925in" fo:margin-right="0in" fo:text-indent="0in" style:auto-text-indent="false"/>
      <style:text-properties officeooo:rsid="00eb3af6" officeooo:paragraph-rsid="00eb3af6"/>
    </style:style>
    <style:style style:name="P75" style:family="paragraph" style:parent-style-name="Text_20_body">
      <style:paragraph-properties fo:margin-left="0.4925in" fo:margin-right="0in" fo:text-indent="0in" style:auto-text-indent="false"/>
      <style:text-properties officeooo:rsid="00f5ac7f" officeooo:paragraph-rsid="00f792ad"/>
    </style:style>
    <style:style style:name="P76" style:family="paragraph" style:parent-style-name="Text_20_body">
      <style:paragraph-properties fo:margin-left="0.4925in" fo:margin-right="0in" fo:text-indent="0in" style:auto-text-indent="false"/>
      <style:text-properties officeooo:rsid="00f5ac7f" officeooo:paragraph-rsid="00f5ac7f"/>
    </style:style>
    <style:style style:name="P77" style:family="paragraph" style:parent-style-name="Text_20_body">
      <style:paragraph-properties fo:margin-left="0.4925in" fo:margin-right="0in" fo:text-indent="0in" style:auto-text-indent="false"/>
      <style:text-properties officeooo:rsid="00f792ad" officeooo:paragraph-rsid="00f792ad"/>
    </style:style>
    <style:style style:name="P78" style:family="paragraph" style:parent-style-name="Text_20_body">
      <style:paragraph-properties fo:margin-left="0.4925in" fo:margin-right="0in" fo:text-indent="0in" style:auto-text-indent="false"/>
      <style:text-properties officeooo:paragraph-rsid="0045cf64"/>
    </style:style>
    <style:style style:name="P79" style:family="paragraph" style:parent-style-name="Text_20_body">
      <style:paragraph-properties fo:margin-left="0.4925in" fo:margin-right="0in" fo:text-indent="0in" style:auto-text-indent="false"/>
      <style:text-properties officeooo:rsid="0107ca75" officeooo:paragraph-rsid="0107ca75"/>
    </style:style>
    <style:style style:name="P80" style:family="paragraph" style:parent-style-name="Text_20_body">
      <style:paragraph-properties fo:margin-left="0.9846in" fo:margin-right="0in" fo:text-indent="0in" style:auto-text-indent="false"/>
      <style:text-properties officeooo:rsid="00303cac" officeooo:paragraph-rsid="00303cac"/>
    </style:style>
    <style:style style:name="P81"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82"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83"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84"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85"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86" style:family="paragraph" style:parent-style-name="Text_20_body">
      <style:paragraph-properties fo:margin-left="0.9846in" fo:margin-right="0in" fo:text-indent="0in" style:auto-text-indent="false"/>
      <style:text-properties officeooo:rsid="0060e2c2" officeooo:paragraph-rsid="0060e2c2"/>
    </style:style>
    <style:style style:name="P87"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88" style:family="paragraph" style:parent-style-name="Text_20_body">
      <style:paragraph-properties fo:margin-left="0.9846in" fo:margin-right="0in" fo:text-indent="0in" style:auto-text-indent="false"/>
      <style:text-properties officeooo:rsid="008b6fed" officeooo:paragraph-rsid="008b6fed"/>
    </style:style>
    <style:style style:name="P89" style:family="paragraph" style:parent-style-name="Text_20_body">
      <style:paragraph-properties fo:margin-left="0.9846in" fo:margin-right="0in" fo:text-indent="0in" style:auto-text-indent="false"/>
      <style:text-properties officeooo:rsid="0107ca75" officeooo:paragraph-rsid="0107ca75"/>
    </style:style>
    <style:style style:name="P90" style:family="paragraph" style:parent-style-name="Text_20_body">
      <style:paragraph-properties fo:margin-left="0in" fo:margin-right="0in" fo:text-indent="0in" style:auto-text-indent="false"/>
      <style:text-properties officeooo:rsid="0034ee78" officeooo:paragraph-rsid="0034ee78"/>
    </style:style>
    <style:style style:name="P91" style:family="paragraph" style:parent-style-name="Text_20_body">
      <style:paragraph-properties fo:margin-left="0in" fo:margin-right="0in" fo:text-indent="0in" style:auto-text-indent="false"/>
      <style:text-properties officeooo:rsid="004142be" officeooo:paragraph-rsid="0045cf64"/>
    </style:style>
    <style:style style:name="P9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9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94" style:family="paragraph" style:parent-style-name="Text_20_body">
      <style:paragraph-properties fo:margin-left="0in" fo:margin-right="0in" fo:text-indent="0in" style:auto-text-indent="false"/>
      <style:text-properties officeooo:rsid="0068a657" officeooo:paragraph-rsid="0068a657"/>
    </style:style>
    <style:style style:name="P9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96" style:family="paragraph" style:parent-style-name="Text_20_body">
      <style:paragraph-properties fo:margin-left="0in" fo:margin-right="0in" fo:text-indent="0in" style:auto-text-indent="false"/>
      <style:text-properties officeooo:rsid="008b6fed" officeooo:paragraph-rsid="008b6fed"/>
    </style:style>
    <style:style style:name="P97"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98" style:family="paragraph" style:parent-style-name="Text_20_body">
      <style:paragraph-properties fo:margin-left="0in" fo:margin-right="0in" fo:text-indent="0in" style:auto-text-indent="false"/>
      <style:text-properties officeooo:rsid="0083723e" officeooo:paragraph-rsid="0083723e"/>
    </style:style>
    <style:style style:name="P99" style:family="paragraph" style:parent-style-name="Text_20_body">
      <style:paragraph-properties fo:margin-left="0in" fo:margin-right="0in" fo:text-indent="0in" style:auto-text-indent="false"/>
      <style:text-properties officeooo:paragraph-rsid="00cfaff1"/>
    </style:style>
    <style:style style:name="P100" style:family="paragraph" style:parent-style-name="Text_20_body">
      <style:paragraph-properties fo:margin-left="0in" fo:margin-right="0in" fo:text-indent="0in" style:auto-text-indent="false"/>
      <style:text-properties officeooo:rsid="00f5ac7f" officeooo:paragraph-rsid="00f792ad"/>
    </style:style>
    <style:style style:name="P101" style:family="paragraph" style:parent-style-name="Text_20_body">
      <style:paragraph-properties fo:margin-left="0in" fo:margin-right="0in" fo:text-indent="0in" style:auto-text-indent="false"/>
      <style:text-properties officeooo:paragraph-rsid="00f792ad"/>
    </style:style>
    <style:style style:name="P102" style:family="paragraph" style:parent-style-name="Text_20_body">
      <style:paragraph-properties fo:margin-left="0in" fo:margin-right="0in" fo:text-indent="0in" style:auto-text-indent="false"/>
      <style:text-properties officeooo:rsid="00fa266b" officeooo:paragraph-rsid="00fa266b"/>
    </style:style>
    <style:style style:name="P103" style:family="paragraph" style:parent-style-name="Text_20_body">
      <style:paragraph-properties fo:margin-left="0in" fo:margin-right="0in" fo:text-indent="0in" style:auto-text-indent="false"/>
      <style:text-properties officeooo:paragraph-rsid="010d6fab"/>
    </style:style>
    <style:style style:name="P104"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10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106"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107"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108"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109"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110"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11"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12" style:family="paragraph" style:parent-style-name="Text_20_body">
      <style:paragraph-properties fo:margin-left="1.4772in" fo:margin-right="0in" fo:text-indent="0in" style:auto-text-indent="false"/>
      <style:text-properties officeooo:rsid="008b6fed" officeooo:paragraph-rsid="008b6fed"/>
    </style:style>
    <style:style style:name="P113" style:family="paragraph" style:parent-style-name="Text_20_body">
      <style:paragraph-properties fo:margin-left="1.4772in" fo:margin-right="0in" fo:text-indent="0in" style:auto-text-indent="false"/>
      <style:text-properties officeooo:rsid="0107ca75" officeooo:paragraph-rsid="0107ca75"/>
    </style:style>
    <style:style style:name="P11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1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1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1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18" style:family="paragraph" style:parent-style-name="Subtitle">
      <style:paragraph-properties fo:text-align="start" style:justify-single-word="false"/>
      <style:text-properties officeooo:rsid="0006243a" officeooo:paragraph-rsid="0006243a"/>
    </style:style>
    <style:style style:name="P119" style:family="paragraph" style:parent-style-name="Table_20_Contents">
      <style:text-properties officeooo:rsid="004c85fe" officeooo:paragraph-rsid="004c85fe"/>
    </style:style>
    <style:style style:name="P120" style:family="paragraph" style:parent-style-name="Table_20_Contents">
      <style:text-properties officeooo:rsid="004d180e" officeooo:paragraph-rsid="004d180e"/>
    </style:style>
    <style:style style:name="P121" style:family="paragraph" style:parent-style-name="Table_20_Contents">
      <style:text-properties officeooo:rsid="004df5b9" officeooo:paragraph-rsid="004df5b9"/>
    </style:style>
    <style:style style:name="P122" style:family="paragraph" style:parent-style-name="Table_20_Contents">
      <style:text-properties officeooo:rsid="004fd811" officeooo:paragraph-rsid="004fd811"/>
    </style:style>
    <style:style style:name="P123" style:family="paragraph" style:parent-style-name="Table_20_Contents">
      <style:text-properties officeooo:rsid="00743ec0" officeooo:paragraph-rsid="00743ec0"/>
    </style:style>
    <style:style style:name="P124" style:family="paragraph" style:parent-style-name="Table_20_Contents">
      <style:text-properties officeooo:rsid="0096c97e" officeooo:paragraph-rsid="0096c97e"/>
    </style:style>
    <style:style style:name="P125" style:family="paragraph" style:parent-style-name="Table_20_Contents">
      <style:text-properties officeooo:rsid="0098506f" officeooo:paragraph-rsid="0098506f"/>
    </style:style>
    <style:style style:name="P126" style:family="paragraph" style:parent-style-name="Table_20_Contents">
      <style:text-properties officeooo:rsid="009aeccb" officeooo:paragraph-rsid="009aeccb"/>
    </style:style>
    <style:style style:name="P127" style:family="paragraph" style:parent-style-name="Table_20_Contents">
      <style:text-properties officeooo:rsid="009e02b3" officeooo:paragraph-rsid="009e02b3"/>
    </style:style>
    <style:style style:name="P128" style:family="paragraph" style:parent-style-name="Table_20_Contents">
      <style:text-properties officeooo:rsid="00a2205e" officeooo:paragraph-rsid="00a2205e"/>
    </style:style>
    <style:style style:name="P129" style:family="paragraph" style:parent-style-name="Table_20_Contents">
      <style:text-properties officeooo:rsid="00a26629" officeooo:paragraph-rsid="00a26629"/>
    </style:style>
    <style:style style:name="P130" style:family="paragraph" style:parent-style-name="Table_20_Contents">
      <style:text-properties officeooo:rsid="00a43d20" officeooo:paragraph-rsid="00a43d20"/>
    </style:style>
    <style:style style:name="P131" style:family="paragraph" style:parent-style-name="Table_20_Contents">
      <style:text-properties officeooo:rsid="00a579fc" officeooo:paragraph-rsid="00a579fc"/>
    </style:style>
    <style:style style:name="P132" style:family="paragraph" style:parent-style-name="Table_20_Contents">
      <style:text-properties officeooo:rsid="00a8c3e6" officeooo:paragraph-rsid="00a8c3e6"/>
    </style:style>
    <style:style style:name="P133" style:family="paragraph" style:parent-style-name="Table_20_Contents">
      <style:text-properties officeooo:rsid="00a9421a" officeooo:paragraph-rsid="00a9421a"/>
    </style:style>
    <style:style style:name="P134" style:family="paragraph" style:parent-style-name="Table_20_Contents">
      <style:text-properties officeooo:rsid="00d45834" officeooo:paragraph-rsid="00d45834"/>
    </style:style>
    <style:style style:name="P135" style:family="paragraph" style:parent-style-name="Table_20_Contents">
      <style:text-properties officeooo:paragraph-rsid="00d45834"/>
    </style:style>
    <style:style style:name="P136" style:family="paragraph" style:parent-style-name="Table_20_Contents">
      <style:text-properties officeooo:rsid="00d796ec" officeooo:paragraph-rsid="00d796ec"/>
    </style:style>
    <style:style style:name="P137" style:family="paragraph" style:parent-style-name="Table_20_Contents">
      <style:text-properties officeooo:rsid="00d796ec" officeooo:paragraph-rsid="00d8650e"/>
    </style:style>
    <style:style style:name="P138" style:family="paragraph" style:parent-style-name="Table_20_Contents">
      <style:text-properties officeooo:paragraph-rsid="00d8650e"/>
    </style:style>
    <style:style style:name="P139" style:family="paragraph" style:parent-style-name="Table_20_Contents">
      <style:text-properties officeooo:rsid="00e04ce4" officeooo:paragraph-rsid="00e04ce4"/>
    </style:style>
    <style:style style:name="P140" style:family="paragraph" style:parent-style-name="Table_20_Contents">
      <style:text-properties officeooo:rsid="00f20fc4" officeooo:paragraph-rsid="00f20fc4"/>
    </style:style>
    <style:style style:name="P141" style:family="paragraph" style:parent-style-name="Table_20_Contents">
      <style:text-properties officeooo:rsid="00f3b0d8" officeooo:paragraph-rsid="00f3b0d8"/>
    </style:style>
    <style:style style:name="P14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4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4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4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47"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8" style:family="paragraph" style:parent-style-name="Title" style:master-page-name="First_20_Page">
      <style:paragraph-properties fo:text-align="start" style:justify-single-word="false" style:page-number="auto"/>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P150" style:family="paragraph" style:parent-style-name="Contents_20_3">
      <style:paragraph-properties>
        <style:tab-stops>
          <style:tab-stop style:position="6.5319in" style:type="right" style:leader-style="dotted" style:leader-text="."/>
        </style:tab-stops>
      </style:paragraph-properties>
    </style:style>
    <style:style style:name="P151" style:family="paragraph" style:parent-style-name="Contents_20_4">
      <style:paragraph-properties>
        <style:tab-stops>
          <style:tab-stop style:position="6.3354in" style:type="right" style:leader-style="dotted" style:leader-text="."/>
        </style:tab-stops>
      </style:paragraph-properties>
    </style:style>
    <style:style style:name="P152" style:family="paragraph" style:parent-style-name="Heading_20_2">
      <style:text-properties officeooo:paragraph-rsid="00099e08"/>
    </style:style>
    <style:style style:name="P153" style:family="paragraph" style:parent-style-name="Heading_20_2">
      <style:text-properties officeooo:rsid="003ae6ef" officeooo:paragraph-rsid="003ae6ef"/>
    </style:style>
    <style:style style:name="P154" style:family="paragraph" style:parent-style-name="Heading_20_2">
      <style:text-properties officeooo:rsid="003bbddc" officeooo:paragraph-rsid="003bbddc"/>
    </style:style>
    <style:style style:name="P155" style:family="paragraph" style:parent-style-name="Heading_20_2">
      <style:text-properties officeooo:rsid="00081ff8" officeooo:paragraph-rsid="00099e08"/>
    </style:style>
    <style:style style:name="P156" style:family="paragraph" style:parent-style-name="Heading_20_2">
      <style:text-properties officeooo:rsid="00081ff8" officeooo:paragraph-rsid="00407f7b"/>
    </style:style>
    <style:style style:name="P157" style:family="paragraph" style:parent-style-name="Heading_20_2" style:list-style-name="">
      <style:text-properties officeooo:paragraph-rsid="00d8650e"/>
    </style:style>
    <style:style style:name="P158" style:family="paragraph" style:parent-style-name="Heading_20_2" style:list-style-name="">
      <style:text-properties officeooo:rsid="004142be" officeooo:paragraph-rsid="0045cf64"/>
    </style:style>
    <style:style style:name="P159" style:family="paragraph" style:parent-style-name="Heading_20_2" style:list-style-name="">
      <style:text-properties officeooo:rsid="000a7aef" officeooo:paragraph-rsid="000a7aef"/>
    </style:style>
    <style:style style:name="P160" style:family="paragraph" style:parent-style-name="Heading_20_2">
      <style:text-properties officeooo:rsid="00f5ac7f" officeooo:paragraph-rsid="00f5ac7f"/>
    </style:style>
    <style:style style:name="P161" style:family="paragraph" style:parent-style-name="Heading_20_2">
      <style:text-properties officeooo:rsid="011733c7" officeooo:paragraph-rsid="011733c7"/>
    </style:style>
    <style:style style:name="P162" style:family="paragraph" style:parent-style-name="Heading_20_2">
      <style:text-properties officeooo:paragraph-rsid="00d8650e"/>
    </style:style>
    <style:style style:name="P163" style:family="paragraph" style:parent-style-name="Heading_20_2" style:list-style-name="">
      <style:text-properties officeooo:rsid="00745285" officeooo:paragraph-rsid="00745285"/>
    </style:style>
    <style:style style:name="P164" style:family="paragraph" style:parent-style-name="Heading_20_2">
      <style:text-properties officeooo:rsid="00cf3228" officeooo:paragraph-rsid="00cf3228"/>
    </style:style>
    <style:style style:name="P165" style:family="paragraph" style:parent-style-name="Heading_20_2">
      <style:text-properties officeooo:rsid="011cc60f" officeooo:paragraph-rsid="011cc60f"/>
    </style:style>
    <style:style style:name="P166" style:family="paragraph" style:parent-style-name="Heading_20_2">
      <style:paragraph-properties fo:break-before="page"/>
      <style:text-properties officeooo:rsid="0034ee78" officeooo:paragraph-rsid="0034ee78"/>
    </style:style>
    <style:style style:name="P167" style:family="paragraph" style:parent-style-name="Heading_20_2">
      <style:paragraph-properties fo:break-before="page"/>
      <style:text-properties officeooo:rsid="004142be" officeooo:paragraph-rsid="0045cf64"/>
    </style:style>
    <style:style style:name="P168" style:family="paragraph" style:parent-style-name="Heading_20_2">
      <style:paragraph-properties fo:break-before="page"/>
      <style:text-properties officeooo:rsid="000a7aef" officeooo:paragraph-rsid="000a7aef"/>
    </style:style>
    <style:style style:name="P169" style:family="paragraph" style:parent-style-name="Heading_20_2">
      <style:paragraph-properties fo:break-before="page"/>
      <style:text-properties officeooo:paragraph-rsid="00d8650e"/>
    </style:style>
    <style:style style:name="P170" style:family="paragraph" style:parent-style-name="Heading_20_2">
      <style:paragraph-properties fo:break-before="page"/>
      <style:text-properties officeooo:rsid="00c18e70" officeooo:paragraph-rsid="00c18e70"/>
    </style:style>
    <style:style style:name="P171" style:family="paragraph" style:parent-style-name="Heading_20_2">
      <style:paragraph-properties fo:break-before="page"/>
      <style:text-properties officeooo:rsid="00745285" officeooo:paragraph-rsid="00745285"/>
    </style:style>
    <style:style style:name="P172" style:family="paragraph" style:parent-style-name="Heading_20_2">
      <style:paragraph-properties fo:break-before="page"/>
      <style:text-properties officeooo:rsid="00a9c690" officeooo:paragraph-rsid="00a9c690"/>
    </style:style>
    <style:style style:name="P173" style:family="paragraph" style:parent-style-name="Heading_20_2">
      <style:paragraph-properties fo:break-before="page"/>
      <style:text-properties officeooo:rsid="010352e6" officeooo:paragraph-rsid="01034031"/>
    </style:style>
    <style:style style:name="P174" style:family="paragraph" style:parent-style-name="Heading_20_3">
      <style:text-properties officeooo:rsid="001227db" officeooo:paragraph-rsid="001227db"/>
    </style:style>
    <style:style style:name="P175" style:family="paragraph" style:parent-style-name="Heading_20_3" style:list-style-name=""/>
    <style:style style:name="P176" style:family="paragraph" style:parent-style-name="Heading_20_3" style:list-style-name="">
      <style:text-properties officeooo:rsid="006c6a19" officeooo:paragraph-rsid="006c6a19"/>
    </style:style>
    <style:style style:name="P177" style:family="paragraph" style:parent-style-name="Heading_20_3">
      <style:text-properties officeooo:rsid="00799fed"/>
    </style:style>
    <style:style style:name="P178" style:family="paragraph" style:parent-style-name="Heading_20_3">
      <style:text-properties officeooo:rsid="00799fed" officeooo:paragraph-rsid="00799fed"/>
    </style:style>
    <style:style style:name="P179" style:family="paragraph" style:parent-style-name="Heading_20_3">
      <style:text-properties officeooo:paragraph-rsid="00756402"/>
    </style:style>
    <style:style style:name="P180" style:family="paragraph" style:parent-style-name="Heading_20_3">
      <style:text-properties officeooo:rsid="0083723e" officeooo:paragraph-rsid="0083723e"/>
    </style:style>
    <style:style style:name="P181" style:family="paragraph" style:parent-style-name="Heading_20_3">
      <style:text-properties officeooo:rsid="0083723e" officeooo:paragraph-rsid="00c9ff6a"/>
    </style:style>
    <style:style style:name="P182" style:family="paragraph" style:parent-style-name="Heading_20_3">
      <style:text-properties officeooo:rsid="00855711" officeooo:paragraph-rsid="00855711"/>
    </style:style>
    <style:style style:name="P183" style:family="paragraph" style:parent-style-name="Heading_20_3">
      <style:text-properties officeooo:rsid="008981ec" officeooo:paragraph-rsid="008981ec"/>
    </style:style>
    <style:style style:name="P184" style:family="paragraph" style:parent-style-name="Heading_20_3">
      <style:text-properties officeooo:rsid="008d1afc" officeooo:paragraph-rsid="008d1afc"/>
    </style:style>
    <style:style style:name="P185" style:family="paragraph" style:parent-style-name="Heading_20_3">
      <style:text-properties officeooo:rsid="0106c5d7" officeooo:paragraph-rsid="0107ca75"/>
    </style:style>
    <style:style style:name="P186" style:family="paragraph" style:parent-style-name="Heading_20_3">
      <style:text-properties officeooo:rsid="00a9c690" officeooo:paragraph-rsid="00a9c690"/>
    </style:style>
    <style:style style:name="P187" style:family="paragraph" style:parent-style-name="Heading_20_3">
      <style:text-properties officeooo:rsid="00ab6fa9" officeooo:paragraph-rsid="00ab6fa9"/>
    </style:style>
    <style:style style:name="P188" style:family="paragraph" style:parent-style-name="Heading_20_3">
      <style:text-properties officeooo:rsid="00cf3228"/>
    </style:style>
    <style:style style:name="P189" style:family="paragraph" style:parent-style-name="Heading_20_3">
      <style:text-properties officeooo:rsid="00d62498"/>
    </style:style>
    <style:style style:name="P190" style:family="paragraph" style:parent-style-name="Heading_20_3">
      <style:text-properties officeooo:rsid="00d45834"/>
    </style:style>
    <style:style style:name="P191" style:family="paragraph" style:parent-style-name="Heading_20_3">
      <style:text-properties officeooo:paragraph-rsid="01034031"/>
    </style:style>
    <style:style style:name="P192" style:family="paragraph" style:parent-style-name="Heading_20_3">
      <style:text-properties officeooo:rsid="010d975b" officeooo:paragraph-rsid="01034031"/>
    </style:style>
    <style:style style:name="P193" style:family="paragraph" style:parent-style-name="Heading_20_3">
      <style:text-properties officeooo:rsid="01053274" officeooo:paragraph-rsid="01034031"/>
    </style:style>
    <style:style style:name="P194" style:family="paragraph" style:parent-style-name="Heading_20_3">
      <style:text-properties officeooo:rsid="010861ce" officeooo:paragraph-rsid="01034031"/>
    </style:style>
    <style:style style:name="P195" style:family="paragraph" style:parent-style-name="Heading_20_3">
      <style:text-properties officeooo:rsid="010a22ce" officeooo:paragraph-rsid="01034031"/>
    </style:style>
    <style:style style:name="P196" style:family="paragraph" style:parent-style-name="Heading_20_3">
      <style:text-properties officeooo:rsid="011de5ca" officeooo:paragraph-rsid="011de5ca"/>
    </style:style>
    <style:style style:name="P197" style:family="paragraph" style:parent-style-name="Heading_20_3">
      <style:text-properties officeooo:rsid="011e3c87" officeooo:paragraph-rsid="011e3c87"/>
    </style:style>
    <style:style style:name="P198" style:family="paragraph" style:parent-style-name="Heading_20_3">
      <style:paragraph-properties fo:break-before="page"/>
    </style:style>
    <style:style style:name="P199" style:family="paragraph" style:parent-style-name="Heading_20_3">
      <style:paragraph-properties fo:break-before="page"/>
      <style:text-properties officeooo:rsid="0055c0fb"/>
    </style:style>
    <style:style style:name="P200" style:family="paragraph" style:parent-style-name="Heading_20_4">
      <style:text-properties officeooo:rsid="00271556" officeooo:paragraph-rsid="00271556"/>
    </style:style>
    <style:style style:name="P201" style:family="paragraph" style:parent-style-name="Heading_20_4">
      <style:text-properties officeooo:rsid="00303cac" officeooo:paragraph-rsid="00303cac"/>
    </style:style>
    <style:style style:name="P202" style:family="paragraph" style:parent-style-name="Heading_20_4">
      <style:text-properties officeooo:rsid="0029204a" officeooo:paragraph-rsid="00331c06"/>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12b9578" officeooo:paragraph-rsid="012b9578"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2b9578" officeooo:paragraph-rsid="012b957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list-style-name="L1">
      <style:text-properties officeooo:paragraph-rsid="00e87709"/>
    </style:style>
    <style:style style:name="P206" style:family="paragraph" style:parent-style-name="Text_20_body" style:list-style-name="L1">
      <style:text-properties officeooo:rsid="00e87709" officeooo:paragraph-rsid="00e87709"/>
    </style:style>
    <style:style style:name="P207" style:family="paragraph" style:parent-style-name="Text_20_body" style:list-style-name="L1">
      <style:text-properties officeooo:rsid="0034ee78" officeooo:paragraph-rsid="00e87709"/>
    </style:style>
    <style:style style:name="P208" style:family="paragraph" style:parent-style-name="Text_20_body" style:list-style-name="L2">
      <style:text-properties officeooo:rsid="0017a831" officeooo:paragraph-rsid="001941a9"/>
    </style:style>
    <style:style style:name="P209" style:family="paragraph" style:parent-style-name="Text_20_body" style:list-style-name="L2">
      <style:text-properties officeooo:rsid="001941a9" officeooo:paragraph-rsid="001941a9"/>
    </style:style>
    <style:style style:name="P210" style:family="paragraph" style:parent-style-name="Text_20_body" style:list-style-name="L3">
      <style:text-properties officeooo:paragraph-rsid="00b133a5"/>
    </style:style>
    <style:style style:name="P211" style:family="paragraph" style:parent-style-name="Text_20_body" style:list-style-name="L3">
      <style:text-properties officeooo:rsid="00b133a5" officeooo:paragraph-rsid="00b133a5"/>
    </style:style>
    <style:style style:name="P212" style:family="paragraph" style:parent-style-name="Text_20_body" style:list-style-name="L4">
      <style:text-properties style:text-line-through-style="none" style:text-line-through-type="none" officeooo:rsid="00b67533" officeooo:paragraph-rsid="00b999cc"/>
    </style:style>
    <style:style style:name="P213" style:family="paragraph" style:parent-style-name="Text_20_body" style:list-style-name="L5">
      <style:text-properties style:text-line-through-style="none" style:text-line-through-type="none" officeooo:rsid="00b7b2be" officeooo:paragraph-rsid="00b999cc"/>
    </style:style>
    <style:style style:name="P214" style:family="paragraph" style:parent-style-name="Text_20_body" style:list-style-name="L5">
      <style:text-properties officeooo:paragraph-rsid="00b999cc"/>
    </style:style>
    <style:style style:name="P215" style:family="paragraph" style:parent-style-name="Text_20_body" style:list-style-name="L6">
      <style:text-properties officeooo:paragraph-rsid="00bb075f"/>
    </style:style>
    <style:style style:name="P216" style:family="paragraph" style:parent-style-name="Text_20_body" style:list-style-name="L6">
      <style:text-properties officeooo:rsid="00bb075f" officeooo:paragraph-rsid="00bd05ee"/>
    </style:style>
    <style:style style:name="P217" style:family="paragraph" style:parent-style-name="Text_20_body" style:list-style-name="L9">
      <style:text-properties officeooo:rsid="00e3f7f7" officeooo:paragraph-rsid="00e3f7f7"/>
    </style:style>
    <style:style style:name="P218" style:family="paragraph" style:parent-style-name="Text_20_body">
      <style:text-properties officeooo:paragraph-rsid="0121b526"/>
    </style:style>
    <style:style style:name="P219" style:family="paragraph" style:parent-style-name="Text_20_body">
      <style:text-properties officeooo:paragraph-rsid="0122dd8d"/>
    </style:style>
    <style:style style:name="P220" style:family="paragraph" style:parent-style-name="Text_20_body">
      <style:text-properties officeooo:paragraph-rsid="012460eb"/>
    </style:style>
    <style:style style:name="P221" style:family="paragraph" style:parent-style-name="Text_20_body">
      <style:text-properties officeooo:rsid="012624be" officeooo:paragraph-rsid="012624be"/>
    </style:style>
    <style:style style:name="P222" style:family="paragraph" style:parent-style-name="Text_20_body">
      <style:text-properties officeooo:paragraph-rsid="012624be"/>
    </style:style>
    <style:style style:name="P223" style:family="paragraph" style:parent-style-name="Text_20_body">
      <style:text-properties officeooo:paragraph-rsid="012b9196"/>
    </style:style>
    <style:style style:name="P224" style:family="paragraph" style:parent-style-name="Text_20_body">
      <style:text-properties officeooo:rsid="012c9423" officeooo:paragraph-rsid="012c9423"/>
    </style:style>
    <style:style style:name="P225" style:family="paragraph" style:parent-style-name="Text_20_body">
      <style:text-properties officeooo:paragraph-rsid="01312049"/>
    </style:style>
    <style:style style:name="P226"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27"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28"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29"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30"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style:style>
    <style:style style:name="T70" style:family="text">
      <style:text-properties style:text-line-through-style="none" style:text-line-through-type="none" officeooo:rsid="00aa152f"/>
    </style:style>
    <style:style style:name="T71" style:family="text">
      <style:text-properties style:text-line-through-style="none" style:text-line-through-type="none" officeooo:rsid="00addb07"/>
    </style:style>
    <style:style style:name="T72" style:family="text">
      <style:text-properties style:text-line-through-style="none" style:text-line-through-type="none" officeooo:rsid="00b169fc"/>
    </style:style>
    <style:style style:name="T73" style:family="text">
      <style:text-properties style:text-line-through-style="none" style:text-line-through-type="none" officeooo:rsid="00b67533"/>
    </style:style>
    <style:style style:name="T74" style:family="text">
      <style:text-properties style:text-line-through-style="none" style:text-line-through-type="none" officeooo:rsid="00b7b2be"/>
    </style:style>
    <style:style style:name="T75" style:family="text">
      <style:text-properties style:text-line-through-style="none" style:text-line-through-type="none" officeooo:rsid="00bfa837"/>
    </style:style>
    <style:style style:name="T76" style:family="text">
      <style:text-properties style:text-line-through-style="none" style:text-line-through-type="none" fo:font-style="normal" fo:font-weight="normal"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80"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1" style:family="text">
      <style:text-properties style:text-line-through-style="none" style:text-line-through-type="none" officeooo:rsid="010d6fab"/>
    </style:style>
    <style:style style:name="T82" style:family="text">
      <style:text-properties style:text-line-through-style="none" style:text-line-through-type="none" officeooo:rsid="010f43a7"/>
    </style:style>
    <style:style style:name="T83" style:family="text">
      <style:text-properties style:text-line-through-style="none" style:text-line-through-type="none" officeooo:rsid="0110423a"/>
    </style:style>
    <style:style style:name="T84" style:family="text">
      <style:text-properties style:text-line-through-style="none" style:text-line-through-type="none" officeooo:rsid="010cbab2"/>
    </style:style>
    <style:style style:name="T85" style:family="text">
      <style:text-properties style:text-line-through-style="none" style:text-line-through-type="none" officeooo:rsid="01110947"/>
    </style:style>
    <style:style style:name="T86" style:family="text">
      <style:text-properties style:text-line-through-style="none" style:text-line-through-type="none" officeooo:rsid="01119495"/>
    </style:style>
    <style:style style:name="T87" style:family="text">
      <style:text-properties style:text-line-through-style="none" style:text-line-through-type="none" officeooo:rsid="01137398"/>
    </style:style>
    <style:style style:name="T88" style:family="text">
      <style:text-properties style:text-line-through-style="none" style:text-line-through-type="none" officeooo:rsid="011733c7"/>
    </style:style>
    <style:style style:name="T89" style:family="text">
      <style:text-properties style:text-line-through-style="none" style:text-line-through-type="none" officeooo:rsid="0117fa58"/>
    </style:style>
    <style:style style:name="T90" style:family="text">
      <style:text-properties style:text-line-through-style="none" style:text-line-through-type="none" fo:font-weight="bold" officeooo:rsid="0117fa58" style:font-weight-asian="bold" style:font-weight-complex="bold"/>
    </style:style>
    <style:style style:name="T91" style:family="text">
      <style:text-properties style:text-line-through-style="none" style:text-line-through-type="none" officeooo:rsid="011945a7"/>
    </style:style>
    <style:style style:name="T92" style:family="text">
      <style:text-properties style:text-line-through-style="none" style:text-line-through-type="none" officeooo:rsid="011bdeea"/>
    </style:style>
    <style:style style:name="T93" style:family="text">
      <style:text-properties style:text-line-through-style="none" style:text-line-through-type="none" officeooo:rsid="01270be1"/>
    </style:style>
    <style:style style:name="T94" style:family="text">
      <style:text-properties style:text-line-through-style="none" style:text-line-through-type="none" officeooo:rsid="012ab241"/>
    </style:style>
    <style:style style:name="T95" style:family="text">
      <style:text-properties style:text-line-through-style="none" style:text-line-through-type="none" officeooo:rsid="012b9196"/>
    </style:style>
    <style:style style:name="T96" style:family="text">
      <style:text-properties style:text-line-through-style="none" style:text-line-through-type="none" officeooo:rsid="012c9423"/>
    </style:style>
    <style:style style:name="T97" style:family="text">
      <style:text-properties style:text-line-through-style="none" style:text-line-through-type="none" officeooo:rsid="0132a56b"/>
    </style:style>
    <style:style style:name="T98" style:family="text">
      <style:text-properties style:text-line-through-style="none" style:text-line-through-type="none" officeooo:rsid="0133c8e3"/>
    </style:style>
    <style:style style:name="T99" style:family="text">
      <style:text-properties style:text-line-through-style="none" style:text-line-through-type="none" officeooo:rsid="0137a097"/>
    </style:style>
    <style:style style:name="T100" style:family="text">
      <style:text-properties officeooo:rsid="00ab6fa9"/>
    </style:style>
    <style:style style:name="T101" style:family="text">
      <style:text-properties officeooo:rsid="00ac68f1"/>
    </style:style>
    <style:style style:name="T102" style:family="text">
      <style:text-properties officeooo:rsid="00ad7dbb"/>
    </style:style>
    <style:style style:name="T103" style:family="text">
      <style:text-properties officeooo:rsid="00addb07"/>
    </style:style>
    <style:style style:name="T104" style:family="text">
      <style:text-properties officeooo:rsid="00adedc7"/>
    </style:style>
    <style:style style:name="T105" style:family="text">
      <style:text-properties officeooo:rsid="00b09751"/>
    </style:style>
    <style:style style:name="T106" style:family="text">
      <style:text-properties officeooo:rsid="00b0b94e"/>
    </style:style>
    <style:style style:name="T107" style:family="text">
      <style:text-properties officeooo:rsid="00b133a5"/>
    </style:style>
    <style:style style:name="T108" style:family="text">
      <style:text-properties officeooo:rsid="00b48c82"/>
    </style:style>
    <style:style style:name="T109" style:family="text">
      <style:text-properties officeooo:rsid="00b7b2be"/>
    </style:style>
    <style:style style:name="T110" style:family="text">
      <style:text-properties officeooo:rsid="00b999cc"/>
    </style:style>
    <style:style style:name="T111" style:family="text">
      <style:text-properties officeooo:rsid="00ba5997"/>
    </style:style>
    <style:style style:name="T112" style:family="text">
      <style:text-properties officeooo:rsid="00bb075f"/>
    </style:style>
    <style:style style:name="T113" style:family="text">
      <style:text-properties officeooo:rsid="00bc585b"/>
    </style:style>
    <style:style style:name="T114" style:family="text">
      <style:text-properties officeooo:rsid="00bd05ee"/>
    </style:style>
    <style:style style:name="T115" style:family="text">
      <style:text-properties officeooo:rsid="00bea67a"/>
    </style:style>
    <style:style style:name="T116" style:family="text">
      <style:text-properties officeooo:rsid="00c16e52"/>
    </style:style>
    <style:style style:name="T117" style:family="text">
      <style:text-properties officeooo:rsid="00c18e70"/>
    </style:style>
    <style:style style:name="T118" style:family="text">
      <style:text-properties officeooo:rsid="00c1f9fd"/>
    </style:style>
    <style:style style:name="T119" style:family="text">
      <style:text-properties officeooo:rsid="0034ee78"/>
    </style:style>
    <style:style style:name="T120" style:family="text">
      <style:text-properties officeooo:rsid="00c3cf85"/>
    </style:style>
    <style:style style:name="T121" style:family="text">
      <style:text-properties style:text-position="super 58%"/>
    </style:style>
    <style:style style:name="T122" style:family="text">
      <style:text-properties style:text-position="super 58%" officeooo:rsid="00d46098"/>
    </style:style>
    <style:style style:name="T123" style:family="text">
      <style:text-properties officeooo:rsid="00c561db"/>
    </style:style>
    <style:style style:name="T124" style:family="text">
      <style:text-properties officeooo:rsid="00c7a8bf"/>
    </style:style>
    <style:style style:name="T125" style:family="text">
      <style:text-properties officeooo:rsid="00c99392"/>
    </style:style>
    <style:style style:name="T126" style:family="text">
      <style:text-properties officeooo:rsid="00c9ff6a"/>
    </style:style>
    <style:style style:name="T127" style:family="text">
      <style:text-properties officeooo:rsid="00cad0f2"/>
    </style:style>
    <style:style style:name="T128" style:family="text">
      <style:text-properties officeooo:rsid="00cb40c8"/>
    </style:style>
    <style:style style:name="T129" style:family="text">
      <style:text-properties officeooo:rsid="00cc9caf"/>
    </style:style>
    <style:style style:name="T130" style:family="text">
      <style:text-properties officeooo:rsid="00cd1b29"/>
    </style:style>
    <style:style style:name="T131" style:family="text">
      <style:text-properties officeooo:rsid="00ceb68f"/>
    </style:style>
    <style:style style:name="T132" style:family="text">
      <style:text-properties officeooo:rsid="00cf3228"/>
    </style:style>
    <style:style style:name="T133" style:family="text">
      <style:text-properties officeooo:rsid="00cfaff1"/>
    </style:style>
    <style:style style:name="T134" style:family="text">
      <style:text-properties officeooo:rsid="00d295a1"/>
    </style:style>
    <style:style style:name="T135" style:family="text">
      <style:text-properties officeooo:rsid="00d45834"/>
    </style:style>
    <style:style style:name="T136" style:family="text">
      <style:text-properties officeooo:rsid="00d46098"/>
    </style:style>
    <style:style style:name="T137" style:family="text">
      <style:text-properties officeooo:rsid="00d48856"/>
    </style:style>
    <style:style style:name="T138" style:family="text">
      <style:text-properties officeooo:rsid="00d5e85d"/>
    </style:style>
    <style:style style:name="T139" style:family="text">
      <style:text-properties officeooo:rsid="00d62498"/>
    </style:style>
    <style:style style:name="T140" style:family="text">
      <style:text-properties officeooo:rsid="00d796ec"/>
    </style:style>
    <style:style style:name="T141" style:family="text">
      <style:text-properties officeooo:rsid="00d91719"/>
    </style:style>
    <style:style style:name="T142" style:family="text">
      <style:text-properties officeooo:rsid="00dad67e"/>
    </style:style>
    <style:style style:name="T143" style:family="text">
      <style:text-properties officeooo:rsid="00dbdf43"/>
    </style:style>
    <style:style style:name="T144" style:family="text">
      <style:text-properties officeooo:rsid="00dccd84"/>
    </style:style>
    <style:style style:name="T145" style:family="text">
      <style:text-properties officeooo:rsid="00de3e64"/>
    </style:style>
    <style:style style:name="T146" style:family="text">
      <style:text-properties officeooo:rsid="00de964f"/>
    </style:style>
    <style:style style:name="T147" style:family="text">
      <style:text-properties officeooo:rsid="00e3f7f7"/>
    </style:style>
    <style:style style:name="T148" style:family="text">
      <style:text-properties officeooo:rsid="00e5b0a3"/>
    </style:style>
    <style:style style:name="T149" style:family="text">
      <style:text-properties officeooo:rsid="00e773b3"/>
    </style:style>
    <style:style style:name="T150" style:family="text">
      <style:text-properties officeooo:rsid="00e87709"/>
    </style:style>
    <style:style style:name="T151" style:family="text">
      <style:text-properties officeooo:rsid="00e9ed1d"/>
    </style:style>
    <style:style style:name="T152" style:family="text">
      <style:text-properties officeooo:rsid="00eaaeba"/>
    </style:style>
    <style:style style:name="T153" style:family="text">
      <style:text-properties officeooo:rsid="00eb3af6"/>
    </style:style>
    <style:style style:name="T154" style:family="text">
      <style:text-properties officeooo:rsid="00ed6788"/>
    </style:style>
    <style:style style:name="T155" style:family="text">
      <style:text-properties officeooo:rsid="00f0f259"/>
    </style:style>
    <style:style style:name="T156" style:family="text">
      <style:text-properties officeooo:rsid="00f5ac7f"/>
    </style:style>
    <style:style style:name="T157" style:family="text">
      <style:text-properties officeooo:rsid="00f792a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f792ad" style:font-style-asian="normal" style:font-weight-asian="normal" style:font-style-complex="normal" style:font-weight-complex="normal"/>
    </style:style>
    <style:style style:name="T160" style:family="text">
      <style:text-properties fo:font-style="normal" fo:font-weight="normal" officeooo:rsid="00fc65c8" style:font-style-asian="normal" style:font-weight-asian="normal" style:font-style-complex="normal" style:font-weight-complex="normal"/>
    </style:style>
    <style:style style:name="T161" style:family="text">
      <style:text-properties fo:font-style="normal" fo:font-weight="normal" officeooo:rsid="00fe0fb6" style:font-style-asian="normal" style:font-weight-asian="normal" style:font-style-complex="normal" style:font-weight-complex="normal"/>
    </style:style>
    <style:style style:name="T162" style:family="text">
      <style:text-properties officeooo:rsid="00f961cb"/>
    </style:style>
    <style:style style:name="T163" style:family="text">
      <style:text-properties officeooo:rsid="00fc65c8"/>
    </style:style>
    <style:style style:name="T164" style:family="text">
      <style:text-properties officeooo:rsid="0102b46b"/>
    </style:style>
    <style:style style:name="T165" style:family="text">
      <style:text-properties officeooo:rsid="004142be"/>
    </style:style>
    <style:style style:name="T166" style:family="text">
      <style:text-properties officeooo:rsid="010a22ce"/>
    </style:style>
    <style:style style:name="T167" style:family="text">
      <style:text-properties officeooo:rsid="010861ce"/>
    </style:style>
    <style:style style:name="T168" style:family="text">
      <style:text-properties officeooo:rsid="01053274"/>
    </style:style>
    <style:style style:name="T169" style:family="text">
      <style:text-properties officeooo:rsid="01100fcf"/>
    </style:style>
    <style:style style:name="T170" style:family="text">
      <style:text-properties officeooo:rsid="010d975b"/>
    </style:style>
    <style:style style:name="T171" style:family="text">
      <style:text-properties officeooo:rsid="010eb6af"/>
    </style:style>
    <style:style style:name="T172" style:family="text">
      <style:text-properties officeooo:rsid="01067ded"/>
    </style:style>
    <style:style style:name="T173" style:family="text">
      <style:text-properties officeooo:rsid="0108aa5e"/>
    </style:style>
    <style:style style:name="T174" style:family="text">
      <style:text-properties fo:font-style="italic" officeooo:rsid="0108aa5e" style:font-style-asian="italic" style:font-style-complex="italic"/>
    </style:style>
    <style:style style:name="T175" style:family="text">
      <style:text-properties fo:font-style="italic" officeooo:rsid="01100fcf" style:font-style-asian="italic" style:font-style-complex="italic"/>
    </style:style>
    <style:style style:name="T176" style:family="text">
      <style:text-properties officeooo:rsid="01112685"/>
    </style:style>
    <style:style style:name="T177" style:family="text">
      <style:text-properties officeooo:rsid="0103797d"/>
    </style:style>
    <style:style style:name="T178" style:family="text">
      <style:text-properties officeooo:rsid="0107ca75"/>
    </style:style>
    <style:style style:name="T179" style:family="text">
      <style:text-properties officeooo:rsid="0109512a"/>
    </style:style>
    <style:style style:name="T180" style:family="text">
      <style:text-properties officeooo:rsid="010b75f2"/>
    </style:style>
    <style:style style:name="T181" style:family="text">
      <style:text-properties officeooo:rsid="010cbab2"/>
    </style:style>
    <style:style style:name="T182" style:family="text">
      <style:text-properties officeooo:rsid="010f43a7"/>
    </style:style>
    <style:style style:name="T183" style:family="text">
      <style:text-properties officeooo:rsid="01162d28"/>
    </style:style>
    <style:style style:name="T184" style:family="text">
      <style:text-properties officeooo:rsid="011733c7"/>
    </style:style>
    <style:style style:name="T185" style:family="text">
      <style:text-properties style:text-line-through-style="solid" style:text-line-through-type="single" officeooo:rsid="011733c7"/>
    </style:style>
    <style:style style:name="T186" style:family="text">
      <style:text-properties officeooo:rsid="011cc60f"/>
    </style:style>
    <style:style style:name="T187" style:family="text">
      <style:text-properties officeooo:rsid="011de5ca"/>
    </style:style>
    <style:style style:name="T188" style:family="text">
      <style:text-properties officeooo:rsid="011e3c87"/>
    </style:style>
    <style:style style:name="T189" style:family="text">
      <style:text-properties officeooo:rsid="011e8b98"/>
    </style:style>
    <style:style style:name="T190" style:family="text">
      <style:text-properties officeooo:rsid="011e9054"/>
    </style:style>
    <style:style style:name="T191" style:family="text">
      <style:text-properties officeooo:rsid="011fa69e"/>
    </style:style>
    <style:style style:name="T192" style:family="text">
      <style:text-properties officeooo:rsid="01208a5a"/>
    </style:style>
    <style:style style:name="T193" style:family="text">
      <style:text-properties officeooo:rsid="0121b526"/>
    </style:style>
    <style:style style:name="T194" style:family="text">
      <style:text-properties officeooo:rsid="0122dd8d"/>
    </style:style>
    <style:style style:name="T195" style:family="text">
      <style:text-properties officeooo:rsid="012460eb"/>
    </style:style>
    <style:style style:name="T196" style:family="text">
      <style:text-properties officeooo:rsid="01271fd7"/>
    </style:style>
    <style:style style:name="T197" style:family="text">
      <style:text-properties officeooo:rsid="01290d4d"/>
    </style:style>
    <style:style style:name="T198" style:family="text">
      <style:text-properties officeooo:rsid="012b9196"/>
    </style:style>
    <style:style style:name="T199" style:family="text">
      <style:text-properties officeooo:rsid="012c9423"/>
    </style:style>
    <style:style style:name="T200" style:family="text">
      <style:text-properties style:font-name="Liberation Sans"/>
    </style:style>
    <style:style style:name="T201" style:family="text">
      <style:text-properties style:font-name="Liberation Serif"/>
    </style:style>
    <style:style style:name="T202" style:family="text">
      <style:text-properties style:font-name="Liberation Serif" officeooo:rsid="012c9423"/>
    </style:style>
    <style:style style:name="T203" style:family="text">
      <style:text-properties style:font-name="Liberation Serif" officeooo:rsid="01312049"/>
    </style:style>
    <style:style style:name="T204" style:family="text">
      <style:text-properties style:font-name="Liberation Serif" officeooo:rsid="0131ea5b"/>
    </style:style>
    <style:style style:name="T205" style:family="text">
      <style:text-properties style:font-name="Liberation Serif" officeooo:rsid="0133c8e3"/>
    </style:style>
    <style:style style:name="T206" style:family="text">
      <style:text-properties officeooo:rsid="0132a56b"/>
    </style:style>
    <style:style style:name="T207" style:family="text">
      <style:text-properties officeooo:rsid="0134966a"/>
    </style:style>
    <style:style style:name="T208" style:family="text">
      <style:text-properties officeooo:rsid="01367092"/>
    </style:style>
    <style:style style:name="T209" style:family="text">
      <style:text-properties officeooo:rsid="0136c04c"/>
    </style:style>
    <style:style style:name="T210" style:family="text">
      <style:text-properties officeooo:rsid="013905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Koviz User's Guide</text:p>
      <text:p text:style-name="P3"><draw:line text:anchor-type="paragraph" draw:z-index="0" draw:name="Shape1" draw:style-name="gr1" draw:text-style-name="P230" svg:x1="0.0457in" svg:y1="0.2016in" svg:x2="6.3567in" svg:y2="0.2016in"><text:p/></draw:line></text:p>
      <text:p text:style-name="P118"><draw:line text:anchor-type="paragraph" draw:z-index="1" draw:name="Shape2" draw:style-name="gr1" draw:text-style-name="P230" svg:x1="6.3571in" svg:y1="-0.1256in" svg:x2="6.4264in" svg:y2="8.1579in"><text:p/></draw:line>Version <text:span text:style-name="T183">0</text:span>.0.<text:span text:style-name="T183">1</text:span></text:p>
      <text:p text:style-name="P118"><text:span text:style-name="T193">June</text:span><text:span text:style-name="T186"> </text:span>20<text:span text:style-name="T52">2</text:span><text:span text:style-name="T186">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52"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9"><text:a xlink:type="simple" xlink:href="#__RefHeading__232_403196617" text:style-name="Index_20_Link" text:visited-style-name="Index_20_Link"><text:tab/>2</text:a></text:p>
          <text:p text:style-name="P149"><text:a xlink:type="simple" xlink:href="#__RefHeading__252_403196617" text:style-name="Index_20_Link" text:visited-style-name="Index_20_Link">Introduction<text:tab/>4</text:a></text:p>
          <text:p text:style-name="P149"><text:a xlink:type="simple" xlink:href="#__RefHeading__645_403196617" text:style-name="Index_20_Link" text:visited-style-name="Index_20_Link">RUN Directories<text:tab/>4</text:a></text:p>
          <text:p text:style-name="P149"><text:a xlink:type="simple" xlink:href="#__RefHeading___Toc1918_3517546431" text:style-name="Index_20_Link" text:visited-style-name="Index_20_Link">RUN Files<text:tab/>4</text:a></text:p>
          <text:p text:style-name="P149"><text:a xlink:type="simple" xlink:href="#__RefHeading__655_403196617" text:style-name="Index_20_Link" text:visited-style-name="Index_20_Link">MONTE Directories<text:tab/>4</text:a></text:p>
          <text:p text:style-name="P149"><text:a xlink:type="simple" xlink:href="#__RefHeading__234_403196617" text:style-name="Index_20_Link" text:visited-style-name="Index_20_Link">DP Files<text:tab/>5</text:a></text:p>
          <text:p text:style-name="P151"><text:a xlink:type="simple" xlink:href="#__RefHeading__475_403196617" text:style-name="Index_20_Link" text:visited-style-name="Index_20_Link">DP File Syntax<text:tab/>5</text:a></text:p>
          <text:p text:style-name="P151"><text:a xlink:type="simple" xlink:href="#__RefHeading__560_403196617" text:style-name="Index_20_Link" text:visited-style-name="Index_20_Link">DP Line and Symbol Styles<text:tab/>7</text:a></text:p>
          <text:p text:style-name="P151"><text:a xlink:type="simple" xlink:href="#__RefHeading__595_403196617" text:style-name="Index_20_Link" text:visited-style-name="Index_20_Link">DP File Example<text:tab/>7</text:a></text:p>
          <text:p text:style-name="P149"><text:a xlink:type="simple" xlink:href="#__RefHeading__759_403196617" text:style-name="Index_20_Link" text:visited-style-name="Index_20_Link">Session Files<text:tab/>8</text:a></text:p>
          <text:p text:style-name="P149"><text:a xlink:type="simple" xlink:href="#__RefHeading__254_403196617" text:style-name="Index_20_Link" text:visited-style-name="Index_20_Link">External Programs<text:tab/>10</text:a></text:p>
          <text:p text:style-name="P150"><text:a xlink:type="simple" xlink:href="#__RefHeading__264_403196617" text:style-name="Index_20_Link" text:visited-style-name="Index_20_Link">External Program DP File Specification<text:tab/>10</text:a></text:p>
          <text:p text:style-name="P150"><text:a xlink:type="simple" xlink:href="#__RefHeading__381_403196617" text:style-name="Index_20_Link" text:visited-style-name="Index_20_Link">External Program DP File Example<text:tab/>10</text:a></text:p>
          <text:p text:style-name="P150"><text:a xlink:type="simple" xlink:href="#__RefHeading__383_403196617" text:style-name="Index_20_Link" text:visited-style-name="Index_20_Link">External Program Source Code Example<text:tab/>11</text:a></text:p>
          <text:p text:style-name="P150"><text:a xlink:type="simple" xlink:href="#__RefHeading___Toc907_1341101074" text:style-name="Index_20_Link" text:visited-style-name="Index_20_Link">Building Example External Program On Linux<text:tab/>11</text:a></text:p>
          <text:p text:style-name="P150"><text:a xlink:type="simple" xlink:href="#__RefHeading__385_403196617" text:style-name="Index_20_Link" text:visited-style-name="Index_20_Link">External Program Building<text:tab/>12</text:a></text:p>
          <text:p text:style-name="P151"><text:a xlink:type="simple" xlink:href="#__RefHeading__387_403196617" text:style-name="Index_20_Link" text:visited-style-name="Index_20_Link">Linux<text:tab/>12</text:a></text:p>
          <text:p text:style-name="P151"><text:a xlink:type="simple" xlink:href="#__RefHeading__389_403196617" text:style-name="Index_20_Link" text:visited-style-name="Index_20_Link">MacOS X<text:tab/>12</text:a></text:p>
          <text:p text:style-name="P150"><text:a xlink:type="simple" xlink:href="#__RefHeading__391_403196617" text:style-name="Index_20_Link" text:visited-style-name="Index_20_Link">External Program Summary<text:tab/>12</text:a></text:p>
          <text:p text:style-name="P150"><text:a xlink:type="simple" xlink:href="#__RefHeading__393_403196617" text:style-name="Index_20_Link" text:visited-style-name="Index_20_Link">External Program Problems And Caveats<text:tab/>12</text:a></text:p>
          <text:p text:style-name="P149"><text:a xlink:type="simple" xlink:href="#__RefHeading___Toc1920_3517546431" text:style-name="Index_20_Link" text:visited-style-name="Index_20_Link">Scripts<text:tab/>13</text:a></text:p>
          <text:p text:style-name="P149"><text:a xlink:type="simple" xlink:href="#__RefHeading___Toc2384_1878335349" text:style-name="Index_20_Link" text:visited-style-name="Index_20_Link">Commandline Options<text:tab/>14</text:a></text:p>
          <text:p text:style-name="P149"><text:a xlink:type="simple" xlink:href="#__RefHeading__761_403196617" text:style-name="Index_20_Link" text:visited-style-name="Index_20_Link">Plot Interaction<text:tab/>15</text:a></text:p>
          <text:p text:style-name="P149"><text:a xlink:type="simple" xlink:href="#__RefHeading__853_403196617" text:style-name="Index_20_Link" text:visited-style-name="Index_20_Link">Maps<text:tab/>17</text:a></text:p>
          <text:p text:style-name="P149"><text:a xlink:type="simple" xlink:href="#__RefHeading___Toc1404_4203752023" text:style-name="Index_20_Link" text:visited-style-name="Index_20_Link">Groups<text:tab/>18</text:a></text:p>
          <text:p text:style-name="P149"><text:a xlink:type="simple" xlink:href="#__RefHeading___Toc811_3249638883" text:style-name="Index_20_Link" text:visited-style-name="Index_20_Link">Video<text:tab/>19</text:a></text:p>
          <text:p text:style-name="P150"><text:a xlink:type="simple" xlink:href="#__RefHeading___Toc948_3009348355" text:style-name="Index_20_Link" text:visited-style-name="Index_20_Link">Introduction<text:tab/>19</text:a></text:p>
          <text:p text:style-name="P150"><text:a xlink:type="simple" xlink:href="#__RefHeading___Toc950_3009348355" text:style-name="Index_20_Link" text:visited-style-name="Index_20_Link">Building Koviz with MPV Support<text:tab/>19</text:a></text:p>
          <text:p text:style-name="P150"><text:a xlink:type="simple" xlink:href="#__RefHeading___Toc952_3009348355" text:style-name="Index_20_Link" text:visited-style-name="Index_20_Link">Data Synchronization<text:tab/>19</text:a></text:p>
          <text:p text:style-name="P150"><text:a xlink:type="simple" xlink:href="#__RefHeading___Toc954_3009348355" text:style-name="Index_20_Link" text:visited-style-name="Index_20_Link">Commandline -video and -videoOffset options<text:tab/>19</text:a></text:p>
          <text:p text:style-name="P150"><text:a xlink:type="simple" xlink:href="#__RefHeading___Toc1683_1107607212" text:style-name="Index_20_Link" text:visited-style-name="Index_20_Link">Commandline -videoList option<text:tab/>20</text:a></text:p>
          <text:p text:style-name="P150"><text:a xlink:type="simple" xlink:href="#__RefHeading___Toc1076_3009348355" text:style-name="Index_20_Link" text:visited-style-name="Index_20_Link">Session Files<text:tab/>20</text:a></text:p>
          <text:p text:style-name="P150"><text:a xlink:type="simple" xlink:href="#__RefHeading___Toc1078_3009348355" text:style-name="Index_20_Link" text:visited-style-name="Index_20_Link">Video Directory Within RUN<text:tab/>20</text:a></text:p>
          <text:p text:style-name="P150"><text:a xlink:type="simple" xlink:href="#__RefHeading___Toc1080_3009348355" text:style-name="Index_20_Link" text:visited-style-name="Index_20_Link">Multiple RUNs And Multiple Videos<text:tab/>21</text:a></text:p>
          <text:p text:style-name="P150"><text:a xlink:type="simple" xlink:href="#__RefHeading___Toc4425_149071425" text:style-name="Index_20_Link" text:visited-style-name="Index_20_Link">Custom Video Directory Path<text:tab/>22</text:a></text:p>
          <text:p text:style-name="P149"><text:a xlink:type="simple" xlink:href="#__RefHeading___Toc1340_1544136475" text:style-name="Index_20_Link" text:visited-style-name="Index_20_Link">Blender<text:tab/>23</text:a></text:p>
          <text:p text:style-name="P150"><text:a xlink:type="simple" xlink:href="#__RefHeading___Toc1342_1544136475" text:style-name="Index_20_Link" text:visited-style-name="Index_20_Link">Introduction<text:tab/>23</text:a></text:p>
          <text:p text:style-name="P150"><text:a xlink:type="simple" xlink:href="#__RefHeading___Toc1344_1544136475" text:style-name="Index_20_Link" text:visited-style-name="Index_20_Link">Blender Addon Setup<text:tab/>23</text:a></text:p>
          <text:p text:style-name="P150"><text:a xlink:type="simple" xlink:href="#__RefHeading___Toc1346_1544136475" text:style-name="Index_20_Link" text:visited-style-name="Index_20_Link">Animate Blender Default Cube<text:tab/>23</text:a></text:p>
          <text:p text:style-name="P150"><text:a xlink:type="simple" xlink:href="#__RefHeading___Toc1348_1544136475" text:style-name="Index_20_Link" text:visited-style-name="Index_20_Link">Sync Koviz To Default Cube Animation<text:tab/>24</text:a></text:p>
          <text:p text:style-name="P150"><text:soft-page-break/><text:a xlink:type="simple" xlink:href="#__RefHeading___Toc1350_1544136475" text:style-name="Index_20_Link" text:visited-style-name="Index_20_Link">Sync Blender To Koviz With ES’s Vismo<text:tab/>25</text:a></text:p>
          <text:p text:style-name="P149"><text:a xlink:type="simple" xlink:href="#__RefHeading___Toc1685_1107607212" text:style-name="Index_20_Link" text:visited-style-name="Index_20_Link">Live Trick TV Plots<text:tab/>26</text:a></text:p>
          <text:p text:style-name="P150"><text:a xlink:type="simple" xlink:href="#__RefHeading___Toc1687_1107607212" text:style-name="Index_20_Link" text:visited-style-name="Index_20_Link">Introduction<text:tab/>26</text:a></text:p>
          <text:p text:style-name="P150"><text:a xlink:type="simple" xlink:href="#__RefHeading___Toc1689_1107607212" text:style-name="Index_20_Link" text:visited-style-name="Index_20_Link">Plotting TV Params<text:tab/>26</text:a></text:p>
          <text:p text:style-name="P150"><text:a xlink:type="simple" xlink:href="#__RefHeading___Toc1691_1107607212" text:style-name="Index_20_Link" text:visited-style-name="Index_20_Link">Changing Live Plot Domain<text:tab/>27</text:a></text:p>
          <text:p text:style-name="P150"><text:a xlink:type="simple" xlink:href="#__RefHeading___Toc1693_1107607212" text:style-name="Index_20_Link" text:visited-style-name="Index_20_Link">Live DP Files<text:tab/>27</text:a></text:p>
          <text:p text:style-name="P150"><text:a xlink:type="simple" xlink:href="#__RefHeading___Toc1780_3036021424" text:style-name="Index_20_Link" text:visited-style-name="Index_20_Link">Live Spring Plot Example<text:tab/>27</text:a></text:p>
          <text:p text:style-name="P149"><text:a xlink:type="simple" xlink:href="#__RefHeading___Toc4053_2364949263" text:style-name="Index_20_Link" text:visited-style-name="Index_20_Link">Profiling Trick Jobs<text:tab/>29</text:a></text:p>
          <text:p text:style-name="P150"><text:a xlink:type="simple" xlink:href="#__RefHeading___Toc2091_3967031703" text:style-name="Index_20_Link" text:visited-style-name="Index_20_Link">Add Sleeps To Ball L2 Sim<text:tab/>29</text:a></text:p>
          <text:p text:style-name="P150"><text:a xlink:type="simple" xlink:href="#__RefHeading___Toc2093_3967031703" text:style-name="Index_20_Link" text:visited-style-name="Index_20_Link">Run And View Sleep Effect<text:tab/>29</text:a></text:p>
          <text:p text:style-name="P150"><text:a xlink:type="simple" xlink:href="#__RefHeading___Toc2095_3967031703" text:style-name="Index_20_Link" text:visited-style-name="Index_20_Link">Modify and Build Profiler<text:tab/>30</text:a></text:p>
          <text:p text:style-name="P150"><text:a xlink:type="simple" xlink:href="#__RefHeading___Toc2097_3967031703" text:style-name="Index_20_Link" text:visited-style-name="Index_20_Link">Add Profiler To Sim<text:tab/>30</text:a></text:p>
          <text:p text:style-name="P150"><text:a xlink:type="simple" xlink:href="#__RefHeading___Toc2099_3967031703" text:style-name="Index_20_Link" text:visited-style-name="Index_20_Link">Run Sim And See Profile Results<text:tab/>30</text:a></text:p>
          <text:p text:style-name="P149"><text:a xlink:type="simple" xlink:href="#__RefHeading___Toc2386_1878335349" text:style-name="Index_20_Link" text:visited-style-name="Index_20_Link">HDF5<text:tab/>31</text:a></text:p>
          <text:p text:style-name="P150"><text:a xlink:type="simple" xlink:href="#__RefHeading___Toc2388_1878335349" text:style-name="Index_20_Link" text:visited-style-name="Index_20_Link">Building Koviz With HDF5<text:tab/>31</text:a></text:p>
          <text:p text:style-name="P150"><text:a xlink:type="simple" xlink:href="#__RefHeading___Toc2390_1878335349" text:style-name="Index_20_Link" text:visited-style-name="Index_20_Link">Generic HDF5 Parameters<text:tab/>31</text:a></text:p>
          <text:p text:style-name="P149"><text:a xlink:type="simple" xlink:href="#__RefHeading___Toc2812_1878335349" text:style-name="Index_20_Link" text:visited-style-name="Index_20_Link">Parquet<text:tab/>32</text:a></text:p>
          <text:p text:style-name="P150"><text:a xlink:type="simple" xlink:href="#__RefHeading___Toc2814_1878335349" text:style-name="Index_20_Link" text:visited-style-name="Index_20_Link">Building Koviz With Parquet<text:tab/>32</text:a></text:p>
          <text:p text:style-name="P150"><text:a xlink:type="simple" xlink:href="#__RefHeading___Toc2816_1878335349" text:style-name="Index_20_Link" text:visited-style-name="Index_20_Link">Parquet Data Layout<text:tab/>33</text:a></text:p>
          <text:p text:style-name="P150"><text:a xlink:type="simple" xlink:href="#__RefHeading___Toc2818_1878335349" text:style-name="Index_20_Link" text:visited-style-name="Index_20_Link">Parquet Units<text:tab/>33</text:a></text:p>
          <text:p text:style-name="P150"><text:a xlink:type="simple" xlink:href="#__RefHeading___Toc2820_1878335349" text:style-name="Index_20_Link" text:visited-style-name="Index_20_Link">Koviz Parquet Test<text:tab/>33</text:a></text:p>
        </text:index-body>
      </text:table-of-content>
      <text:p text:style-name="P6"/>
      <text:p text:style-name="P6"/>
      <text:h text:style-name="P166" text:outline-level="2"><text:bookmark-start text:name="__RefHeading__252_403196617"/>Introduction<text:bookmark-end text:name="__RefHeading__252_403196617"/></text:h>
      <text:p text:style-name="P35">Koviz is a simulation data <text:span text:style-name="T150">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50">also </text:span><text:span text:style-name="T17">offers:</text:span></text:p>
      <text:list xml:id="list4239821476" text:style-name="L1">
        <text:list-item>
          <text:p text:style-name="P206">A real-time analysis report <text:span text:style-name="T17">for Trick real-time data recordings</text:span></text:p>
        </text:list-item>
        <text:list-item>
          <text:p text:style-name="P207"><text:span text:style-name="T150">A</text:span><text:span text:style-name="T17"> plugin-like functionality, external programs, to transform simulation data</text:span></text:p>
        </text:list-item>
        <text:list-item>
          <text:p text:style-name="P205"><text:span text:style-name="T150">Data/video synchronization to</text:span><text:span text:style-name="T17"> view video alongside associated data </text:span><text:span text:style-name="T150">plots</text:span></text:p>
        </text:list-item>
        <text:list-item>
          <text:p text:style-name="P206">Data/Blender graphics synchronization</text:p>
        </text:list-item>
        <text:list-item>
          <text:p text:style-name="P206">Live Trick simulation plots</text:p>
        </text:list-item>
      </text:list>
      <text:p text:style-name="P35">The <text:span text:style-name="T150">main </text:span>usage for koviz <text:span text:style-name="T40">is</text:span>: </text:p>
      <text:p text:style-name="P58"><text:span text:style-name="T40">UNIX Prompt&gt; </text:span>koviz <text:span text:style-name="T16">&lt;</text:span>RUN_<text:span text:style-name="T16">dir|MONTE_dir</text:span><text:span text:style-name="T153">|RUN file</text:span>&gt; [DP_<text:span text:style-name="T16">file1</text:span>...] [options]</text:p>
      <text:p text:style-name="P90">To see a list of options:</text:p>
      <text:p text:style-name="P58">UNIX Prompt&gt; koviz <text:span text:style-name="T25">&lt;ENTER&gt;</text:span></text:p>
      <text:h text:style-name="P153" text:outline-level="2"><text:bookmark-start text:name="__RefHeading__645_403196617"/>RUN Directories<text:bookmark-end text:name="__RefHeading__645_403196617"/></text:h>
      <text:p text:style-name="P11"><text:span text:style-name="T153">Koviz plots data from </text:span>RUN directories <text:span text:style-name="T153">which </text:span>contain log files <text:span text:style-name="T153">(normally </text:span>from <text:span text:style-name="T153">Trick </text:span>simulation run<text:span text:style-name="T153">s)</text:span>. <text:s/><text:span text:style-name="T21">Koviz is efficient at coplotting multiple RUN</text:span><text:span text:style-name="T153">s</text:span><text:span text:style-name="T21">:</text:span></text:p>
      <text:p text:style-name="P73">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74">UNIX Prompt&gt; koviz my-time-history.csv my-motion-capture.mot</text:p>
      <text:h text:style-name="P154"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9">UNIX Prompt&gt; koviz MONTE_dir</text:p>
      <text:h text:style-name="P155"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200" text:outline-level="4"><text:bookmark-start text:name="__RefHeading__475_403196617"/>DP File Syntax<text:bookmark-end text:name="__RefHeading__475_403196617"/></text:h>
      <text:p text:style-name="P56">[Title]</text:p>
      <text:p text:style-name="P52">[PLOTS: </text:p>
      <text:p text:style-name="P82">PAGE <text:span text:style-name="T154">page_number_integer</text:span>: “page_title” </text:p>
      <text:p text:style-name="P111"><text:span text:style-name="T177">[TAB_LABEL: “Widget Tab Label”]</text:span><text:line-break/>[FOREGROUND_COLOR: “#rrggbb|color_name”]<text:line-break/>[BACKGROUND_COLOR: “#rrggbb|color_name”]</text:p>
      <text:p text:style-name="P107">PLOT plot_number: “plot title” </text:p>
      <text:p text:style-name="P115">[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54">continued on next page</text:span><text:span text:style-name="T42"><text:line-break/><text:line-break/></text:span><text:soft-page-break/><text:span text:style-name="T42"><text:line-break/></text:span><text:span text:style-name="T154">[HLINE: float]<text:line-break/> <text:s text:c="7"/>[COLOR: “#rrggbb|color_name”]<text:line-break/> <text:s text:c="7"/>[LABEL: “printf format - %g for value, %s for unit”]<text:line-break/> <text:s text:c="7"/>[UNITS: “unit”]<text:line-break/> <text:s text:c="7"/>[LABEL_UNITS: “unit”]<text:line-break/> <text:s text:c="7"/></text:span><text:span text:style-name="T155">[LABEL_ORIENT: “left|center|right|0&lt;=placement&lt;=1”]</text:span></text:p>
      <text:p text:style-name="P114">X_VARIABLE: “param_name” </text:p>
      <text:p text:style-name="P116">[LABEL: “label”] <text:line-break/>[UNITS: “unit”] <text:line-break/>[SCALE_FACTOR: scale_value] <text:line-break/>[BIAS: bias_value] </text:p>
      <text:p text:style-name="P114">Y_VARIABLE: “param_name” </text:p>
      <text:p text:style-name="P117"><text:span text:style-name="T9">(</text:span>Same attributes as X_VARIABLE<text:span text:style-name="T9">)</text:span> <text:line-break/>[SYMBOL_STYLE: symbol_style] <text:line-break/>[SYMBOL_SIZE: symbol_size]<text:line-break/><text:span text:style-name="T152">[SYMBOL_END: symbol_style]</text:span><text:line-break/>[LINE_STYLE: line_style] <text:line-break/>[LINE_COLOR: <text:span text:style-name="T7">“#rrggbb|color_name”</text:span>] </text:p>
      <text:p text:style-name="P114">[Y_VARIABLE: ... ] </text:p>
      <text:p text:style-name="P53">]</text:p>
      <text:p text:style-name="P53">[TABLES: </text:p>
      <text:p text:style-name="P83">TABLE table_number_<text:span text:style-name="T154">integer</text:span>: “table_title” <text:line-break/> <text:s text:c="3"/><text:span text:style-name="T177">[TAB_LABEL: “Widget Tab Label”]</text:span></text:p>
      <text:p text:style-name="P107">VARIABLE: “param_name” <text:line-break/><text:span text:style-name="T8">(S</text:span>ame <text:span text:style-name="T8">attributes </text:span>as X_VARIABLE in PLOT<text:span text:style-name="T8">)</text:span> <text:line-break/>[VARIABLE: ...] </text:p>
      <text:p text:style-name="P53">] </text:p>
      <text:p text:style-name="P53">[PROGRAM: “<text:span text:style-name="T154">path_to_</text:span>program_<text:span text:style-name="T154">shared_library</text:span>”: </text:p>
      <text:p text:style-name="P83">IN: “param_name1” “param_name2” ... <text:line-break/>OUT: “param_name1” param_name2” ... </text:p>
      <text:p text:style-name="P47">]</text:p>
      <text:h text:style-name="P201" text:outline-level="4"><text:bookmark-start text:name="__RefHeading__560_403196617"/><text:soft-page-break/><text:span text:style-name="T34">DP </text:span>Line and Symbol Styles<text:bookmark-end text:name="__RefHeading__560_403196617"/></text:h>
      <text:p text:style-name="P50">SYMBOL_STYLE:</text:p>
      <text:p text:style-name="P80">None|Square|Circle|Star|XX|Triangle|<text:line-break/>Solid_Square|Solid_Circle|Thick_Square|Thick_Circle<text:span text:style-name="T41">|<text:line-break/>Number_[0-9]</text:span><text:span text:style-name="T151">|sa</text:span><text:span text:style-name="T152">tellite</text:span></text:p>
      <text:p text:style-name="P145">SYMBOL_END:</text:p>
      <text:p text:style-name="P147">Same symbols as SYMBOL_STYLE</text:p>
      <text:p text:style-name="P50">SYMBOL_SIZE: </text:p>
      <text:p text:style-name="P80">Tiny|Small|Medium|Large</text:p>
      <text:p text:style-name="P50">LINE_STYLE: </text:p>
      <text:p text:style-name="P80">“No_Line|Thick_Line|X_Thick_Line|Fine_Dash|Med_Fine_Dash|<text:line-break/>Long_Dash|X_Long_Dash|Dot_Dash|2_Dot_Dash|3_Dot_Dash| <text:line-break/>4_Dot_Dash|Plain|Dash<text:span text:style-name="T62">|Scatter</text:span>”</text:p>
      <text:p text:style-name="P50">LINE_COLOR: </text:p>
      <text:p text:style-name="P80">“#rrggbb|&lt;color_name&gt;” </text:p>
      <text:h text:style-name="P202" text:outline-level="4"/>
      <text:h text:style-name="P202"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51">PLOTS: </text:p>
      <text:p text:style-name="P51">PAGE 1: "<text:span text:style-name="T11">Page Title</text:span>" </text:p>
      <text:p text:style-name="P81">PLOT 1: "<text:span text:style-name="T11">Ball X Position</text:span>" </text:p>
      <text:p text:style-name="P106"><text:span text:style-name="T12">X_VARIABLE: "</text:span><text:span text:style-name="T13">sys.exec.out.time</text:span><text:span text:style-name="T12">" <text:line-break/>Y_VARIABLE: "ball.state.out.position[</text:span><text:span text:style-name="T13">0</text:span><text:span text:style-name="T12">]"</text:span></text:p>
      <text:h text:style-name="P158" text:outline-level="2"/>
      <text:h text:style-name="P167" text:outline-level="2"><text:bookmark-start text:name="__RefHeading__759_403196617"/>Session Files<text:bookmark-end text:name="__RefHeading__759_403196617"/></text:h>
      <text:p text:style-name="P13">To launch koviz with a set of RUNs and DPs, the -session command-line option may be used:</text:p>
      <text:p text:style-name="P60">UNIX Prompt&gt; koviz -session &lt;session_file&gt;</text:p>
      <text:p text:style-name="P91">The syntax for the session file is as follows:</text:p>
      <text:p text:style-name="P78"><text:span text:style-name="T164">[# At beginning of line is a comment]</text:span><text:span text:style-name="T165"><text:line-break/>[Title] <text:line-break/>[DEVICE: &lt;File &lt;file_name&gt;|Terminal&gt; ]<text:line-break/>[FREQUENCY: cycle_time] <text:line-break/>[TIME_MATCH_TOLERANCE: delta_time] <text:line-break/>[PRESENTATION: Compare|Error|Error+Compare] <text:line-break/>PRODUCT: </text:span><text:span text:style-name="T23">DP</text:span><text:span text:style-name="T165">_file</text:span><text:span text:style-name="T24">name</text:span><text:span text:style-name="T165"> <text:line-break/>[PRODUCT: </text:span><text:span text:style-name="T23">DP</text:span><text:span text:style-name="T165">_file</text:span><text:span text:style-name="T24">name</text:span><text:span text:style-name="T165">_n ...] <text:line-break/>RUN: RUN_directory <text:line-break/>[RUN: RUN_directory_n …]<text:line-break/></text:span><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3">[PlotLegendPosition: ne|e|se|s|sw|w|nw|n]</text:span></text:p>
      <text:p text:style-name="P91">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9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9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9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9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91">The RUN: statement specifies a simulation RUN directory from which to retrieve logged data, &lt;RUN_directory&gt;. <text:s/>One or more RUNs must be specified.</text:p>
      <text:p text:style-name="P94">The SHIFT: statement is used to shift RUN time(s). <text:s/>If there is a single RUN, specify a double value e.g. SHIFT: 13.56. <text:s/>If there are multiple RUNs, use a comma delimited list of RUN:&lt;shift_value&gt; specs e.g. SHIFT: RUN_a:13.56,RUN_b:77.28,RUN_c:23.0.</text:p>
      <text:p text:style-name="P94">The TimeName: statement is used when time is not the default “sys.exec.out.time” e.g. TimeName: myTimeName.</text:p>
      <text:p text:style-name="P94">The MapFile: statement is used to tell koviz where the map file is located. <text:s/>Maps are described later in this document, but in a nutshell maps are used to map RUNs with different parameter names so that the RUNs can be compared and difference plotted.</text:p>
      <text:p text:style-name="P94">The EXCLUDE: and FILTER: statements <text:span text:style-name="T44">either cull out or filter for logfiles within the RUN directories. <text:s/>This can help speed up data loading and/or show a subset of all variables logged.</text:span></text:p>
      <text:h text:style-name="P159" text:outline-level="2"/>
      <text:h text:style-name="P168"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55">PROGRAM: “<text:span text:style-name="T48">/home/kvetter/test/ext_programs/librss.so</text:span>” </text:p>
      <text:p text:style-name="P84">IN: </text:p>
      <text:p text:style-name="P109">“<text:span text:style-name="T48">Chaser.stVeh.stFFrDock.vecF_Frame[0]</text:span>”<text:line-break/>“<text:span text:style-name="T48">Chaser.stVeh.stFFrDock.vecF_Frame[1]</text:span>”<text:line-break/>“<text:span text:style-name="T48">Chaser.stVeh.stFFrDock.vecF_Frame[2]</text:span>”</text:p>
      <text:p text:style-name="P84">OUT: </text:p>
      <text:p text:style-name="P108">“<text:span text:style-name="T48">vecF_Frame_rss</text:span>” </text:p>
      <text:p text:style-name="P54"><text:span text:style-name="T48">PLOTS:<text:line-break/></text:span><text:line-break/>PAGE 1: "<text:span text:style-name="T48">External Program Example</text:span>" </text:p>
      <text:p text:style-name="P85">PLOT 1: “<text:span text:style-name="T48">RSS</text:span>”</text:p>
      <text:p text:style-name="P110">X_VARIABLE: "sys.exec.out.time" <text:line-break/>Y_VARIABLE: "<text:span text:style-name="T48">vecF_Frame_rss</text:span>" <text:line-break/></text:p>
      <text:h text:style-name="P17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9"><text:span text:style-name="T47">#include &lt;math.h&gt;<text:line-break/></text:span><text:span text:style-name="T4"><text:line-break/>void</text:span><text:span text:style-name="T3"> kovizProgram( double* in, int numIn, double* out, int numOut )</text:span><text:line-break/><text:span text:style-name="T3">{</text:span></text:p>
      <text:p text:style-name="P87">out[0] = sqrt(in[0]*in[0] + in[1]*in[1] + in[2]*in[2]);</text:p>
      <text:p text:style-name="P48">}</text:p>
      <text:h text:style-name="P176" text:outline-level="3"><text:bookmark-start text:name="__RefHeading___Toc907_1341101074"/>Building <text:span text:style-name="T49">Example </text:span>External Program On Linux<text:line-break/><text:bookmark-end text:name="__RefHeading___Toc907_1341101074"/></text:h>
      <text:p text:style-name="P62">% cc -fPIC -c rss.c<text:line-break/>% ld -shared -o librss.so rss.o -lm -lc</text:p>
      <text:h text:style-name="P199"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46">Step 1. cc <text:span text:style-name="T46">-fPIC </text:span>-c &lt;myprogram1&gt;.c (compile all individual object this way) </text:p>
      <text:p text:style-name="P46">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46">Step 1. cc -c &lt;myprogram1&gt;.c (compile all individual object this way) </text:p>
      <text:p text:style-name="P46">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46">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827806058" text:style-name="L2">
        <text:list-item>
          <text:p text:style-name="P208">Can’t load shared library!!! Ensure that $LD_LIBRARY_PATH is set so that koviz can find the *.so file. <text:s/>The external program (*.so program) may have unresolved dependencies. Try “nm” on the external program, and look for “U”s.</text:p>
        </text:list-item>
        <text:list-item>
          <text:p text:style-name="P209">Koviz will not scale or bias X values with external programs.</text:p>
        </text:list-item>
        <text:list-item>
          <text:p text:style-name="P208">External programs convert everything to doubles, and only accept and output doubles. </text:p>
        </text:list-item>
        <text:list-item>
          <text:p text:style-name="P208">External programs have no notion of unit conversion. </text:p>
        </text:list-item>
      </text:list>
      <text:h text:style-name="P160"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76">koviz -script “script1 arg1 arg2… argN, script2 arg1 arg2… argN, …”</text:p>
      <text:p text:style-name="P101"><text:span text:style-name="T156">When koviz is brought up the UI will put the scripts in </text:span><text:span text:style-name="T162">koviz’</text:span><text:span text:style-name="T156"> main menu. <text:s/>When the user selects the sc</text:span><text:span text:style-name="T157">r</text:span><text:span text:style-name="T156">ipt off the menu, the script will be called with the current RUN as the first argument followed by the user supplied arguments. <text:s/></text:span><text:span text:style-name="T157">Additionally, one may place an ampersand in front of a character to hot-key the menu item.</text:span></text:p>
      <text:p text:style-name="P101"><text:span text:style-name="T157">For example, suppose one has a this bash script, </text:span><text:span text:style-name="T163">show</text:span><text:span text:style-name="T157">-run.sh:</text:span></text:p>
      <text:p text:style-name="P75"><text:span text:style-name="T157">#! /</text:span><text:span text:style-name="T159">usr/bin/env bash<text:line-break/></text:span><text:span text:style-name="T160">xmessage</text:span><text:span text:style-name="T159"> “$1”</text:span></text:p>
      <text:p text:style-name="P101"><text:span text:style-name="T159">Try </text:span><text:span text:style-name="T161">the following with some RUN. <text:s/>Make sure double and single quotes are normal ASCII for this commandline call i.e. beware of cut-n-paste:</text:span></text:p>
      <text:p text:style-name="P77"><text:span text:style-name="T158">% koviz -</text:span><text:span text:style-name="T76">script “&amp;</text:span><text:span text:style-name="T78">show</text:span><text:span text:style-name="T76">-run.sh, &amp;koviz -t1 ‘Calling Koviz’” </text:span><text:span text:style-name="T77">&lt;RUN&gt;</text:span></text:p>
      <text:p text:style-name="P102"><text:span text:style-name="T76">Once koviz comes up, </text:span><text:span text:style-name="T79">select </text:span><text:span text:style-name="T80">Scripts &gt; show-run.sh</text:span></text:p>
      <text:p text:style-name="P100"><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57"><text:s/></text:span><text:s/></text:p>
      <text:h text:style-name="P161" text:outline-level="2"><text:bookmark-start text:name="__RefHeading___Toc2384_1878335349"/><text:soft-page-break/>Commandline Options<text:bookmark-end text:name="__RefHeading___Toc2384_1878335349"/></text:h>
      <text:p text:style-name="P43"><text:span text:style-name="T184">This section covers some of the commandline options that koviz offers.</text:span><text:span text:style-name="T185"><text:line-break/><text:line-break/>-</text:span><text:span text:style-name="T90">vars2csv &lt;csvfile.csv&gt;</text:span><text:span text:style-name="T88"><text:line-break/>This option will create a csv </text:span><text:span text:style-name="T92">from the list of variables given in the -vars option</text:span><text:span text:style-name="T88">. <text:s/>The -vars option must be used. <text:s text:c="2"/></text:span><text:span text:style-name="T89">The variable</text:span><text:span text:style-name="T92">s</text:span><text:span text:style-name="T89"> can be scaled, biased and given units. <text:s/>For example:<text:line-break/> koviz RUN_test -vars “ball.state.out.position[0]</text:span><text:span text:style-name="T88"> </text:span><text:span text:style-name="T89">{ft} scale(-1) bias(100), ball.state.out.velocity {mph}” <text:s text:c="2"/>-</text:span><text:span text:style-name="T91">vars2csv posvel.csv</text:span><text:span text:style-name="T89"><text:line-break/></text:span></text:p>
      <text:h text:style-name="P156"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577083535840">
          <table:table-cell table:style-name="Table1.A1" office:value-type="string">
            <text:p text:style-name="P120">Select Curve</text:p>
          </table:table-cell>
          <table:table-cell table:style-name="Table1.B1" office:value-type="string">
            <text:p text:style-name="P120">Mouse Left Click Curve</text:p>
          </table:table-cell>
        </table:table-row>
        <table:table-row table:style-name="TableLine94577083448960">
          <table:table-cell table:style-name="Table1.A2" office:value-type="string">
            <text:p text:style-name="P127">Drag Curve</text:p>
          </table:table-cell>
          <table:table-cell table:style-name="Table1.B2" office:value-type="string">
            <text:p text:style-name="P127">Mouse Left Click Curve to select<text:line-break/>Then Keypress Crtl + Mouse Left Drag</text:p>
          </table:table-cell>
        </table:table-row>
        <table:table-row table:style-name="TableLine94577083457328">
          <table:table-cell table:style-name="Table1.A2" office:value-type="string">
            <text:p text:style-name="P127">Drag Curve Onto Another Curve</text:p>
          </table:table-cell>
          <table:table-cell table:style-name="Table1.B2" office:value-type="string">
            <text:p text:style-name="P127">Mouse Left Click Curve to select<text:line-break/>Then Keypress Alt+Ctrl+Mouse Left Drag<text:line-break/>making init points of both curves close enough to “snap”</text:p>
          </table:table-cell>
        </table:table-row>
        <table:table-row table:style-name="TableLine94577083459472">
          <table:table-cell table:style-name="Table1.A2" office:value-type="string">
            <text:p text:style-name="P119">Zoom In</text:p>
          </table:table-cell>
          <table:table-cell table:style-name="Table1.B2" office:value-type="string">
            <text:p text:style-name="P119">Mouse <text:span text:style-name="T27">Middle</text:span> Click <text:span text:style-name="T28">a</text:span>nd Drag Zoom Box</text:p>
          </table:table-cell>
        </table:table-row>
        <table:table-row table:style-name="TableLine94577083462688">
          <table:table-cell table:style-name="Table1.A2" office:value-type="string">
            <text:p text:style-name="P119">Zoom Out</text:p>
          </table:table-cell>
          <table:table-cell table:style-name="Table1.B2" office:value-type="string">
            <text:p text:style-name="P119">Mouse Right Click <text:span text:style-name="T63">or Keypress Escape</text:span></text:p>
          </table:table-cell>
        </table:table-row>
        <table:table-row table:style-name="TableLine94577083465280">
          <table:table-cell table:style-name="Table1.A2" office:value-type="string">
            <text:p text:style-name="P120">Pan</text:p>
          </table:table-cell>
          <table:table-cell table:style-name="Table1.B2" office:value-type="string">
            <text:p text:style-name="P120">Mouse Left Drag In Middle Of Plot</text:p>
          </table:table-cell>
        </table:table-row>
        <table:table-row table:style-name="TableLine94577083482256">
          <table:table-cell table:style-name="Table1.A2" office:value-type="string">
            <text:p text:style-name="P120">Scale</text:p>
          </table:table-cell>
          <table:table-cell table:style-name="Table1.B2" office:value-type="string">
            <text:p text:style-name="P120">Mouse Left Drag In Outter Extremity Of Plot</text:p>
          </table:table-cell>
        </table:table-row>
        <table:table-row table:style-name="TableLine94577083488480">
          <table:table-cell table:style-name="Table1.A2" office:value-type="string">
            <text:p text:style-name="P120"><text:span text:style-name="T45">Toggle Single/Multiplot </text:span>View</text:p>
          </table:table-cell>
          <table:table-cell table:style-name="Table1.B2" office:value-type="string">
            <text:p text:style-name="P120">Mouse Left Click <text:span text:style-name="T45">On Y-Axis Label or Plot Title</text:span></text:p>
          </table:table-cell>
        </table:table-row>
        <table:table-row table:style-name="TableLine94577083498256">
          <table:table-cell table:style-name="Table1.A2" office:value-type="string">
            <text:p text:style-name="P122"><text:span text:style-name="T30">Toggle</text:span> Y Axis Units</text:p>
          </table:table-cell>
          <table:table-cell table:style-name="Table1.B2" office:value-type="string">
            <text:p text:style-name="P122">Mouse Wheel Over Y-Axis Unit In Curly Braces {<text:span text:style-name="T30">unit</text:span>}</text:p>
          </table:table-cell>
        </table:table-row>
        <table:table-row table:style-name="TableLine94577083501824">
          <table:table-cell table:style-name="Table1.A2" office:value-type="string">
            <text:p text:style-name="P126">Toggle Linear/Logscale</text:p>
          </table:table-cell>
          <table:table-cell table:style-name="Table1.B2" office:value-type="string">
            <text:p text:style-name="P126">Mouse Wheel over x or y tic values</text:p>
          </table:table-cell>
        </table:table-row>
        <table:table-row table:style-name="TableLine94577083520032">
          <table:table-cell table:style-name="Table1.A2" office:value-type="string">
            <text:p text:style-name="P121">Suspend Live Coordinate Updates</text:p>
          </table:table-cell>
          <table:table-cell table:style-name="Table1.B2" office:value-type="string">
            <text:p text:style-name="P121">Keypress Shift While Mov<text:span text:style-name="T29">ing</text:span> Mouse Off Plot</text:p>
          </table:table-cell>
        </table:table-row>
        <table:table-row table:style-name="TableLine94577083624016">
          <table:table-cell table:style-name="Table1.A2" office:value-type="string">
            <text:p text:style-name="P122">Toggle Presentation <text:span text:style-name="T131">(compare/error)</text:span></text:p>
          </table:table-cell>
          <table:table-cell table:style-name="Table1.B2" office:value-type="string">
            <text:p text:style-name="P122">Keypress Spacebar</text:p>
          </table:table-cell>
        </table:table-row>
        <table:table-row table:style-name="TableLine94577083639072">
          <table:table-cell table:style-name="Table1.A2" office:value-type="string">
            <text:p text:style-name="P122">Print Current Coordinate <text:span text:style-name="T65">&amp; Dx,Dy</text:span></text:p>
          </table:table-cell>
          <table:table-cell table:style-name="Table1.B2" office:value-type="string">
            <text:p text:style-name="P122">Keypress Period</text:p>
          </table:table-cell>
        </table:table-row>
        <table:table-row table:style-name="TableLine94577083639824">
          <table:table-cell table:style-name="Table1.A2" office:value-type="string">
            <text:p text:style-name="P124">Measure Distance On Plot</text:p>
          </table:table-cell>
          <table:table-cell table:style-name="Table1.B2" office:value-type="string">
            <text:p text:style-name="P124">Keypress Alt + Mouse Left Drag (updates koviz status bar)</text:p>
          </table:table-cell>
        </table:table-row>
        <table:table-row table:style-name="TableLine94577083640624">
          <table:table-cell table:style-name="Table1.A2" office:value-type="string">
            <text:p text:style-name="P123">Hop To Prev/Next Plot Coord</text:p>
          </table:table-cell>
          <table:table-cell table:style-name="Table1.B2" office:value-type="string">
            <text:p text:style-name="P123">Keypress Left/Right Arrow (after curve selected)</text:p>
          </table:table-cell>
        </table:table-row>
        <table:table-row table:style-name="TableLine94577083641424">
          <table:table-cell table:style-name="Table1.A2" office:value-type="string">
            <text:p text:style-name="P123">Place Marker On Plot Coord</text:p>
          </table:table-cell>
          <table:table-cell table:style-name="Table1.B2" office:value-type="string">
            <text:p text:style-name="P123">Keypress Comma</text:p>
          </table:table-cell>
        </table:table-row>
        <table:table-row table:style-name="TableLine94577083642224">
          <table:table-cell table:style-name="Table1.A2" office:value-type="string">
            <text:p text:style-name="P125">Change X Axis Variable <text:span text:style-name="T140">(normal)</text:span></text:p>
          </table:table-cell>
          <table:table-cell table:style-name="Table1.B2" office:value-type="string">
            <text:p text:style-name="P125"><text:span text:style-name="T66">Options-&gt;</text:span>Drag-n-Drop. Drag-n-drop variable onto x-axis label.</text:p>
          </table:table-cell>
        </table:table-row>
        <table:table-row table:style-name="TableLine94577083643024">
          <table:table-cell table:style-name="Table1.A2" office:value-type="string">
            <text:p text:style-name="P136">Change X Axis Variable (live data)</text:p>
          </table:table-cell>
          <table:table-cell table:style-name="Table1.B2" office:value-type="string">
            <text:p text:style-name="P136">See section at end on Live Sim Data</text:p>
          </table:table-cell>
        </table:table-row>
        <table:table-row table:style-name="TableLine94577083643824">
          <table:table-cell table:style-name="Table1.A2" office:value-type="string">
            <text:p text:style-name="P128">Frequency Domain Toggle</text:p>
          </table:table-cell>
          <table:table-cell table:style-name="Table1.B2" office:value-type="string">
            <text:p text:style-name="P128">Keypress f</text:p>
          </table:table-cell>
        </table:table-row>
        <table:table-row table:style-name="TableLine94577083644624">
          <table:table-cell table:style-name="Table1.A2" office:value-type="string">
            <text:p text:style-name="P129">Butterworth Filter</text:p>
          </table:table-cell>
          <table:table-cell table:style-name="Table1.B2" office:value-type="string">
            <text:p text:style-name="P129">Keypress b</text:p>
          </table:table-cell>
        </table:table-row>
        <table:table-row table:style-name="TableLine94577083645424">
          <table:table-cell table:style-name="Table1.A2" office:value-type="string">
            <text:p text:style-name="P130">Savitzky-Golay Filter</text:p>
          </table:table-cell>
          <table:table-cell table:style-name="Table1.B2" office:value-type="string">
            <text:p text:style-name="P130">Keypress g</text:p>
          </table:table-cell>
        </table:table-row>
        <table:table-row table:style-name="TableLine94577083646224">
          <table:table-cell table:style-name="Table1.A2" office:value-type="string">
            <text:p text:style-name="P131">Flip Curve About <text:span text:style-name="T116">X</text:span>-Axis</text:p>
          </table:table-cell>
          <table:table-cell table:style-name="Table1.B2" office:value-type="string">
            <text:p text:style-name="P131">Keypress -</text:p>
          </table:table-cell>
        </table:table-row>
        <table:table-row table:style-name="TableLine94577083647024">
          <table:table-cell table:style-name="Table1.A2" office:value-type="string">
            <text:p text:style-name="P132">Derivative Of Curve</text:p>
          </table:table-cell>
          <table:table-cell table:style-name="Table1.B2" office:value-type="string">
            <text:p text:style-name="P132">Keypress d</text:p>
          </table:table-cell>
        </table:table-row>
        <table:table-row table:style-name="TableLine94577083647824">
          <table:table-cell table:style-name="Table1.A2" office:value-type="string">
            <text:p text:style-name="P133">Integral Of Curve</text:p>
          </table:table-cell>
          <table:table-cell table:style-name="Table1.B2" office:value-type="string">
            <text:p text:style-name="P133">Keypress i (use entry box for initial value, default to 0.0)</text:p>
          </table:table-cell>
        </table:table-row>
        <table:table-row table:style-name="TableLine94577083648624">
          <table:table-cell table:style-name="Table1.A2" office:value-type="string">
            <text:p text:style-name="P133">… <text:span text:style-name="T141">continued on next page</text:span></text:p>
          </table:table-cell>
          <table:table-cell table:style-name="Table1.B2" office:value-type="string">
            <text:p text:style-name="P133">...</text:p>
          </table:table-cell>
        </table:table-row>
      </table:table>
      <text:h text:style-name="P162" text:outline-level="2"><text:soft-page-break/></text:h>
      <table:table table:name="Table2" table:style-name="Table2">
        <table:table-column table:style-name="Table2.A"/>
        <table:table-column table:style-name="Table2.B"/>
        <table:table-row table:style-name="TableLine94577083649792">
          <table:table-cell table:style-name="Table2.A1" office:value-type="string">
            <text:p text:style-name="P140">Summation of all curves on plot</text:p>
          </table:table-cell>
          <table:table-cell table:style-name="Table2.B1" office:value-type="string">
            <text:p text:style-name="P140">Keypress s</text:p>
          </table:table-cell>
        </table:table-row>
        <table:table-row table:style-name="TableLine94577083667632">
          <table:table-cell table:style-name="Table2.A2" office:value-type="string">
            <text:p text:style-name="P141">Magnitude of all curves on plot</text:p>
          </table:table-cell>
          <table:table-cell table:style-name="Table2.B2" office:value-type="string">
            <text:p text:style-name="P141">Keypress m</text:p>
          </table:table-cell>
        </table:table-row>
        <table:table-row table:style-name="TableLine94577083668400">
          <table:table-cell table:style-name="Table2.A2" office:value-type="string">
            <text:p text:style-name="P138"><text:span text:style-name="T144">Plot e</text:span><text:span text:style-name="T135">xpand</text:span><text:span text:style-name="T144">ed</text:span><text:span text:style-name="T135"> </text:span><text:span text:style-name="T140">live sim </text:span><text:span text:style-name="T135">parameter</text:span><text:span text:style-name="T144">s</text:span><text:span text:style-name="T135"> </text:span><text:span text:style-name="T144">on</text:span><text:span text:style-name="T135"> individual pages</text:span></text:p>
          </table:table-cell>
          <table:table-cell table:style-name="Table2.B2" office:value-type="string">
            <text:p text:style-name="P137">Left Mouse Click Parameter</text:p>
          </table:table-cell>
        </table:table-row>
        <table:table-row table:style-name="TableLine94577083668656">
          <table:table-cell table:style-name="Table2.A2" office:value-type="string">
            <text:p text:style-name="P138"><text:span text:style-name="T144">Plot e</text:span><text:span text:style-name="T140">xpand</text:span><text:span text:style-name="T144">ed</text:span><text:span text:style-name="T140"> live sim parameter</text:span><text:span text:style-name="T144">s</text:span><text:span text:style-name="T140"> </text:span><text:span text:style-name="T144">on</text:span><text:span text:style-name="T140"> individual plots on same page</text:span></text:p>
          </table:table-cell>
          <table:table-cell table:style-name="Table2.B2" office:value-type="string">
            <text:p text:style-name="P137">Keypress Ctrl + Left Mouse Click Parameter</text:p>
          </table:table-cell>
        </table:table-row>
        <table:table-row table:style-name="TableLine94577083669136">
          <table:table-cell table:style-name="Table2.A2" office:value-type="string">
            <text:p text:style-name="P138"><text:span text:style-name="T146">Co</text:span><text:span text:style-name="T144">Plot e</text:span><text:span text:style-name="T140">xpand</text:span><text:span text:style-name="T144">ed</text:span><text:span text:style-name="T140"> live sim parameter</text:span><text:span text:style-name="T144">s</text:span><text:span text:style-name="T140"> </text:span><text:span text:style-name="T144">on</text:span><text:span text:style-name="T140"> same plot</text:span></text:p>
          </table:table-cell>
          <table:table-cell table:style-name="Table2.B2" office:value-type="string">
            <text:p text:style-name="P137">Keypress Alt + Left Mouse Click Parameter</text:p>
          </table:table-cell>
        </table:table-row>
        <table:table-row table:style-name="TableLine94577083669728">
          <table:table-cell table:style-name="Table2.A2" office:value-type="string">
            <text:p text:style-name="P139">Start a new plot page<text:line-break/>and honor optional Ctrl and Alt keys</text:p>
          </table:table-cell>
          <table:table-cell table:style-name="Table2.B2" office:value-type="string">
            <text:p text:style-name="P139">Keypress Shift + [Ctrl|Alt] + Left Mouse click parameter</text:p>
          </table:table-cell>
        </table:table-row>
      </table:table>
      <text:h text:style-name="P157" text:outline-level="2"/>
      <text:h text:style-name="P169"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86">“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92">UNIX Prompt&gt; cat spots2dyn.kvz</text:p>
      <text:p text:style-name="P61">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93">Maps may also be used to scale and bias variables. <text:s/>If the logged data has no units, units may be applied in the map file as well. <text:s/>Here is an example of map file with scale, bias and unit specs:</text:p>
      <text:p text:style-name="P63">ForceX = Fx <text:s text:c="14"/>= inertialForceZ {N},<text:line-break/>ForceY = Fy bias(-12.25) <text:s/>= inertialForceX {N},<text:line-break/>ForceZ = Fz scale(-1.0) <text:s text:c="2"/>= inertialForceY {N}</text:p>
      <text:h text:style-name="P163" text:outline-level="2"/>
      <text:h text:style-name="P170" text:outline-level="2"><text:bookmark-start text:name="__RefHeading___Toc1404_4203752023"/>Groups<text:bookmark-end text:name="__RefHeading___Toc1404_4203752023"/></text:h>
      <text:p text:style-name="P28"><text:span text:style-name="T117">When plotting multiple </text:span><text:span text:style-name="T118">RUNs</text:span><text:span text:style-name="T117">, one can group </text:span><text:span text:style-name="T118">RUN </text:span><text:span text:style-name="T117">subsets together for coloring, styling and labeling. <text:s/></text:span><text:span text:style-name="T118">Grouping is done via regular expressions and ranges. <text:s/>For example, </text:span><text:span text:style-name="T120">for the following</text:span><text:span text:style-name="T118"> set of RUNs: RUN_damp_1, RUN_damp_2, </text:span><text:span text:style-name="T120">RUN_clamped_1, RUN_clamped_2, </text:span><text:span text:style-name="T118">RUN_free_1, RUN_free_2, RUN_free_3, one could group “damped” </text:span><text:span text:style-name="T120">and “clamped” together </text:span><text:span text:style-name="T118"><text:s/>and </text:span><text:span text:style-name="T120">group </text:span><text:span text:style-name="T118">“free” </text:span><text:span text:style-name="T120">RUNs </text:span><text:span text:style-name="T118">with the following command:<text:line-break/></text:span></text:p>
      <text:p text:style-name="P70"><text:span text:style-name="T119">UNIX Prompt&gt; koviz </text:span><text:span text:style-name="T118">RUN* </text:span><text:span text:style-name="T120">\</text:span><text:span text:style-name="T118"><text:line-break/> <text:s text:c="38"/>-g1 “damp</text:span><text:span text:style-name="T120">|clamp”</text:span><text:span text:style-name="T118"> -l1 “Damped </text:span><text:span text:style-name="T120">and Clamped” </text:span><text:span text:style-name="T118">-c1 blue -ls1 </text:span><text:span text:style-name="T120">plain</text:span><text:span text:style-name="T118"> \</text:span></text:p>
      <text:p text:style-name="P70"><text:span text:style-name="T118"><text:s text:c="39"/>-g2 free -</text:span><text:span text:style-name="T120">l2 Free -c1 green -ls1 x_thick_line</text:span><text:span text:style-name="T118"><text:line-break/></text:span></text:p>
      <text:p text:style-name="P29">The following <text:span text:style-name="T123">command</text:span> uses ranges to <text:span text:style-name="T124">group the first ten RUNs as pink and</text:span> the 99<text:span text:style-name="T121">th</text:span> RUN as thick white:<text:line-break/></text:p>
      <text:p text:style-name="P71"><text:span text:style-name="T119">UNIX Prompt&gt; </text:span><text:span text:style-name="T123">koviz MONTE_RUN_test -bg black -fg "#ededed" \<text:line-break/> <text:s text:c="39"/>-g1 "0,10" -c1 pink -l1 "First </text:span><text:span text:style-name="T125">Ten</text:span><text:span text:style-name="T123"> Runs" \<text:line-break/> <text:s text:c="39"/>-g2 99 -c2 white -ls2 x_thick_line -l2 "Last Run" DP_pos_vs_acc</text:span></text:p>
      <text:h text:style-name="P163"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71" text:outline-level="2"><text:bookmark-start text:name="__RefHeading___Toc811_3249638883"/>Video<text:bookmark-end text:name="__RefHeading___Toc811_3249638883"/></text:h>
      <text:h text:style-name="P178"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79"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66">% sudo yum install <text:s/>mpv-libs mpv-libs-devel mpv<text:line-break/>% cd &lt;koviz-repo&gt;<text:line-break/>% make distclean<text:line-break/>% qmake-qt5<text:line-break/>% make</text:p>
      <text:h text:style-name="P177"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80"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72">% koviz RUN_loadcell -video hammerstrike.mp4 -videoOffset 12.345</text:p>
      <text:p text:style-name="P98"/>
      <text:h text:style-name="P181" text:outline-level="3"><text:bookmark-start text:name="__RefHeading___Toc1683_1107607212"/><text:soft-page-break/>Commandline -video<text:span text:style-name="T126">List</text:span> option<text:bookmark-end text:name="__RefHeading___Toc1683_1107607212"/></text:h>
      <text:p text:style-name="P105"><text:span text:style-name="T126">The -videoList commandline option can be used to tie multiple videos to a single RUN. <text:s/>The -videoList option takes a </text:span><text:span text:style-name="T127">comma separate </text:span><text:span text:style-name="T126">list of video:offsets using </text:span><text:span text:style-name="T127">a </text:span><text:span text:style-name="T126">colon to separate the video file name from the offset e.g:<text:line-break/><text:tab/>% koviz RUN_fun -videoLis</text:span><text:span text:style-name="T127">t</text:span><text:span text:style-name="T126">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82"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64"><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95"><text:span text:style-name="T14">To</text:span><text:span text:style-name="T15"> run:</text:span></text:p>
      <text:p text:style-name="P57">% koviz -session session_hammer</text:p>
      <text:h text:style-name="P183"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30">ingle</text:span><text:span text:style-name="T59"> videos, is to create a “video” directory </text:span><text:span text:style-name="T180">(or customize </text:span><text:span text:style-name="T180"><text:bookmark-ref text:reference-format="page" text:ref-name="__RefHeading___Toc4425_149071425">22</text:bookmark-ref></text:span><text:span text:style-name="T180">)</text:span><text:span text:style-name="T59">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65">RUN_loadcell/</text:p>
      <text:p text:style-name="P88">loadcell_data.csv<text:line-break/>video/</text:p>
      <text:p text:style-name="P112">hammerstrike.mp4<text:line-break/>video-offset.txt (containing 12.345)</text:p>
      <text:p text:style-name="P96">If the RUN directory is setup this way the following will bring up the data and the associated video:</text:p>
      <text:p text:style-name="P65">% koviz RUN_loadcel<text:span text:style-name="T60">l</text:span></text:p>
      <text:h text:style-name="P184" text:outline-level="3"><text:bookmark-start text:name="__RefHeading___Toc1080_3009348355"/><text:soft-page-break/>Multiple RUNs <text:span text:style-name="T127">And</text:span> Multiple Videos<text:bookmark-end text:name="__RefHeading___Toc1080_3009348355"/></text:h>
      <text:p text:style-name="P30"><text:span text:style-name="T127">Finally, </text:span><text:span text:style-name="T128">to tie</text:span><text:span text:style-name="T127"> multiple videos per RUN, <text:s/></text:span><text:span text:style-name="T128">place a set of videos in the “RUN/video” directory </text:span><text:span text:style-name="T180">(or customize </text:span><text:span text:style-name="T180"><text:bookmark-ref text:reference-format="page" text:ref-name="__RefHeading___Toc4425_149071425">22</text:bookmark-ref></text:span><text:span text:style-name="T180">)</text:span><text:span text:style-name="T128"> and create a file called “video-offsets”</text:span><text:span text:style-name="T179">. <text:s/></text:span><text:span text:style-name="T128">The format of “video-offsets” is </text:span><text:span text:style-name="T130">a </text:span><text:span text:style-name="T128">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29">Here is an example layout of two RUNs with multiple videos:</text:span></text:p>
      <text:p text:style-name="P144">RUN_a/<text:line-break/><text:tab/>log_RddrSimhost_DtaMtaRelMot.trk<text:line-break/><text:tab/><text:span text:style-name="T129">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44"><text:span text:style-name="T129">RUN_b/<text:line-break/><text:tab/></text:span>log_RddrSimhost_DtaMtaRelMot.trk<text:span text:style-name="T129"><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29">cat RUN_a/video/video-offsets.txt:</text:span></text:p>
      <text:p text:style-name="P146"><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p text:style-name="P146"/>
      <text:h text:style-name="P185" text:outline-level="3"><text:bookmark-start text:name="__RefHeading___Toc4425_149071425"/><text:soft-page-break/>Custom Video Directory Path<text:bookmark-end text:name="__RefHeading___Toc4425_149071425"/></text:h>
      <text:p text:style-name="P42">By default, koviz will search for a “video” directory in the RUN directory. <text:s/>If one would rather place the videos associated with the RUN data in another location, one can give koviz a relative path from the RUN to the video directory. <text:s/>There are two ways to set the video directory. <text:s/>First, one can use the commandline option -videoDir. <text:s/>Second, one can set the video directory path in the main UI window: Options &gt; VideoDirectory. <text:s/>For example, if the data is structured like below, one would set the Option &gt; VideoDirectory to “../Video” <text:span text:style-name="T178">since the relative path from the directory with the sim data to the Video directory is “../Video”</text:span>:<text:line-break/></text:p>
      <text:p text:style-name="P79">RUN_a/</text:p>
      <text:p text:style-name="P89">DATA/</text:p>
      <text:p text:style-name="P113">log_Mars_environment.trk<text:line-break/>log_Mars_rover.trk</text:p>
      <text:p text:style-name="P89">Video/</text:p>
      <text:p text:style-name="P113">video-offsets.txt<text:line-break/>video-1.mp4<text:line-break/>video-2.mp4</text:p>
      <text:h text:style-name="P172" text:outline-level="2"><text:bookmark-start text:name="__RefHeading___Toc1340_1544136475"/>Blender<text:bookmark-end text:name="__RefHeading___Toc1340_1544136475"/></text:h>
      <text:h text:style-name="P186"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100">The start/end times of the koviz </text:span><text:span text:style-name="T102">simulation run </text:span><text:span text:style-name="T100">data are mapped to the begin/end frame</text:span><text:span text:style-name="T101">s </text:span><text:span text:style-name="T100">of the Blender animation. <text:s/>After selecting a koviz curve, mouse movement updates koviz </text:span><text:span text:style-name="T101">live </text:span><text:span text:style-name="T100">time interactively. <text:s/>Th</text:span><text:span text:style-name="T101">e</text:span><text:span text:style-name="T100"> koviz live time is sent to Blender while the mouse moves. <text:s/>Blender interpolates the koviz time to the animation frame and updates the Blender scene. <text:s/></text:span><text:span text:style-name="T101">The sync works from Blender to koviz as well. <text:s/>With mouse/keyboard focus on the Blender window, running the Blender animation will send koviz time updates </text:span><text:span text:style-name="T105">and update koviz plot live time.</text:span></text:p>
      <text:h text:style-name="P186"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104">E</text:span><text:span text:style-name="T68">xample:</text:span></text:p>
      <text:p text:style-name="P68">% <text:span text:style-name="T68">cd $HOME/.config/blender/2.9</text:span><text:span text:style-name="T181">3</text:span><text:span text:style-name="T68">/scripts/addons</text:span></text:p>
      <text:p text:style-name="P68">% <text:span text:style-name="T68">ln </text:span><text:span text:style-name="T70">-s &lt;koviz-home&gt;/python/koviz.py koviz.py</text:span></text:p>
      <text:h text:style-name="P187" text:outline-level="3"><text:bookmark-start text:name="__RefHeading___Toc1346_1544136475"/>Animate Blender Default Cube<text:bookmark-end text:name="__RefHeading___Toc1346_1544136475"/></text:h>
      <text:p text:style-name="P25"><text:span text:style-name="T108">As an example, m</text:span><text:span text:style-name="T106">ake an animation of Blender’s cube:</text:span></text:p>
      <text:list xml:id="list1249893184" text:style-name="L3">
        <text:list-item>
          <text:p text:style-name="P210"><text:span text:style-name="T106">Bring up blender:<text:line-break/>% </text:span><text:span text:style-name="T107">blender</text:span></text:p>
        </text:list-item>
        <text:list-item>
          <text:p text:style-name="P211">Right click &gt; Insert Keyframe &gt; Location</text:p>
        </text:list-item>
        <text:list-item>
          <text:p text:style-name="P211">Slide animation frame to 250</text:p>
        </text:list-item>
        <text:list-item>
          <text:p text:style-name="P211">Move cube up 6: KeyPress gz6</text:p>
        </text:list-item>
        <text:list-item>
          <text:p text:style-name="P211">Right click &gt; Insert Keyframe &gt; Location</text:p>
        </text:list-item>
        <text:list-item>
          <text:p text:style-name="P211">Run animation by mouse clicking |&lt; followed by <text:s/>&gt;</text:p>
        </text:list-item>
        <text:list-item>
          <text:p text:style-name="P211">Save as cube.blend</text:p>
        </text:list-item>
        <text:list-item>
          <text:p text:style-name="P211">Close blender</text:p>
        </text:list-item>
      </text:list>
      <text:h text:style-name="P175" text:outline-level="3"/>
      <text:h text:style-name="P198"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9">% <text:span text:style-name="T103">blender cube.blend -P </text:span><text:span text:style-name="T71">&lt;koviz-home&gt;/blender/koviz-hello-world.py<text:line-break/></text:span><text:span text:style-name="T72"># Should see “Listen for koviz connection”</text:span></text:p>
      <text:p text:style-name="P103"><text:span text:style-name="T83">Run koviz on the supplied </text:span><text:span text:style-name="T81">position.csv file with 250 points. <text:s/>Note that time will go from 1 to 250 and map to the Blender frames. <text:s/>Position </text:span><text:span text:style-name="T85">linearly </text:span><text:span text:style-name="T81">moves from 0 to 6. <text:s/></text:span><text:span text:style-name="T86">This directly maps sim time to blender frames. <text:s/>It’s not necessary to make this direct frame to time map, it just made for a nice example. <text:s/></text:span><text:span text:style-name="T87">In general, koviz maps the start Blender frame to first time stamp and last Blender frame to the last time stamp.</text:span><text:span text:style-name="T81"><text:line-break/><text:line-break/></text:span><text:span text:style-name="T82">% </text:span><text:span text:style-name="T83">koviz &lt;koviz-home&gt;/blender/cube-position.csv</text:span><text:span text:style-name="T72"><text:line-break/># </text:span><text:span text:style-name="T84">Blender will say “Accept koviz connection!”</text:span></text:p>
      <text:p text:style-name="P97">To see koviz time synced to the Blender animation:</text:p>
      <text:list xml:id="list1152237322" text:style-name="L4">
        <text:list-item>
          <text:p text:style-name="P212">In koviz, click <text:span text:style-name="T182">position</text:span></text:p>
        </text:list-item>
        <text:list-item>
          <text:p text:style-name="P212">Mouse select the curve</text:p>
        </text:list-item>
        <text:list-item>
          <text:p text:style-name="P212">Move mouse to see Blender animation sync<text:line-break/>!! If it does not sync, click off of koviz curve, reselect curve and try moving mouse again.</text:p>
        </text:list-item>
      </text:list>
      <text:p text:style-name="P97">To see Blender animation sync to koviz:</text:p>
      <text:list xml:id="list1578547618" text:style-name="L5">
        <text:list-item>
          <text:p text:style-name="P213"><text:s/>Select curve in koviz (if not already done)</text:p>
        </text:list-item>
        <text:list-item>
          <text:p text:style-name="P214"><text:span text:style-name="T74">Click </text:span><text:span text:style-name="T73">Blender </text:span><text:span text:style-name="T74">window so Blender has focus</text:span></text:p>
        </text:list-item>
        <text:list-item>
          <text:p text:style-name="P214"><text:span text:style-name="T74">R</text:span><text:span text:style-name="T73">un </text:span><text:span text:style-name="T74">Blender </text:span><text:span text:style-name="T73">animation </text:span><text:span text:style-name="T74">by mouse clicking </text:span><text:span text:style-name="T75">the play button </text:span><text:span text:style-name="T74">&gt;</text:span></text:p>
        </text:list-item>
      </text:list>
      <text:h text:style-name="Heading_20_3" text:outline-level="3"/>
      <text:h text:style-name="P198" text:outline-level="3"><text:bookmark-start text:name="__RefHeading___Toc1350_1544136475"/>Sync Blender To Koviz <text:span text:style-name="T109">With ES’s Vismo</text:span><text:bookmark-end text:name="__RefHeading___Toc1350_1544136475"/></text:h>
      <text:p text:style-name="P26"><text:span text:style-name="T109">The Engineering Structures group have tied their vismo Blender tool to koviz. <text:s/>If you are lucky enough to have vismo, </text:span><text:span text:style-name="T112">h</text:span><text:span text:style-name="T110">ere is an example. <text:s/></text:span><text:span text:style-name="T111">The -k option tells vismo to sync using koviz:</text:span><text:span text:style-name="T110"><text:line-break/></text:span></text:p>
      <text:list xml:id="list2189049286" text:style-name="L6">
        <text:list-header>
          <text:p text:style-name="P215"><text:span text:style-name="T109">% </text:span><text:span text:style-name="T111">cd &lt;rddr-nds&gt;<text:line-break/>% . .Trick_user_profile ; # To put vismo.py in $PATH<text:line-break/>% cd &lt;rddr-nds&gt;/sims/rddr/nds/SIM_nds<text:line-break/>% </text:span><text:span text:style-name="T112">trick-CP</text:span><text:span text:style-name="T111"><text:line-break/>% ./S_main* SET_checkout/SET_m1u/RUN_checkout_MaxJackknife/input.py<text:line-break/>% vismo.py -k SET_checkout/SET_m1u/RUN_checkout_MaxJackknife<text:line-break/> <text:s text:c="4"/></text:span><text:span text:style-name="T112"># Listen for koviz connection...<text:line-break/>% koviz </text:span><text:span text:style-name="T111">SET_checkout/SET_m1u/RUN_checkout_MaxJackknife </text:span></text:p>
          <text:list>
            <text:list-header>
              <text:p text:style-name="P216"># Should see “Connected to host=127.0.0.1 port=64053!”<text:line-break/></text:p>
            </text:list-header>
          </text:list>
        </text:list-header>
      </text:list>
      <text:p text:style-name="P104">To see the koviz to Blender sync:</text:p>
      <text:list xml:id="list1613928829" text:style-name="L7">
        <text:list-item>
          <text:p text:style-name="P226"><text:span text:style-name="T114">I</text:span><text:span text:style-name="T112">n </text:span><text:span text:style-name="T113">the </text:span><text:span text:style-name="T112">koviz search </text:span><text:span text:style-name="T113">box, </text:span><text:span text:style-name="T112">type “Fqu.daActuator”</text:span></text:p>
        </text:list-item>
        <text:list-item>
          <text:p text:style-name="P226"><text:span text:style-name="T112">Scroll over all 6 vars to coplot 6 actuators on s</text:span><text:span text:style-name="T114">i</text:span><text:span text:style-name="T112">ngle page</text:span></text:p>
        </text:list-item>
        <text:list-item>
          <text:p text:style-name="P228">Select a curve and move mouse to see data synced to docking animation</text:p>
        </text:list-item>
      </text:list>
      <text:p text:style-name="P142"><text:span text:style-name="T109"><text:line-break/></text:span><text:span text:style-name="T114">To see the Blender to koviz syn</text:span><text:span text:style-name="T115">c</text:span><text:span text:style-name="T114">:</text:span></text:p>
      <text:list xml:id="list3458358638" text:style-name="L8">
        <text:list-item>
          <text:p text:style-name="P229">In the Blender window click the |&lt; to put the animation at the beginning</text:p>
        </text:list-item>
        <text:list-item>
          <text:p text:style-name="P229">Press &gt; to play</text:p>
        </text:list-item>
        <text:list-item>
          <text:p text:style-name="P229">The koviz live time should update along with the animation</text:p>
        </text:list-item>
        <text:list-item>
          <text:p text:style-name="P229">Pause the Blender animation by pressing the | | pause button</text:p>
        </text:list-item>
        <text:list-item>
          <text:p text:style-name="P227"><text:span text:style-name="T115">Press the keyboard right and left arrow keys to step the animation and watch koviz update frame by frame</text:span><text:span text:style-name="T109"><text:line-break/></text:span></text:p>
        </text:list-item>
      </text:list>
      <text:p text:style-name="P143"/>
      <text:p text:style-name="P143"/>
      <text:p text:style-name="P143"/>
      <text:h text:style-name="P164" text:outline-level="2"><text:bookmark-start text:name="__RefHeading___Toc1685_1107607212"/><text:soft-page-break/>Live Trick <text:span text:style-name="T145">TV Plots</text:span><text:bookmark-end text:name="__RefHeading___Toc1685_1107607212"/></text:h>
      <text:h text:style-name="P188" text:outline-level="3"><text:bookmark-start text:name="__RefHeading___Toc1687_1107607212"/>Introduction<text:bookmark-end text:name="__RefHeading___Toc1687_1107607212"/></text:h>
      <text:p text:style-name="P99"><text:span text:style-name="T132">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33">for example, to connect to a running sim on the localhost and port 4545:<text:line-break/><text:line-break/><text:tab/>% koviz RUN_realtime -trickport 4545<text:line-break/><text:line-break/></text:span><text:span text:style-name="T142">If the Trick sim is running on a different host, use the -trickhost &lt;host&gt; option.</text:span></text:p>
      <text:h text:style-name="P189"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39">variable</text:span>s since position has two dimensions <text:s/>e.g.:<text:line-break/><text:line-break/><text:tab/>ball.state.out.position[0]<text:line-break/><text:tab/>ball.state.out.position[1]<text:line-break/><text:line-break/>When one clicks a koviz-tv parameter, by default it makes a single plot <text:span text:style-name="T134">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49">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577083740640">
          <table:table-cell table:style-name="LivePlotInteraction.A1" office:value-type="string">
            <text:p text:style-name="P135"><text:span text:style-name="T143">Plot e</text:span><text:span text:style-name="T135">xpand</text:span><text:span text:style-name="T143">ed</text:span><text:span text:style-name="T135"> parameter </text:span><text:span text:style-name="T143">o</text:span><text:span text:style-name="T135">n individual pages</text:span></text:p>
          </table:table-cell>
          <table:table-cell table:style-name="LivePlotInteraction.A1" office:value-type="string">
            <text:p text:style-name="P134">Left Mouse Click parameter</text:p>
          </table:table-cell>
        </table:table-row>
        <table:table-row table:style-name="TableLine94577083700272">
          <table:table-cell table:style-name="LivePlotInteraction.A1" office:value-type="string">
            <text:p text:style-name="P135"><text:span text:style-name="T143">Plot e</text:span><text:span text:style-name="T135">xpand</text:span><text:span text:style-name="T143">ed</text:span><text:span text:style-name="T135"> parameter </text:span><text:span text:style-name="T143">on</text:span><text:span text:style-name="T135"> different plots on same page</text:span></text:p>
          </table:table-cell>
          <table:table-cell table:style-name="LivePlotInteraction.A1" office:value-type="string">
            <text:p text:style-name="P134">Ctrl-Key + Left Mouse Click parameter</text:p>
          </table:table-cell>
        </table:table-row>
        <table:table-row table:style-name="TableLine94577083702992">
          <table:table-cell table:style-name="LivePlotInteraction.A1" office:value-type="string">
            <text:p text:style-name="P135"><text:span text:style-name="T146">Cop</text:span><text:span text:style-name="T143">lot expanded </text:span><text:span text:style-name="T135">parameter on same plot </text:span></text:p>
          </table:table-cell>
          <table:table-cell table:style-name="LivePlotInteraction.A1" office:value-type="string">
            <text:p text:style-name="P134">Alt-Key + Left Mouse Click parameter</text:p>
          </table:table-cell>
        </table:table-row>
        <table:table-row table:style-name="TableLine94577083703632">
          <table:table-cell table:style-name="LivePlotInteraction.A1" office:value-type="string">
            <text:p text:style-name="P139">Start a new plot page<text:line-break/>and honor optional Ctrl and Alt keys</text:p>
          </table:table-cell>
          <table:table-cell table:style-name="LivePlotInteraction.A1" office:value-type="string">
            <text:p text:style-name="P139">Shift-Key + [Ctrl|Alt] + Left Mouse click parameter</text:p>
          </table:table-cell>
        </table:table-row>
      </table:table>
      <text:h text:style-name="Heading_20_3" text:outline-level="3"><text:soft-page-break/></text:h>
      <text:h text:style-name="P190" text:outline-level="3"><text:bookmark-start text:name="__RefHeading___Toc1691_1107607212"/>Changing Live Plot Domain<text:bookmark-end text:name="__RefHeading___Toc1691_1107607212"/></text:h>
      <text:p text:style-name="P32"><text:span text:style-name="T135">To change the plot domain (x-axis variable) one must select Options-&gt;EnableDragAndDrop, then drag </text:span><text:span text:style-name="T136">a </text:span><text:span text:style-name="T135">TV parameter onto the x-axis of the plot to change. <text:s/></text:span><text:span text:style-name="T136">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22">th</text:span><text:span text:style-name="T136">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37">for both </text:span>recorded data and live sim data. <text:s/><text:span text:style-name="T137">One can either specify the DP files on commandline or select the DPs from the DP panel when in live mode. <text:s/>The example below </text:span><text:span text:style-name="T138">has </text:span><text:span text:style-name="T137"><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47">Live </text:span>Spring <text:span text:style-name="T148">Plot </text:span>Example<text:bookmark-end text:name="__RefHeading___Toc1780_3036021424"/></text:h>
      <text:p text:style-name="P34">Koviz contains a spring sim example. <text:s/>To try the spring sim with live plotting, follow these steps:<text:line-break/></text:p>
      <text:list xml:id="list3730629058" text:style-name="L9">
        <text:list-item>
          <text:p text:style-name="P217">Build the koviz spring sim<text:line-break/>% cd &lt;koviz-home&gt;/sims/SIM_spring<text:line-break/>% trick-CP</text:p>
        </text:list-item>
        <text:list-item>
          <text:p text:style-name="P217">Launch the realtime spring sim (do not press start yet)<text:line-break/>% ./S_main*.exe RUN_realtime/input.py &amp;</text:p>
        </text:list-item>
        <text:list-item>
          <text:p text:style-name="P217">Launch koviz and connect to the trick sim<text:line-break/>% koviz -trickport 4545</text:p>
        </text:list-item>
        <text:list-item>
          <text:p text:style-name="P217">Select params to plot<text:line-break/>While holding the Ctrl key down, click:<text:line-break/> spring.pos<text:line-break/> spring.vel<text:line-break/> spring.acc</text:p>
        </text:list-item>
        <text:list-item>
          <text:p text:style-name="P217"><text:soft-page-break/>Run sim by pressing “Start” button on sim control</text:p>
        </text:list-item>
        <text:list-item>
          <text:p text:style-name="P217">Plots should update after pressing start</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73" text:outline-level="2"><text:bookmark-start text:name="__RefHeading___Toc4053_2364949263"/>Profiling Trick Jobs<text:bookmark-end text:name="__RefHeading___Toc4053_2364949263"/></text:h>
      <text:p text:style-name="P40">This is an example of how to profile a Trick sim using koviz’ mini profiler. <text:s/>The example induces a <text:span text:style-name="T167">couple sleeps</text:span> in the Trick Ball L2 sim and shows how one would profile t<text:span text:style-name="T167">he sim</text:span>.</text:p>
      <text:h text:style-name="P191" text:outline-level="3"><text:bookmark-start text:name="__RefHeading___Toc2091_3967031703"/><text:span text:style-name="T168">Add Sleeps To</text:span> Ball L2 Sim<text:bookmark-end text:name="__RefHeading___Toc2091_3967031703"/></text:h>
      <text:p text:style-name="P41">% cd $HOME<text:line-break/>% mkdir sims<text:line-break/>% cd sims<text:line-break/>% cp -r &lt;trick&gt;/trick_sims/Ball .<text:line-break/>% cd Ball/models/ball/L2/src<text:line-break/>% vi ball_floor.c<text:line-break/> <text:s text:c="3"/># <text:span text:style-name="T169">Add this #include to top of floor function</text:span><text:line-break/> <text:s text:c="3"/>#include &lt;time.h&gt;</text:p>
      <text:p text:style-name="P41"><text:s text:c="4"/>// <text:span text:style-name="T170">Add 3ms and 7ms sleeps </text:span><text:span text:style-name="T169">to body of floor function</text:span><text:line-break/> <text:s text:c="3"/>struct timespec ts3;<text:line-break/> <text:s text:c="3"/>ts3.tv_sec = 0;<text:line-break/> <text:s text:c="3"/>ts3.tv_nsec = 3 * 1000000; <text:s/>// 3 ms</text:p>
      <text:p text:style-name="P41"><text:s text:c="4"/>struct timespec ts7;<text:line-break/> <text:s text:c="3"/>ts7.tv_sec = 0;<text:line-break/> <text:s text:c="3"/>ts7.tv_nsec = 7 * 1000000; <text:s/>// 7 ms</text:p>
      <text:p text:style-name="P41"><text:s text:c="4"/>// Two sleeps<text:line-break/> <text:s text:c="3"/>nanosleep(&amp;ts<text:span text:style-name="T170">3</text:span>, NULL);<text:line-break/> <text:s text:c="3"/>nanosleep(&amp;ts<text:span text:style-name="T170">7</text:span>, NULL);</text:p>
      <text:h text:style-name="P192" text:outline-level="3"><text:bookmark-start text:name="__RefHeading___Toc2093_3967031703"/>Run And View Sleep Effect<text:bookmark-end text:name="__RefHeading___Toc2093_3967031703"/></text:h>
      <text:p text:style-name="P41">% cd $HOME/sims/Ball/SIM_ball_L2<text:line-break/>% vi Modified_data/realtime.py<text:line-break/> <text:s text:c="3"/># Turn frame log on<text:line-break/> <text:s text:c="3"/>trick.frame_log_on()<text:line-break/>% <text:span text:style-name="T168">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70">(should be a </text:span><text:span text:style-name="T171">little over </text:span><text:span text:style-name="T170">10ms </text:span><text:span text:style-name="T171">with possible spikes</text:span><text:span text:style-name="T170">)</text:span></text:p>
      <text:h text:style-name="P193" text:outline-level="3"><text:bookmark-start text:name="__RefHeading___Toc2095_3967031703"/>Modify and Build Profiler<text:bookmark-end text:name="__RefHeading___Toc2095_3967031703"/></text:h>
      <text:p text:style-name="P41">% cd &lt;koviz&gt;/profiler<text:line-break/>% ./clean.sh<text:line-break/>% <text:span text:style-name="T168">vi koviz.h<text:line-break/> <text:s text:c="3"/>1. Uncomment out #define TRICK<text:line-break/> <text:s text:c="3"/>2. Change KOVIZ_MAX_STATS to 2 (</text:span><text:span text:style-name="T167">to </text:span><text:span text:style-name="T168">tim</text:span><text:span text:style-name="T167">e</text:span><text:span text:style-name="T168"> 2 sleeps)<text:line-break/> <text:s text:c="3"/>3. Change <text:s/>KOVIZ_NRECS 3000 (100Hz*30 second run)<text:line-break/>% </text:span><text:span text:style-name="T172">cc -I&lt;trick&gt;/include -c koviz.c<text:line-break/>% ar cr libkoviz.a koviz.o</text:span></text:p>
      <text:h text:style-name="P194" text:outline-level="3"><text:bookmark-start text:name="__RefHeading___Toc2097_3967031703"/>Add Profiler T<text:span text:style-name="T169">o Sim</text:span><text:bookmark-end text:name="__RefHeading___Toc2097_3967031703"/></text:h>
      <text:p text:style-name="P41">% vi $HOME/sims/Ball/models/ball/L2/src/ball_floor.c<text:line-break/> <text:s text:c="3"/><text:span text:style-name="T173"># </text:span><text:span text:style-name="T174">Add profiler header to ball_floor.c</text:span><text:span text:style-name="T173"><text:line-break/> <text:s text:c="3"/>#include &lt;koviz&gt;/profiler/koviz.h<text:line-break/></text:span><text:line-break/> <text:s text:c="3"/><text:span text:style-name="T167"># </text:span><text:span text:style-name="T174">Add two </text:span><text:span text:style-name="T175">profiler </text:span><text:span text:style-name="T174">tags</text:span><text:span text:style-name="T173"><text:line-break/> <text:s text:c="3"/>koviz_start(“gtod”, “koviz.sleep.</text:span><text:span text:style-name="T169">3</text:span><text:span text:style-name="T173">”);<text:line-break/> <text:s text:c="3"/>nanosleep(&amp;ts</text:span><text:span text:style-name="T169">3</text:span><text:span text:style-name="T173">, NULL);<text:line-break/> <text:s text:c="3"/>koviz_stop(“gtod”, “koviz.sleep.</text:span><text:span text:style-name="T169">3</text:span><text:span text:style-name="T173">”);<text:line-break/> <text:s text:c="3"/>koviz_start(“gtod”, “koviz.sleep.</text:span><text:span text:style-name="T169">7</text:span><text:span text:style-name="T173">”);<text:line-break/> <text:s text:c="3"/>nanosleep(&amp;ts</text:span><text:span text:style-name="T169">7</text:span><text:span text:style-name="T173">, NULL);<text:line-break/> <text:s text:c="3"/>koviz_stop(“gtod”, “koviz.sleep.</text:span><text:span text:style-name="T169">7</text:span><text:span text:style-name="T173">”);</text:span></text:p>
      <text:p text:style-name="P41">% <text:span text:style-name="T173">cd $HOME/sims/Ball/SIM_</text:span><text:span text:style-name="T176">b</text:span><text:span text:style-name="T173">all_L2<text:line-break/>% vi S_overrides.mk<text:line-break/> <text:s text:c="3"/># Add <text:line-break/> <text:s text:c="3"/>TRICK_USER_LINK_LIBS += &lt;koviz&gt;/profiler/libkoviz.a</text:span></text:p>
      <text:p text:style-name="P41"><text:span text:style-name="T166"># Rebuild sim with profiler</text:span><text:line-break/>% <text:span text:style-name="T166">trick-CP</text:span></text:p>
      <text:h text:style-name="P195" text:outline-level="3"><text:bookmark-start text:name="__RefHeading___Toc2099_3967031703"/>Run Sim And See Profile Results<text:bookmark-end text:name="__RefHeading___Toc2099_3967031703"/></text:h>
      <text:p text:style-name="P39">% ./<text:span text:style-name="T166">S_main* RUN_realtime/input.py<text:line-break/>% mv koviz.trk RUN_realtime<text:line-break/>% koviz RUN_realtime<text:line-break/> <text:s text:c="3"/># Put koviz|floor in search box and coplot</text:span></text:p>
      <text:h text:style-name="P165" text:outline-level="2"><text:bookmark-start text:name="__RefHeading___Toc2386_1878335349"/><text:soft-page-break/>HDF5<text:bookmark-end text:name="__RefHeading___Toc2386_1878335349"/></text:h>
      <text:p text:style-name="P44"><text:span text:style-name="T186">Koviz supports Trick HDF5 and </text:span><text:span text:style-name="T187">generic HDF5 time-history datasets. <text:s/></text:span>Generic HDF5 support is intended for telemetry/time-history style data: rank-1 compound datasets containing a time field and numeric signal fields. <text:s text:c="2"/><text:span text:style-name="T187">The time field must be given to Koviz via the -timeName option. <text:s/></text:span>Non-numeric fields are plotted as NaN<text:span text:style-name="T187">s </text:span><text:span text:style-name="T192">and will be empty.</text:span></text:p>
      <text:h text:style-name="P196" text:outline-level="3"><text:bookmark-start text:name="__RefHeading___Toc2388_1878335349"/>Building Koviz With HDF5<text:bookmark-end text:name="__RefHeading___Toc2388_1878335349"/></text:h>
      <text:p text:style-name="P45"><text:span text:style-name="T54">To build koviz with </text:span><text:span text:style-name="T187">HDF5</text:span><text:span text:style-name="T54"> support, the </text:span><text:span text:style-name="T187">HDF5</text:span><text:span text:style-name="T54"> development libraries must be installed. <text:s/>On </text:span><text:span text:style-name="T187">Redhat 8</text:span><text:span text:style-name="T54">, the following will install </text:span><text:span text:style-name="T55">the </text:span><text:span text:style-name="T187">HDF5</text:span><text:span text:style-name="T54"> </text:span><text:span text:style-name="T55">dependencies and build koviz with </text:span><text:span text:style-name="T187">HDF5 support:</text:span></text:p>
      <text:p text:style-name="P67">% sudo <text:span text:style-name="T187">dnf</text:span> install <text:span text:style-name="T188">hdf5-devel</text:span><text:line-break/>% cd &lt;koviz-repo&gt;<text:line-break/>% make distclean<text:line-break/>% qmake-qt5<text:line-break/>% make</text:p>
      <text:h text:style-name="P197" text:outline-level="3"><text:bookmark-start text:name="__RefHeading___Toc2390_1878335349"/>Generic HDF5 Parameters<text:bookmark-end text:name="__RefHeading___Toc2390_1878335349"/></text:h>
      <text:p text:style-name="P218"><text:span text:style-name="T188">If koviz is given a generic HDF5 file and -timeName &lt;time_name&gt;, koviz will search for paths that contain </text:span><text:span text:style-name="T192">rank-1 </text:span><text:span text:style-name="T188">compound datasets with </text:span><text:span text:style-name="T190">the given </text:span><text:span text:style-name="T188">&lt;time_name&gt; fiel</text:span><text:span text:style-name="T190">d</text:span><text:span text:style-name="T188">, and then make</text:span><text:span text:style-name="T192">s</text:span><text:span text:style-name="T188"> a list of plottable parameters from those fields. <text:s/><text:line-break/><text:line-break/>For example, </text:span><text:span text:style-name="T189">suppose a file called “orion.h5” </text:span><text:span text:style-name="T192">contains</text:span><text:span text:style-name="T189"> two paths: “/Storage/power” and “/Storage/dynamics”. <text:s text:c="2"/>Suppose “/Storage/power” </text:span><text:span text:style-name="T190">is </text:span><text:span text:style-name="T191">a </text:span><text:span text:style-name="T189">rank-1 compound dataset </text:span><text:span text:style-name="T190">with</text:span><text:span text:style-name="T189"> fields “time”, <text:s/>“battery_current” </text:span><text:span text:style-name="T190">and</text:span><text:span text:style-name="T189"> “solar_array_current”. <text:s/>And suppose “/</text:span><text:span text:style-name="T190">Storage/dynamics” had these fields: <text:s/></text:span><text:span text:style-name="T189">“time”, “mass”, “cg”, “position” and “velocity. <text:s/></text:span><text:span text:style-name="T190">Koviz would be launched like so:<text:line-break/><text:line-break/>% koviz -timeName “time” orion.h5 <text:line-break/></text:span><text:span text:style-name="T188"><text:line-break/></text:span><text:span text:style-name="T190">In this case, koviz’ list of plottable parameters would be:<text:line-break/><text:line-break/>time<text:line-break/>/Storage/power/battery_current<text:line-break/>/Storage/power/solar_array_current<text:line-break/></text:span><text:span text:style-name="T189">/</text:span><text:span text:style-name="T190">Storage/dynamics/mass<text:line-break/></text:span><text:span text:style-name="T189">/</text:span><text:span text:style-name="T190">Storage/dynamics/cg<text:line-break/></text:span><text:span text:style-name="T189">/</text:span><text:span text:style-name="T190">Storage/dynamics/velocity<text:line-break/></text:span><text:span text:style-name="T189">/</text:span><text:span text:style-name="T190">Storage/dynamics/position</text:span></text:p>
      <text:h text:style-name="Heading_20_2" text:outline-level="2"><text:bookmark-start text:name="__RefHeading___Toc2812_1878335349"/><text:soft-page-break/><text:span text:style-name="T193">Parquet</text:span><text:bookmark-end text:name="__RefHeading___Toc2812_1878335349"/></text:h>
      <text:p text:style-name="P219"><text:span text:style-name="T194">Koviz supports </text:span><text:span text:style-name="T198">time-history data stored </text:span><text:span text:style-name="T194">Apache Parquet </text:span><text:span text:style-name="T198">files</text:span><text:span text:style-name="T194">. <text:s/></text:span><text:span text:style-name="T206">A single </text:span><text:span text:style-name="T198">Parquet file may </text:span><text:span text:style-name="T206">contain a</text:span><text:span text:style-name="T198"> Monte Carlo set of RUNs (format and example below).</text:span></text:p>
      <text:h text:style-name="Heading_20_3" text:outline-level="3"><text:bookmark-start text:name="__RefHeading___Toc2814_1878335349"/>Build<text:span text:style-name="T210">ing</text:span> Koviz With Parquet<text:bookmark-end text:name="__RefHeading___Toc2814_1878335349"/></text:h>
      <text:p text:style-name="P223"><text:span text:style-name="T198">Here are Redhat 8 instructions. <text:s/></text:span><text:span text:style-name="T194">The dnf packages for Parquet on Redhat 8 are out of date. <text:s/>The Parquet Arrow project needs to </text:span><text:span text:style-name="T207">be</text:span><text:span text:style-name="T194"> built from s</text:span><text:span text:style-name="T206">ource</text:span><text:span text:style-name="T194">.</text:span></text:p>
      <text:p text:style-name="P222"><text:span text:style-name="T206">1.</text:span><text:span text:style-name="T194"> One must </text:span><text:span text:style-name="T197">build with newer version</text:span><text:span text:style-name="T194"> </text:span><text:span text:style-name="T197">of </text:span><text:span text:style-name="T194">gcc<text:line-break/>% sudo dnf install gcc-toolset-11<text:line-break/>% </text:span>scl enable gcc-toolset-11 bash</text:p>
      <text:p text:style-name="P221"><text:span text:style-name="T206">2.</text:span> Lib Atomic Dependency (note th<text:span text:style-name="T208">e</text:span> link hack!)<text:line-break/>% <text:span text:style-name="T209">sudo </text:span>dnf install -y libatomic<text:line-break/>% sudo ln -s /usr/lib64/libatomic.so.1 /usr/lib64/libatomic.so</text:p>
      <text:p text:style-name="P220"><text:span text:style-name="T206">3.</text:span><text:span text:style-name="T195"> Build </text:span><text:span text:style-name="T206">Apache Arrow with </text:span><text:span text:style-name="T195">Parquet </text:span><text:span text:style-name="T206">support</text:span><text:span text:style-name="T194"><text:line-break/>% cd $HOME<text:line-break/>% mkdir -p $HOME/local/arrow<text:line-break/>% export PREFIX=$HOME/local/arrow<text:line-break/>% git clone </text:span><text:a xlink:type="simple" xlink:href="https://github.com/apache/arrow.git" text:style-name="Internet_20_link" text:visited-style-name="Visited_20_Internet_20_Link"><text:span text:style-name="T194">https://github.com/apache/arrow.git</text:span></text:a><text:span text:style-name="T194"><text:line-break/>% cd arrow/cpp<text:line-break/>% mkdir build<text:line-break/>% </text:span><text:span text:style-name="T196">cd build</text:span><text:span text:style-name="T194"><text:line-break/>% </text:span>cmake .. \<text:line-break/> <text:s text:c="7"/>-DCMAKE_BUILD_TYPE=Release \<text:line-break/> <text:s text:c="7"/>-DCMAKE_CXX_STANDARD=20 \<text:line-break/> <text:s text:c="7"/>-DARROW_PARQUET=ON \<text:line-break/> <text:s text:c="7"/>-DARROW_WITH_SNAPPY=ON \<text:line-break/> <text:s text:c="7"/><text:span text:style-name="T69">-</text:span><text:span text:style-name="T94">D</text:span><text:span text:style-name="T69">CMAKE_INSTALL_PREFIX=$HOME/local/arrow<text:line-break/>% </text:span><text:span text:style-name="T99">make -j$(nproc)</text:span><text:span text:style-name="T69"><text:line-break/>% </text:span><text:span text:style-name="T93">make install<text:line-break/><text:line-break/># Build koviz with locally built Parquet (Note: still using gcc11)<text:line-break/>% cd &lt;koviz-home&gt;<text:line-break/>% make distclean<text:line-break/>% qmake-qt5 ARROW_HOME=$HOME/local/arrow<text:line-break/>% make</text:span></text:p>
      <text:h text:style-name="P198" text:outline-level="3"><text:bookmark-start text:name="__RefHeading___Toc2816_1878335349"/><text:span text:style-name="T93">P</text:span><text:span text:style-name="T69">arquet Data Layout</text:span><text:bookmark-end text:name="__RefHeading___Toc2816_1878335349"/></text:h>
      <text:p text:style-name="Text_20_body"><text:span text:style-name="T69">Koviz expects </text:span><text:span text:style-name="T97">time-history </text:span><text:span text:style-name="T69">data to be organized </text:span><text:span text:style-name="T97">in columnar form</text:span><text:span text:style-name="T69">, where each row represents a sample. <text:s/></text:span><text:span text:style-name="T97">For</text:span><text:span text:style-name="T95"> Monte Carlo </text:span><text:span text:style-name="T97">datasets</text:span><text:span text:style-name="T95">, </text:span><text:span text:style-name="T97">a run </text:span><text:span text:style-name="T95">column </text:span><text:span text:style-name="T97">is required</text:span><text:span text:style-name="T95">. <text:s/></text:span><text:span text:style-name="T96">Run rows </text:span><text:span text:style-name="T97">may</text:span><text:span text:style-name="T96"> be </text:span><text:span text:style-name="T97">grouped or </text:span><text:span text:style-name="T96">interleaved. <text:s/>Example below shows runs grouped. <text:s/></text:span><text:span text:style-name="T98">As usual, a time column must be present too.</text:span><text:span text:style-name="T69"><text:line-break/><text:line-break/></text:span><text:span text:style-name="T95">Example: </text:span><text:span text:style-name="T96">2 runs, 3 samples </text:span><text:span text:style-name="T97">each</text:span><text:span text:style-name="T95">:</text:span></text:p>
      <table:table table:name="ExampleParquetLayout" table:style-name="ExampleParquetLayout" table:template-name="Elegant">
        <table:table-column table:style-name="ExampleParquetLayout.A" table:number-columns-repeated="4"/>
        <table:table-row table:style-name="TableLine94577112467808">
          <table:table-cell table:style-name="ExampleParquetLayout.A1" office:value-type="string">
            <text:p text:style-name="P203"><text:span text:style-name="T199">t</text:span>ime</text:p>
          </table:table-cell>
          <table:table-cell table:style-name="ExampleParquetLayout.A1" office:value-type="string">
            <text:p text:style-name="P203"><text:span text:style-name="T199">r</text:span>un</text:p>
          </table:table-cell>
          <table:table-cell table:style-name="ExampleParquetLayout.A1" office:value-type="string">
            <text:p text:style-name="P203"><text:span text:style-name="T199">p</text:span>osition</text:p>
          </table:table-cell>
          <table:table-cell table:style-name="ExampleParquetLayout.A1" office:value-type="string">
            <text:p text:style-name="P203"><text:span text:style-name="T199">v</text:span>elocity</text:p>
          </table:table-cell>
        </table:table-row>
        <table:table-row table:style-name="TableLine94577112467808">
          <table:table-cell table:style-name="ExampleParquetLayout.A2" office:value-type="string">
            <text:p text:style-name="P204">0</text:p>
          </table:table-cell>
          <table:table-cell table:style-name="ExampleParquetLayout.B2" office:value-type="float" office:value="0">
            <text:p text:style-name="P204">0</text:p>
          </table:table-cell>
          <table:table-cell table:style-name="ExampleParquetLayout.B2" office:value-type="float" office:value="0">
            <text:p text:style-name="P204">0</text:p>
          </table:table-cell>
          <table:table-cell table:style-name="ExampleParquetLayout.B2" office:value-type="float" office:value="0.1">
            <text:p text:style-name="P204">0.1</text:p>
          </table:table-cell>
        </table:table-row>
        <table:table-row table:style-name="ExampleParquetLayout.3">
          <table:table-cell table:style-name="ExampleParquetLayout.A2" office:value-type="string">
            <text:p text:style-name="P204">1</text:p>
          </table:table-cell>
          <table:table-cell table:style-name="ExampleParquetLayout.B2" office:value-type="float" office:value="0">
            <text:p text:style-name="P204">0</text:p>
          </table:table-cell>
          <table:table-cell table:style-name="ExampleParquetLayout.B2" office:value-type="float" office:value="1">
            <text:p text:style-name="P204">1</text:p>
          </table:table-cell>
          <table:table-cell table:style-name="ExampleParquetLayout.B2" office:value-type="float" office:value="0.2">
            <text:p text:style-name="P204">0.2</text:p>
          </table:table-cell>
        </table:table-row>
        <table:table-row table:style-name="ExampleParquetLayout.3">
          <table:table-cell table:style-name="ExampleParquetLayout.A2" office:value-type="string">
            <text:p text:style-name="P204">2</text:p>
          </table:table-cell>
          <table:table-cell table:style-name="ExampleParquetLayout.B2" office:value-type="float" office:value="0">
            <text:p text:style-name="P204">0</text:p>
          </table:table-cell>
          <table:table-cell table:style-name="ExampleParquetLayout.B2" office:value-type="float" office:value="2">
            <text:p text:style-name="P204">2</text:p>
          </table:table-cell>
          <table:table-cell table:style-name="ExampleParquetLayout.B2" office:value-type="float" office:value="0.3">
            <text:p text:style-name="P204">0.3</text:p>
          </table:table-cell>
        </table:table-row>
        <table:table-row table:style-name="ExampleParquetLayout.3">
          <table:table-cell table:style-name="ExampleParquetLayout.A2" office:value-type="string">
            <text:p text:style-name="P204">0</text:p>
          </table:table-cell>
          <table:table-cell table:style-name="ExampleParquetLayout.B2" office:value-type="float" office:value="1">
            <text:p text:style-name="P204">1</text:p>
          </table:table-cell>
          <table:table-cell table:style-name="ExampleParquetLayout.B2" office:value-type="float" office:value="0.66">
            <text:p text:style-name="P204">0.66</text:p>
          </table:table-cell>
          <table:table-cell table:style-name="ExampleParquetLayout.B2" office:value-type="float" office:value="0.11">
            <text:p text:style-name="P204">0.11</text:p>
          </table:table-cell>
        </table:table-row>
        <table:table-row table:style-name="ExampleParquetLayout.3">
          <table:table-cell table:style-name="ExampleParquetLayout.A2" office:value-type="string">
            <text:p text:style-name="P204">1</text:p>
          </table:table-cell>
          <table:table-cell table:style-name="ExampleParquetLayout.B2" office:value-type="float" office:value="1">
            <text:p text:style-name="P204">1</text:p>
          </table:table-cell>
          <table:table-cell table:style-name="ExampleParquetLayout.B2" office:value-type="float" office:value="0.77">
            <text:p text:style-name="P204">0.77</text:p>
          </table:table-cell>
          <table:table-cell table:style-name="ExampleParquetLayout.B2" office:value-type="float" office:value="0.22">
            <text:p text:style-name="P204">0.22</text:p>
          </table:table-cell>
        </table:table-row>
        <table:table-row table:style-name="ExampleParquetLayout.3">
          <table:table-cell table:style-name="ExampleParquetLayout.A2" office:value-type="string">
            <text:p text:style-name="P204">2</text:p>
          </table:table-cell>
          <table:table-cell table:style-name="ExampleParquetLayout.B2" office:value-type="float" office:value="1">
            <text:p text:style-name="P204">1</text:p>
          </table:table-cell>
          <table:table-cell table:style-name="ExampleParquetLayout.B2" office:value-type="float" office:value="0.88">
            <text:p text:style-name="P204">0.88</text:p>
          </table:table-cell>
          <table:table-cell table:style-name="ExampleParquetLayout.B2" office:value-type="float" office:value="0.33">
            <text:p text:style-name="P204">0.33</text:p>
          </table:table-cell>
        </table:table-row>
        <table:table-row table:style-name="ExampleParquetLayout.3">
          <table:table-cell table:style-name="ExampleParquetLayout.A8" office:value-type="string">
            <text:p text:style-name="P204"/>
          </table:table-cell>
          <table:table-cell table:style-name="ExampleParquetLayout.B8">
            <text:p text:style-name="P204"/>
          </table:table-cell>
          <table:table-cell table:style-name="ExampleParquetLayout.B8">
            <text:p text:style-name="P204"/>
          </table:table-cell>
          <table:table-cell table:style-name="ExampleParquetLayout.B8">
            <text:p text:style-name="P204"/>
          </table:table-cell>
        </table:table-row>
      </table:table>
      <text:h text:style-name="Heading_20_3" text:outline-level="3"><text:span text:style-name="T95"/></text:h>
      <text:h text:style-name="Heading_20_3" text:outline-level="3"><text:bookmark-start text:name="__RefHeading___Toc2818_1878335349"/><text:span text:style-name="T96">Parquet Units</text:span><text:bookmark-end text:name="__RefHeading___Toc2818_1878335349"/></text:h>
      <text:p text:style-name="Text_20_body"><text:span text:style-name="T96">Koviz reads parameter units from Parquet key/value metadata. <text:s/>The metadata key must match the corresponding column name. <text:s/>If no unit metadata is present, Koviz displays the parameter as unitless. <text:s/>Parquet files often contain additional internal metadata entries such as: ARROW:schema. These entries are generated by Apache Arrow and are ignored by Koviz.</text:span></text:p>
      <text:p text:style-name="P224"><text:span text:style-name="T69">Meta data for table above:</text:span></text:p>
      <text:p text:style-name="Text_20_body"><text:span text:style-name="Source_20_Text"><text:span text:style-name="T201">time = s<text:line-break/></text:span></text:span><text:span text:style-name="Source_20_Text"><text:span text:style-name="T202">position</text:span></text:span><text:span text:style-name="Source_20_Text"><text:span text:style-name="T201"> = m<text:line-break/></text:span></text:span><text:span text:style-name="Source_20_Text"><text:span text:style-name="T202">v</text:span></text:span><text:span text:style-name="Source_20_Text"><text:span text:style-name="T201">elocity = m/s</text:span></text:span></text:p>
      <text:h text:style-name="Heading_20_3" text:outline-level="3"><text:bookmark-start text:name="__RefHeading___Toc2820_1878335349"/><text:span text:style-name="Source_20_Text"><text:span text:style-name="T200">Koviz Parquet Test</text:span></text:span><text:bookmark-end text:name="__RefHeading___Toc2820_1878335349"/></text:h>
      <text:p text:style-name="P225"><text:span text:style-name="Source_20_Text"><text:span text:style-name="T203">Koviz contains a test Parquet file and python scripts that generated the test file </text:span></text:span><text:span text:style-name="Source_20_Text"><text:span text:style-name="T204">as well as a script that shows the meta data</text:span></text:span><text:span text:style-name="Source_20_Text"><text:span text:style-name="T203">. <text:s/></text:span></text:span><text:span text:style-name="Source_20_Text"><text:span text:style-name="T204">The python scripts require python3.11 and a pip install of some arrow/parquet libs and is more there </text:span></text:span><text:span text:style-name="Source_20_Text"><text:span text:style-name="T205">for reference</text:span></text:span><text:span text:style-name="Source_20_Text"><text:span text:style-name="T204">. <text:s/></text:span></text:span><text:span text:style-name="Source_20_Text"><text:span text:style-name="T205">To run the test</text:span></text:span><text:span text:style-name="Source_20_Text"><text:span text:style-name="T203">:</text:span></text:span></text:p>
      <text:p text:style-name="P225"><text:span text:style-name="Source_20_Text"><text:span text:style-name="T203">% cd &lt;koviz-home&gt;/tests/test57<text:line-break/>% koviz -runColumnName run monte_test.parquet</text:span></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33</text:page-number></text:p>
      </style:header>
      <style:footer>
        <text:p text:style-name="MP2"><text:span text:style-name="MT1">Page </text:span><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6-06-03T12:34:11.308973499</dc:date>
    <meta:editing-duration>P6DT24M17S</meta:editing-duration>
    <meta:editing-cycles>239</meta:editing-cycles>
    <meta:generator>LibreOffice/6.4.7.2$Linux_X86_64 LibreOffice_project/40$Build-2</meta:generator>
    <meta:document-statistic meta:table-count="4" meta:image-count="3" meta:object-count="0" meta:page-count="33" meta:paragraph-count="452" meta:word-count="5453" meta:character-count="36494" meta:non-whitespace-character-count="30788"/>
  </office:meta>
</office:document-meta>
</file>